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0c6a6b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e537e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0c6a6b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0f16dd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0ff2d7" style:text-blinking="false" fo:background-color="#ffff00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0ff2d7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10e827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130fc2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1464e7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1513dc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191726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1c84dc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1e8141" style:text-blinking="false" fo:background-color="transparent"/>
    </style:style>
    <style:style style:name="P14" style:family="paragraph" style:parent-style-name="Standard">
      <style:text-properties style:font-name="Arial1" fo:font-size="11pt" officeooo:paragraph-rsid="001ee5fa" style:font-size-asian="11pt" style:font-size-complex="11pt"/>
    </style:style>
    <style:style style:name="P15" style:family="paragraph" style:parent-style-name="Standard">
      <style:text-properties style:font-name="Arial1" fo:font-size="11pt" officeooo:paragraph-rsid="001fb154" style:font-size-asian="11pt" style:font-size-complex="11pt"/>
    </style:style>
    <style:style style:name="P16" style:family="paragraph" style:parent-style-name="Standard">
      <style:text-properties style:font-name="Arial1" fo:font-size="11pt" officeooo:paragraph-rsid="0021fa55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paragraph-rsid="00261afd" style:text-blinking="false" fo:background-color="transparent"/>
    </style:style>
    <style:style style:name="P18" style:family="paragraph" style:parent-style-name="Standard">
      <style:text-properties style:font-name="Arial1" fo:font-size="11pt" officeooo:paragraph-rsid="001f74a4" style:font-size-asian="11pt" style:font-size-complex="11pt"/>
    </style:style>
    <style:style style:name="P19" style:family="paragraph" style:parent-style-name="Standard">
      <style:text-properties style:font-name="Arial1" fo:font-size="11pt" officeooo:paragraph-rsid="0020833f" style:font-size-asian="11pt" style:font-size-complex="11pt"/>
    </style:style>
    <style:style style:name="P20" style:family="paragraph" style:parent-style-name="Standard">
      <style:text-properties style:font-name="Arial1" fo:font-size="11pt" officeooo:paragraph-rsid="00236a68" style:font-size-asian="11pt" style:font-size-complex="11pt"/>
    </style:style>
    <style:style style:name="T1" style:family="text">
      <style:text-properties officeooo:rsid="000f16dd"/>
    </style:style>
    <style:style style:name="T2" style:family="text">
      <style:text-properties officeooo:rsid="0010e827"/>
    </style:style>
    <style:style style:name="T3" style:family="text">
      <style:text-properties officeooo:rsid="0012eb02"/>
    </style:style>
    <style:style style:name="T4" style:family="text">
      <style:text-properties officeooo:rsid="00130fc2"/>
    </style:style>
    <style:style style:name="T5" style:family="text">
      <style:text-properties officeooo:rsid="001464e7"/>
    </style:style>
    <style:style style:name="T6" style:family="text">
      <style:text-properties officeooo:rsid="00191726"/>
    </style:style>
    <style:style style:name="T7" style:family="text">
      <style:text-properties officeooo:rsid="001c84dc"/>
    </style:style>
    <style:style style:name="T8" style:family="text">
      <style:text-properties officeooo:rsid="0006d98f"/>
    </style:style>
    <style:style style:name="T9" style:family="text">
      <style:text-properties officeooo:rsid="000827df"/>
    </style:style>
    <style:style style:name="T10" style:family="text">
      <style:text-properties officeooo:rsid="001fb154"/>
    </style:style>
    <style:style style:name="T11" style:family="text">
      <style:text-properties officeooo:rsid="00091703"/>
    </style:style>
    <style:style style:name="T12" style:family="text">
      <style:text-properties officeooo:rsid="001e8141"/>
    </style:style>
    <style:style style:name="T13" style:family="text">
      <style:text-properties officeooo:rsid="001513dc"/>
    </style:style>
    <style:style style:name="T14" style:family="text">
      <style:text-properties officeooo:rsid="0017251f"/>
    </style:style>
    <style:style style:name="T15" style:family="text">
      <style:text-properties officeooo:rsid="000e537e"/>
    </style:style>
    <style:style style:name="T16" style:family="text">
      <style:text-properties officeooo:rsid="000ff2d7"/>
    </style:style>
    <style:style style:name="T17" style:family="text">
      <style:text-properties officeooo:rsid="0012c4f6"/>
    </style:style>
    <style:style style:name="T18" style:family="text">
      <style:text-properties officeooo:rsid="001f74a4"/>
    </style:style>
    <style:style style:name="T19" style:family="text">
      <style:text-properties officeooo:rsid="0020833f"/>
    </style:style>
    <style:style style:name="T20" style:family="text">
      <style:text-properties officeooo:rsid="00236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&gt;X_PDDEXK_nuclease_N_terminal_RgraBWI</text:p>
      <text:p text:style-name="P3">AGAAGCAGCATATCATGGATTTAGTTATGGATTTTTTGTTTTAAACTACAAGTATAAATATGCACTTGATTGTTATGTTGAAAGAAGATCAGGTAAGGGCTATATGGATTTAATATTGCTATCGCGTATTGATAATAACTCTCCTATTCCAATAATTGTTGAGTTGAAGGCTGAACAATTTAGTGCAGATAGTGCAATAGAGCAAATACATAATCATGGTTATATATATAAATTGCCGAGTGTAAGAACTAGTGCTAGAAATGCTGTGATAGTAGGAGTGAATTATAAT</text:p>
      <text:p text:style-name="P3"/>
      <text:p text:style-name="P4">&gt;XI_PDDEXK_nuclease_<text:span text:style-name="T1">N</text:span>_terminal_REPsaPante1_00254</text:p>
      <text:p text:style-name="P4">AGAGTATGAATATCATGGATTATTAACTGGATTTTTTGTTATGCTATTTAAGTATAGCCATAATCTTAAATGTTATACTGAATTATCTTTAGGTGAAGGTTTTGCTGATGTCGTTATCTTAGTACGCGGATCTGAACGGTCACTGAATACTATCCCTGTGATTGTCGAACTTAAAAAGGGAAGAACAAGTGATATTTCTCAAAATGATAAGGAGCAAGCTAAAAAATATGCTGATGCATTTTGGTATGGATCGCAGAGAATGATTACAAACAGTGAAGATATTGTTTATTCGGTATTCAATTGTGAT</text:p>
      <text:p text:style-name="P4"/>
      <text:p text:style-name="P5">&gt;VII_PDDEXK_nuclease_N_terminal_REOxoOopac6_00992_993</text:p>
      <text:p text:style-name="P4">TGCTATTACAACAGTGTTGTTTGTACCATCTAGTCAGAAAGACTCTGTTATTCTATTAAATATTATAGAAACTAATAGAGATGTGCAGCTAAAAAAGATTCCATTAAATCAAGCATTGATAGGTGATAGGAAAATTATTCAACTGGATTTACATTTTAGAATAGATAAAAAGCAATTTGAAGAATATTGTAATATAAAAACAATTGATCTTTATCCTTCTCTAAAATCATATAATGATGCTTATAATGAAGAATCTAAGGGAGATTTTACAAAAATTACTTACCCTGATAAGCTAAAAGAAAAGTTC</text:p>
      <text:p text:style-name="P4"/>
      <text:p text:style-name="P4"/>
      <text:p text:style-name="P6">&gt;V_PDDEXK_nuclease_N_terminal_REIarboMS4_00021</text:p>
      <text:p text:style-name="P4">AATAGAATATATCATAAAAGATTACCGAATATTCAAGGAGCATTAGAAGCAGCTGATCATGGATTTACAGCTGGTGCTTTAATAAACTTTAAATATCGCTATAATTTAGAGTTATATTTAGAACTATTATTAGGAATAGAAGGATATATTGATATAGCTTTATTAGTGCGTGGGAGTCAGCGTGTTAAGAAGGCTATGCCAATTCTTATGGAAATAAAAACTGGACAGGAACAAGGTGGTAGGACAAATCCTCAGCAGGCATTAAGAGAAGCTGAAAGCTATACGCAAGGTTTACAGCAGAATAATAGACCTTTTGTAACCCTTGCTGATCGAGTAGTGCGTGTTGGTTTTAATATGGAT</text:p>
      <text:p text:style-name="P4"/>
      <text:p text:style-name="P7">&gt;IX_PDDEXK_nuclease_<text:span text:style-name="T2">N</text:span>_terminal_wBor_00002</text:p>
      <text:p text:style-name="P4"><text:span text:style-name="T3">A</text:span>GAAGCGGCACAGCACGGCTTTGCTTGTGGTGTCCTAATGTTATGTTGTAAAAGATATATACTTGATTATTACATTGAGCCTACAGCTGGTCGAGGATATGCGGATTTAATACTGTTTCTACGTAAAAAAGATTCTGAGGCGATTTCAGTGATTGCTGAGTTCAAATCGAGAGATATAAGTCCCGATGGGGCCAGAAAGCAAGTAGAAGACAAGGGCTATTTTTATCATCCTGCCATTTTAAGATCTGAGAAGCAAAATGTCATAGTAGCATGTATAAGCTTT</text:p>
      <text:p text:style-name="P4"/>
      <text:p text:style-name="P8">&gt;VIII_PDDEXK_nuclease_<text:span text:style-name="T4">N</text:span>_terminal_wCer_00459</text:p>
      <text:p text:style-name="P4"><text:span text:style-name="T4">A</text:span>GAAGCAGCCCATCATGGATTTATAGCAGGAGCTTTGGTAAATTTCCGCTATAGATATAATCTCAGGGTTTACTTGGAGCAGTTTGCAGGAAGAGGTTATGCTGATATTGTTCTAGTGCCTCGTGGTAAGGATAGATCATTAAATGCTGTTCCAATTATTATTGAATTGAAAGCTGGAACAGGTCGTGGTACTA<text:soft-page-break/>CGCCAGAAAATGCTTTGGAGCAAGCAAAGGATTATGCAAAAGGCTTTCAGCCAAATACAATGCGTGTTTTAACCATTTCAGATAATGTGCTTTGTGTAGGGTTAAATTTGGAT</text:p>
      <text:p text:style-name="P4"/>
      <text:p text:style-name="P9">&gt;VI_PDDEXK_nuclease_<text:span text:style-name="T5">N</text:span>_terminal_wDacB188_00004</text:p>
      <text:p text:style-name="P9">TCGTGAAGCTGATCAACATGGCTTTTTAGCAGGAGTATTTGATAACTTTCGATATCGTCATAATGCCAAGATCTACCTGGAGCAATTTGCTGGTAGAGGTTATGCTGATATTGTTTTACTTGTTCGTGGGCCTAATCGTGCTATTGATTCAGTTCCAATTCTTATTGAACTCAAGGCTGGAACTGAAGGACAAGTTGATCCAAGTGATGCATTGAAGCAAGCTGAAGGTTATGTTAAAGGCTTTAGGCCAAATAAGATGAGGGTTTTAACCAATGCAGGTAATGTTATTGCTGTTGGGTTAAATTTAGAT</text:p>
      <text:p text:style-name="P9"/>
      <text:p text:style-name="P10">&gt;III_PDDEXK_nuclease_N_terminal_SpiroDCF100_00002</text:p>
      <text:p text:style-name="P10">TGAGTCTGACGATCATGGTTTTTTATCCGGATTTTTATTAAATTTTAGGTACCGTGCTATGGCTGATATCTACCTAGAATTACTCATAGGAAGAGGGTATGCAGATATTAGTTTGCTTGTACGTGGTCAGGAAAAATTAAATAATTCAGTTCCCATTATAATTGAGCTCAAAGCGGGTCAAGAACACGCTGGACAAGCGTTAGAACAAGCTAGGGGTTATGTTAGAAATTGTCCCATTTCATCTGTATCCATTCATACCTCATCAAGAAATGCTGTTTGTGTAGGGCTAAACTTTAAC</text:p>
      <text:p text:style-name="P10"/>
      <text:p text:style-name="P11">&gt;II_PDDEXK_nuclease_<text:span text:style-name="T6">N</text:span>_terminal_wRi_00741</text:p>
      <text:p text:style-name="P11">AGAGTCTGACTATCATGGTTTTGTTTCCGGTGTTTTGATGCATTTTAGATATCGCAATGTAGCCAATATTTACCTTGAGCTGTTTGTAGGTGGTGGATATGCAGATATTACTTCTATTGTACGTGGTACACAGAGGTTAATTAATTCTGTTCCCTGTGTAACTGAACTTAAGGCAGGCAGAAGAGCAGATAGGAATGCTGGCCGTGCATTAGAGCAGGCTGGAAATTATGTTAATGGATGTCCCGTTTCATCCATATCTATTCCAACATTATCACCAAGAGCTGTCTCCGCTGGAGTGAATTTCGAT</text:p>
      <text:p text:style-name="P11"/>
      <text:p text:style-name="P12">&gt;I_PDDEXK_nuclease_N_terminal_wPipPel_00311</text:p>
      <text:p text:style-name="P12"><text:span text:style-name="T7">G</text:span>TTTGAGAGTCATGGGTTTTTATTAGGTTTCTTAGCAAATTTTAGTCATCGCTACACAATAGGCGTCGATCTTGACTTATCTCCTAGAAACTCACATGTTGCATTTCTTGTACGTCATCAAGTAGAAAGAGAAAATATTCCTATTGTTATTAATCTTGCTACAAGGGCACCGCCCTATATCGCATTAAACCGCGCCAGAAGTCACGCTGAAAGATTGCATGTTTTTTCATTTATACCTATCCATACTGAATCAAGAAATACTGTCTGTGTTGGATTAAATTTTAAT</text:p>
      <text:p text:style-name="P12"/>
      <text:p text:style-name="P13">&gt;IV_PDDEXK_nuclease_N_terminal_wPipPel_00323</text:p>
      <text:p text:style-name="P12">AGAATCAAGTCATCATGGGTTTTTAGCTGGGTTTTTGATAAATTTTAAGTATCGTTTTCACCTAAAACTTTATCTCGAATTATTTGCTGGAAAAGGTTACGCAGACATTATTTTGCTTGTGCGCGGTTCTGATAAGTCGCTAAGCTCTATTCCTATTATTATTGAGCTTAAAGCAGGTACTGGTGAGATAAGTACAGTGATAAAAGCATTGAAGCAAGCACAAGATTATGTTAAGGGCTCTTTTTCTAACTCTATAAGAATGATTACTATAGCTAATGAAGCTATTTGTGTAGGATTAAATTTTGAC</text:p>
      <text:p text:style-name="P12"/>
      <text:p text:style-name="P14">&gt;<text:span text:style-name="T8">X_</text:span>PDDEXK_nuclease_N_terminal_wCon_00690</text:p>
      <text:p text:style-name="P14">AGCAGCGTATCATGGGTTTCACTACGGAGCTTTAGCATTAAATTTTAAATATCGCTATGATCTTAACTGTTACGTTGAGCGTACTGCAGGTAACGGACGTGCAGATCTAATATTTATATCACGTACAAAGGATGCAAATGGTAGGATGAATTCAAAACCTACTCCAGTAGTTGTTGAATTTAAATCAGGGGATCA<text:soft-page-break/>TGCTGTTGATGAAGCCATAGCACAGATCGAGAACAAAGGTTATTTGTATAACCTAAACGTTAGAACTAAAGCAGAAGAAGCGGTTATAGTGGGGGTGAGTCGTGCTAAAGTAAAGACAGAACAAGCT</text:p>
      <text:p text:style-name="P14"/>
      <text:p text:style-name="P15">&gt;<text:span text:style-name="T9">X_</text:span>PDDEXK_nuclease_N_terminal_OtsuBor_01821</text:p>
      <text:p text:style-name="P15"><text:span text:style-name="T10">A</text:span>TCACGTTATCATGGGTTTGTTTATGGAGCATTAGTATTAAACTTCAAACAAAAATATTCGATGGATGTATATGTTGAACAAAGTGCAGGCAGAGGATATCTAGATTTGTATTTGCTATGTAAACATTATAATCATAATCAGATAGCTAATGCTGATGCTGTTAAAATAATAGCTGAATTTAAAAATGGGAATAATAAATACCCTTCTGTTGCAGATGCAATAAAACAGGTAGAAGATAGGTGTTATGCACAACTTGTTGGTAGAACTCAATCGAATAAGACTATAATAGTAGGAGCTGATTTTGGGGATATAACTAAGCAAGTACAG</text:p>
      <text:p text:style-name="P15"/>
      <text:p text:style-name="P16">&gt;<text:span text:style-name="T11">X_</text:span>PDDEXK_nuclease_N_terminal_REMetSeq_00512</text:p>
      <text:p text:style-name="P16">GGAATTAGCTTATCATGGTTTTATATATGGAGTGCTAGCATTAAACTATAAAAATAAATATGCAATAGATACTTATGTTGAACAGAGTGCCGGCAGGGGGTTTCTAGATTTATATTTTTTATTACGTAAAGATGCACATGGTAATAATATCTCAAATGCTGTTAAAATAATTACTGAGGTTAAAGGAGACGCGAGTAATATTATGTCTGTTACATATGGAATGGATCAAGCAACATTGAAGAGTTATGCAGCTGTACTAGGAAGAAATGATGGATCTTATATAATAGTAAGTACTGATTTTGGTAATATAGCAACAAAATTACAAGTAACGAAACAA</text:p>
      <text:p text:style-name="P17">&gt;I_PDDEXK_nuclease_<text:span text:style-name="T7">C</text:span>_terminal_wPipPel_00311</text:p>
      <text:p text:style-name="P17"><text:span text:style-name="T12">T</text:span>GAGGATAAGTTCCGTTCTATACTACATGGTACATTTTATGCTAGTGATAATCCTTATAAAGTGCTTGCTATGTATAAAGTTGGTCAAACATATAGTTTAAAAAGGGGGCAGGAAGAAGAAGGAGAAAGGGTAATACTCACAAGAATTACAGAACAGAGATTAGATCTTTTATTATTAAGACAACCTAGAGAGAATGACCTAGATACTCACCCAATTGGATATGTGTTAAGACTTGCTAATAATGCAGAAGAAGTAGGACAACAGCAAAATGATGCGAGACAAGAAATCGGAAGACTTAAGAAACAACACAGAGGATTTATACCTATTACTTCTGGAAATGAGGTGGTTTTGTTTCCTATTGTGTTTAAT</text:p>
      <text:p text:style-name="P17"/>
      <text:p text:style-name="P17">&gt;II_PDDEXK_nuclease_C_terminal_wRi_00741</text:p>
      <text:p text:style-name="P17">AGAAGCTGGGTTTCATGCTGCATTGCATGGATTATTTTACACTTGCGATAATCCTGCTAGGGTAGTTAGTGAATTTCAGGTTGGAGGAGGAGGAAAGTTAGACTTAGTATTGTCACGAGCTATAGGAAGGATGGGAGGTACTTATCCGATTGGAACAGAGCTAAAGTTTGCTGCCACTGAAGCAGACGTACAAAATAGAGAAGAAGAAGCAGATGAACAGGTGGAGGGTTATCTGCAGAGTAGAGGGTTTGATCGCATTACTGATGGAGATAAAATGGTTTTCTCGTATGCCGTATTTAAT</text:p>
      <text:p text:style-name="P17"/>
      <text:p text:style-name="P17">&gt;III_PDDEXK_nuclease_<text:span text:style-name="T13">C</text:span>_terminal_SpiroDCF100_00002</text:p>
      <text:p text:style-name="P17"><text:span text:style-name="T14">T</text:span>GAAGCTGAATTTCAAGCTGTATTACATGGGTTATTTTATACTCTTGGCAATCCTGCTAGAGTAGTTATTGAGTTTCAATTAGAAAGAGGTGGAAGAATAGATCTAGTGTTGTCAAGATTTGTGGAAAGAGATGATACTCATCCAATTGGGATAGAGCTAAAATTTGCTAGAACTGCAGGGCAGGTACGACAAAGAAGTGCAGAAGCGAATCGACAATTACAACGATATACACAATGTGGGGGATGCGAACGTATTACTGATGGAGATCAAATGGTTTTATCATATGCTGTATTCAAT</text:p>
      <text:p text:style-name="P2"/>
      <text:p text:style-name="P2">&gt;X_PDDEXK_nuclease_<text:span text:style-name="T15">C</text:span>_terminal_RgraBWI</text:p>
      <text:p text:style-name="P2">TGAGAAAGATTTTCAATCGGTAGTGCAAGGTTTATTTATGGGACAAATTTTTAACCAATGTAAAGTTAACACATTTGCGGAAGCAACAAGTGGTACAGGAAGAGTCGATATTGTTTTAAAATTTATCAATAAAAATAATGAAGAACATGGAACACCAATAATTATCGAATTAAAATATCAGCAATTTAGTAATGCATTGTTAGAGCATGTTCAAGTGCAATTGGAGCAATATAGAGATACTTTGAAAGCTATGACAGATCAGGAAAAGGTGATTTTAGTATCCATGATTTTTAAT</text:p>
      <text:p text:style-name="P2"/>
      <text:p text:style-name="P4"><text:soft-page-break/>&gt;XI_PDDEXK_nuclease_C_terminal_REPsaPante1_00254</text:p>
      <text:p text:style-name="P4">TGAAGATGATTTTCAAGCTGTAGTACAAGGGGTATTTTCACACTATAGTGATGCTCAATTTCAAGGTGGTGAGCGTATCAGTGTTGTTCCAGAAATGCAATCTGGTGGAGGGTATCGTGTTGATATAGGATTAGTTGAGAAAAAAGTGTTTGTAGGAATAGAGCTTAAGTGGGATGATACCAAAGGTGTTCCCCAAACTAATAAACATCAAGTAAGTGGTACAGAAATAACAGCAAAAGCTAACGATGCTGAAAAGCAATTAGCTCGTTACAAAGAACAACCAAATAATATTAAATCCTTAACAGATGGTGATAAAGCCGCTATGCTTTGGGCAGTATTCCAT</text:p>
      <text:p text:style-name="P4"/>
      <text:p text:style-name="P5">&gt;VII_PDDEXK_nuclease_<text:span text:style-name="T16">C</text:span>_terminal_REOxoOopac6_00992_993</text:p>
      <text:p text:style-name="P6"><text:span text:style-name="T16">A</text:span>GCTAAAGAAAGAATTGCAGCAGGTGATAACAATATTAATATTATTGGTGAGTACAAGTATTTATTGAATAATGTTATTCAAGATGGAGGATATAATAGTTATATTCAAAATGAGCGCATTAAAGATTTATCACATGATTTTTCAAAGAGTGATGCTCCAAAAATCAATCCTAAATTAAAGCAAGGGCTATTAAATGCTGCAGGTAAAGTTCAATTAATAAGAGGAATATATAGTACTATTGCTACTTGTCAAGATGGAAGTGAAGGATATTGTGCATTAAGTGTGACTGGGTTGAGTTATTCTTTTCTATCACAACCAATTGAGCATATAATGGTAAAGATTACACCTAAAATTGTCAATACAGCTGCAAATACTGCTGGTAAGTTTGTACCACGTGTTTTAGGTTATAATACAAAGTTCGTT</text:p>
      <text:p text:style-name="P6"/>
      <text:p text:style-name="P6">&gt;V_PDDEXK_nuclease_C_terminal_REIarboMS4_00030</text:p>
      <text:p text:style-name="P6"><text:span text:style-name="T16">T</text:span>GAAGCGTATTTTGCAGCAGTTTTATCTGGATTGCTTAACAGTTACAGTGATATTGAATTTGATCAAGGGGACTTTAAAATTAACGTAAGACCTGAATTTCAAGTAGGGGGTGGTAAGAGAATTGATTTATTCATCAATGTGATGAGCAAGAACCCTGCTGATAGTGATGTATTAATTGGTTTGGAATTAAAATATGGTGATGGTAGAGCTACTGTAGATAGTATGGATAGGGCACTTGAAAAAGCTGAAAAAGTGCAACTAAGAAGATATGGGATAAGTCGTAATATAAGAGCGATAACTGAAGGAGCTAATTTTTTTGTAACGTTA</text:p>
      <text:p text:style-name="P6"/>
      <text:p text:style-name="P7">&gt;IX_PDDEXK_nuclease_<text:span text:style-name="T2">C</text:span>_terminal_wBor_00002</text:p>
      <text:p text:style-name="P7"><text:span text:style-name="T17">T</text:span>GAAGCTACCTTTAAAGCGTTAATTCAAGGTCTATTTATTACAAATAAGAGTAACTATCTGGTTTCATCAGAAAGTAATATACTAGGTGATCGGATAGATTTGATTATATATGATTTAGAAAAAAAGGTTGTAGTGGCTGCGTTTGAGCTAAAACATCATGGTAGCCTGAAAGAAGCTGCGAAGCAGCTGGAAGGATATCTTAATAATTCAGAACATGAAGACATTACCAGAATATGT</text:p>
      <text:p text:style-name="P7"/>
      <text:p text:style-name="P8">&gt;VIII_PDDEXK_nuclease_<text:span text:style-name="T4">C</text:span>_terminal_wCer_00459</text:p>
      <text:p text:style-name="P7">AGAGGCTCATTTTCAAGGAGTGTTACATGGGGCATTTAGTTATTATAGTGATTTAAAATTAAAAGAATCTCCTAGAGCATTAATATTAACGGAGTTTCAAACAGGGAGAGGAAAACGTATTGATATGGTTGTTCATGGCATCAGTACAGATAAGGATGGAAACGCGAAAGAATACGATCCAGTAGGGTTAGAACTTAAAGGACCCAGAGAAGGTAAGACAGCTAATGCATTAAAAGATGAGGCAAATAAACAAATAAGTGATGAGTATACAAAAGGTGTAACTTATAAAACACTTACAGATGGAAAGGAAGTGGCCTTTATGGGTGTTGTGTTTGAT</text:p>
      <text:p text:style-name="P7"/>
      <text:p text:style-name="P9">&gt;VI_PDDEXK_nuclease_C_terminal_wDacB188_00004</text:p>
      <text:p text:style-name="P9"><text:span text:style-name="T5">T</text:span>GAAGCAAGATTACAAGCTGTTCTTAATGGTTTATTTAGTAGTTACAGTGATTTAAAGCTACAGGAGACTTCTGCGAAGACTGTAATTATATCTGAATTTCAAGTAGGAGCAGGTGGTCGTGTAGATGTG<text:soft-page-break/>GTAATTCAAGCTATTGGTCCTTCGCCTCAGGGTACTAAGGAATTTACTCCTATGGCGCTGGAATTTAAGCTTATAAATAAGAACTTAAATCAAGATCAGCAAAAACAGGAAGTTGATAAATTAACAAAAGAACAAAATATTAGATATGCTAAAGGTGCGGCACTGAAAACGATTACAGATAGTGACAAAATGTTTTTCATGGGTGTAGTTGTTAATGTA</text:p>
      <text:p text:style-name="P12"/>
      <text:p text:style-name="P13">&gt;IV_PDDEXK_nuclease_<text:span text:style-name="T12">C</text:span>_terminal_wPipPel_00323</text:p>
      <text:p text:style-name="P13">TGAGGCTACATTTCAAGCTGTATTGCATGGTTTATTTAGTAGCTACGGAGAAGATAATATAAAAGTTATTACTGAATTTCAAATAGGTGGTGGAGAGAAGTTGGATGTTATGTTGGTTATAAATGCTACTGATCAAAAAAAAGAATACCCCCCAGTTGGAATAGAGCTAAAATTTGCTAAGAAAGGAGAATTGGATAAAAAAGAAAAAGATGCTAAGGACCAGTTGAAAAGATATAAAGAAGGTGAAGCGTATAAGGTAATTACTGATGCTGGCAAAGTGAAACTGATATATGCTGTTTTTAAT</text:p>
      <text:p text:style-name="P13"/>
      <text:p text:style-name="P18">&gt;<text:span text:style-name="T8">X_</text:span>PDDEXK_nuclease_<text:span text:style-name="T18">C</text:span>_terminal_wCon_00690</text:p>
      <text:p text:style-name="P13"><text:span text:style-name="T18">A</text:span>GAAATAGACTTTCAAGCAATAATACAAGGCTTATTTATAAATGGAGAAACTGAAGATGGTAAAGAGATTAGAGTGTATATGGAGTCTAATGCACCTGCACAAGGAAGAATGGACCTAGCGTTATCTTTTACACAACTATCAAAAAATGTTTGCTCTTTCATAGAAGATGATCCAATTATCATAGAATTAAAGTATGCTACTAGCACATCTAATGCAGATAAGGAACTAAAGAAAGCAGAAAAACAGATGGGTGAGAAATATACAATTCTCAGGTCTTTCACTAATAAAAAGACAGCTAAGCATGTAGCTATGGTTTTCAAT</text:p>
      <text:p text:style-name="P19"/>
      <text:p text:style-name="P19">&gt;<text:span text:style-name="T9">X_</text:span>PDDEXK_nuclease_<text:span text:style-name="T19">C</text:span>_terminal_OtsuBor_01821</text:p>
      <text:p text:style-name="P19"><text:span text:style-name="T19">G</text:span>GAACGCGACTTTCAGGCTATATTACATGGATTATTCTCATTCAAGAAATTTGAAAATACAACTTTAAGGGCAATATCAGAAGTAACATTTGGCACAGGCAAAGCAGATTTAGTGTTGGCATCTAACCGTAGTATACTTTATTTTGAGTTAGCCTTATTAAAGGAACATAATGTGGATACTTTGCTAAATAAAAAAAAACAGCAACTGGATAAATACCTGGTAAATGCTAAAGTTATTACTAATGATAAGAATGCTAACGGAGTAGTACTAATTTTTGAT</text:p>
      <text:p text:style-name="P19"/>
      <text:p text:style-name="P20">&gt;<text:span text:style-name="T11">X_</text:span>PDDEXK_nuclease_<text:span text:style-name="T20">C</text:span>_terminal_REMetSeq_00512</text:p>
      <text:p text:style-name="P20"><text:span text:style-name="T20">T</text:span>GAAGCAAATTTTAAATCTGTATTACATGGTATATTTTTGCATAAAAAATATCATGAAGAAAGTATACTAGTGGTTCCAGAATTAAGTGTAGGTCATGGCAGAGCAGATTTAGTATTAGTATTAGCAAGTGAGTCAGAACTTGCCTTAGAATTAGGACTTGGTGATGAGAGAAATGTTCCAGCTAAACAGCAACAATTAGAAAAATATATAGCATATCTTAAAACTATTACTGATGCAAAGGAAGCTAAGGGGGTTTCATTAATTTTTAATCAAAAGGCAACTGCAGCAAA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6:09:31.516510800</meta:creation-date>
    <dc:date>2026-02-11T10:58:09.532666900</dc:date>
    <meta:editing-duration>PT7H33M38S</meta:editing-duration>
    <meta:editing-cycles>25</meta:editing-cycles>
    <meta:generator>LibreOffice/25.8.4.2$Windows_X86_64 LibreOffice_project/290daaa01b999472f0c7a3890eb6a550fd74c6df</meta:generator>
    <meta:document-statistic meta:table-count="0" meta:image-count="0" meta:object-count="0" meta:page-count="5" meta:paragraph-count="56" meta:word-count="56" meta:character-count="10061" meta:non-whitespace-character-count="10061"/>
  </office:meta>
</office:document-meta>
</file>