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style:font-name="Arial1"/>
    </style:style>
    <style:style style:name="P5" style:family="paragraph" style:parent-style-name="Text_20_body">
      <style:text-properties style:font-name="Arial1" fo:font-size="11pt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Standard">
      <style:text-properties style:font-name="Arial1" fo:font-size="11pt" style:font-size-asian="11pt" style:font-size-complex="11pt"/>
    </style:style>
    <style:style style:name="P8" style:family="paragraph" style:parent-style-name="Standard">
      <style:text-properties style:font-name="Arial1" fo:font-size="11pt" fo:background-color="#ff6d6d" style:font-size-asian="11pt" style:font-size-complex="11pt"/>
    </style:style>
    <style:style style:name="P9" style:family="paragraph" style:parent-style-name="Standard">
      <style:text-properties style:font-name="Arial1" fo:font-size="11pt" officeooo:paragraph-rsid="0006d98f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officeooo:paragraph-rsid="0006d98f"/>
    </style:style>
    <style:style style:name="P12" style:family="paragraph" style:parent-style-name="Text_20_body">
      <style:text-properties style:font-name="Arial1" fo:font-size="11pt" officeooo:paragraph-rsid="0006d98f" style:font-size-asian="11pt" style:font-size-complex="11pt"/>
    </style:style>
    <style:style style:name="T1" style:family="text">
      <style:text-properties style:font-name="Arial1"/>
    </style:style>
    <style:style style:name="T2" style:family="text">
      <style:text-properties style:font-size-asian="11pt" style:font-size-complex="11pt"/>
    </style:style>
    <style:style style:name="T3" style:family="text">
      <style:text-properties officeooo:rsid="000c7935"/>
    </style:style>
    <style:style style:name="T4" style:family="text">
      <style:text-properties officeooo:rsid="0006d98f"/>
    </style:style>
    <style:style style:name="T5" style:family="text">
      <style:text-properties officeooo:rsid="000827df"/>
    </style:style>
    <style:style style:name="T6" style:family="text">
      <style:text-properties officeooo:rsid="00091703"/>
    </style:style>
    <style:style style:name="T7" style:family="text">
      <style:text-properties style:font-name="Arial1" fo:font-size="11pt" fo:background-color="#ffd8ce" loext:char-shading-value="0" style:font-size-asian="11pt" style:font-size-complex="11pt"/>
    </style:style>
    <style:style style:name="T8" style:family="text">
      <style:text-properties style:font-name="Arial1" fo:font-size="11pt" officeooo:rsid="000ded54" fo:background-color="#ffd8ce" loext:char-shading-value="0" style:font-size-asian="11pt" style:font-size-complex="11pt"/>
    </style:style>
    <style:style style:name="T9" style:family="text">
      <style:text-properties officeooo:rsid="000625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&gt;I_PDDEXK_nuclease_N_terminal_wPipPel_00311</text:p>
      <text:p text:style-name="P2">KFESHGFLLGFLANFSHRYTIGVDLDLSPRNSHVAFLVRHQVERENIPIVINLATRAPPYIALNRARSHAERLHVFSFIPIHTESRNTVCVGLNFN</text:p>
      <text:p text:style-name="Text_20_body"/>
      <text:p text:style-name="P2">&gt;II_PDDEXK_nuclease_N_terminal_wRi_00741</text:p>
      <text:p text:style-name="P2">RESDYHGFVSGVLMHFRYRNVANIYLELFVGGGYADITSIVRGTQRLINSVPCVTELKAGRRADRNAGRALEQAGNYVNGCPVSSISIPTLSPRAVSAGVNFD</text:p>
      <text:p text:style-name="Text_20_body"/>
      <text:p text:style-name="P2">&gt;III_PDDEXK_nuclease_N_terminal_SpiroDCF100_00002</text:p>
      <text:p text:style-name="P2">NESDDHGFLSGFLLNFRYRAMADIYLELLIGRGYADISLLVRGQEKLNNSVPIIIELKAGQEHAGQALEQARGYVRNCPISSVSIHTSSRNAVCVGLNFN</text:p>
      <text:p text:style-name="Text_20_body"/>
      <text:p text:style-name="P2">&gt;IV_PDDEXK_nuclease_N_terminal_wPipPel_00323</text:p>
      <text:p text:style-name="P2">KESSHHGFLAGFLINFKYRFHLKLYLELFAGKGYADIILLVRGSDKSLSSIPIIIELKAGTGEISTVIKALKQAQDYVKGSFSNSIRMITIANEAICVGLNFD</text:p>
      <text:p text:style-name="Text_20_body"/>
      <text:p text:style-name="P2">&gt;V_PDDEXK_nuclease_N_terminal_REIarboMS4_00021</text:p>
      <text:p text:style-name="P2">LEAADHGFTAGALINFKYRYNLELYLELLLGIEGYIDIALLVRGSQRVKKAMPILMEIKTGQEQGGRTNPQQALREAESYTQGLQQNNRPFVTLADRVVRVGFNMD</text:p>
      <text:p text:style-name="Text_20_body"/>
      <text:p text:style-name="P2">&gt;VI_PDDEXK_nuclease_N_terminal_wDacB188_00004</text:p>
      <text:p text:style-name="P2">READQHGFLAGVFDNFRYRHNAKIYLEQFAGRGYADIVLLVRGPNRAIDSVPILIELKAGTEGQVDPSDALKQAEGYVKGFRPNKMRVLTNAGNVIAVGLNLD</text:p>
      <text:p text:style-name="Text_20_body"/>
      <text:p text:style-name="P2">&gt;VII_PDDEXK_nuclease_N_terminal_REOxoOopac6_00992_993</text:p>
      <text:p text:style-name="P2">READHHGFVAGVFDNFRYRENTRIYLEQFAGRGYADIILLVRGPDRATNSIPIIIELKAGITGQIGSSDALKQAKDYTKGFQPNTMRILTIPDNILCVGMNLD</text:p>
      <text:p text:style-name="Text_20_body"/>
      <text:p text:style-name="P2">&gt;VIII_PDDEXK_nuclease_N_terminal_wCer_00459</text:p>
      <text:p text:style-name="P2">REAAHHGFIAGALVNFRYRYNLRVYLEQFAGRGYADIVLVPRGKDRSLNAVPIIIELKAGTGRGTTPENALEQAKDYAKGFQPNTMRVLTISDNVLCVGLNLD</text:p>
      <text:p text:style-name="Text_20_body"/>
      <text:p text:style-name="P2">&gt;IX_<text:span text:style-name="T1">PDDEXK_nuclease_N_terminal_wBor_00002</text:span></text:p>
      <text:p text:style-name="P3">TEAAQHGFACGVLMLCCKRYILDYYIEPTAGRGYADLILFLRKKDSEAISVIAEFKSRDISPDGARKQVEDKGYFYHPAILRSEKQNVIVACISF</text:p>
      <text:p text:style-name="P4"/>
      <text:p text:style-name="P3">&gt;X_PDDEXK_nuclease_N_terminal_RgraBWI</text:p>
      <text:p text:style-name="P3"><text:soft-page-break/>S<text:span text:style-name="T2">EAAYHGFSYGFFVLNYKYKYALDCYVERRSGKGYMDLILLSRIDNNSPIPIIVELKAEQFSADSAIEQIHNHGYIYKLPSVRTSARNAVIVGVNYN</text:span></text:p>
      <text:p text:style-name="P5"/>
      <text:p text:style-name="P6">&gt;XI_PDDEXK_nuclease_N_terminal_REPsaPante1_00254</text:p>
      <text:p text:style-name="P6">KEYEYHGLLTGFFVMLFKYSHNLKCYTELSLGEGFADVVILVRGSERSLNTIPVIVELKKGRTSDISQNDKEQAKKYADAFWYGSQRMITNSEDIVYSVFNCD</text:p>
      <text:p text:style-name="P7"/>
      <text:p text:style-name="P8">&gt;<text:span text:style-name="T3">I</text:span><text:span text:style-name="T4">X_</text:span>PDDEXK_nuclease_N_terminal_wCon_00690</text:p>
      <text:p text:style-name="P9">EAAYHGFHYGALALNFKYRYDLNCYVERTAGNGRADLIFISRTKDANGRMNSKPTPVVVEFKSGDHAVDEAIAQIENKGYLYNLNVRTKAEEAVIVGVSRAKVKTEQA</text:p>
      <text:p text:style-name="P9"/>
      <text:p text:style-name="P9">&gt;<text:span text:style-name="T5">X_</text:span>PDDEXK_nuclease_N_terminal_OtsuBor_01821</text:p>
      <text:p text:style-name="P9">ESRYHGFVYGALVLNFKQKYSMDVYVEQSAGRGYLDLYLLCKHYNHNQIANADAVKIIAEFKNGNNKYPSVADAIKQVEDRCYAQLVGRTQSNKTIIVGADFGDITKQVQ</text:p>
      <text:p text:style-name="P9"/>
      <text:p text:style-name="P9">&gt;<text:span text:style-name="T6">X_</text:span>PDDEXK_nuclease_N_terminal_REMetSeq_00512</text:p>
      <text:p text:style-name="P9">SELAYHGFIYGVLALNYKNKYAIDTYVEQSAGRGFLDLYFLLRKDAHGNNISNAVKIITEVKGDASNIMSVTYGMDQATLKSYAAVLGRNDGSYIIVSTDFGNIATKLQVTKQ</text:p>
      <text:p text:style-name="P10">&gt;I_PDDEXK_nuclease_C_terminal_wPipPel_00311</text:p>
      <text:p text:style-name="P2">SEDKFRSILHGTFYASDNPYKVLAMYKVGQTYSLKRGQEEEGERVILTRITEQRLDLLLLRQPRENDLDTHPIGYVLRLANNAEEVGQQQNDARQEIGRLKKQHRGFIPITSGNEVVLFPIVFN</text:p>
      <text:p text:style-name="Text_20_body"/>
      <text:p text:style-name="P2">&gt;II_PDDEXK_nuclease_C_terminal_wRi_00741</text:p>
      <text:p text:style-name="P2">REAGFHAALHGLFYTCDNPARVVSEFQVGGGGKLDLVLSRAIGRMGGTYPIGTELKFAATEADVQNREEEADEQVEGYLQSRGFDRITDGDKMVFSYAVFN</text:p>
      <text:p text:style-name="Text_20_body"/>
      <text:p text:style-name="P2">&gt;III_PDDEXK_nuclease_C_terminal_SpiroDCF100_00002</text:p>
      <text:p text:style-name="P2">SEAEFQAVLHGLFYTLGNPARVVIEFQLERGGRIDLVLSRFVERDDTHPIGIELKFARTAGQVRQRSAEANRQLQRYTQCGGCERITDGDQMVLSYAVFN</text:p>
      <text:p text:style-name="Text_20_body"/>
      <text:p text:style-name="P2">&gt;IV_PDDEXK_nuclease_C_terminal_wPipPel_00323</text:p>
      <text:p text:style-name="P2">NEATFQAVLHGLFSSYGEDNIKVITEFQIGGGEKLDVMLVINATDQKKEYPPVGIELKFAKKGELDKKEKDAKDQLKRYKEGEAYKVITDAGKVKLIYAVFN</text:p>
      <text:p text:style-name="Text_20_body"/>
      <text:p text:style-name="P2">&gt;V_PDDEXK_nuclease_C_terminal_REIarboMS4_00030</text:p>
      <text:p text:style-name="P2">SEAYFAAVLSGLLNSYSDIEFDQGDFKINVRPEFQVGGGKRIDLFINVMSKNPADSDVLIGLELKYGDGRATVDSMDRALEKAEKVQLRRYGISRNIRAITEGANFFVTL</text:p>
      <text:p text:style-name="Text_20_body"/>
      <text:p text:style-name="P2">&gt;VI_PDDEXK_nuclease_C_terminal_wDacB188_00004</text:p>
      <text:p text:style-name="P2">NEARLQAVLNGLFSSYSDLKLQETSAKTVIISEFQVGAGGRVDVVIQAIGPSPQGTKEFTPMALEFKLINKNLNQDQQKQEVDKLTKEQNIRYAKGAALKTITDSDKMFFMGVVVNV</text:p>
      <text:p text:style-name="Text_20_body"/>
      <text:p text:style-name="P2">&gt;VII_PDDEXK_nuclease_C_terminal_REOxoOopac6_00992_993</text:p>
      <text:p text:style-name="P2">KEAHFQAILHGAFSHYSDVKLAEEEKIRELVLTEFQTGGGGRIDMLIQGIGASVQGTKEYTPVGLELKYDDSIKLTHTQENNLLKITDIAEKIQKEQEFLNDKGKKVVKNLVDEQVNRYSQGAALKAITDSDKIVIMGAVFN</text:p>
      <text:p text:style-name="Text_20_body"/>
      <text:p text:style-name="P2">&gt;VIII_PDDEXK_nuclease_C_terminal_wCer_00459</text:p>
      <text:p text:style-name="P2">EEAHFQGVLHGAFSYYSDLKLKESPRALILTEFQTGRGKRIDMVVHGISTDKDGNAKEYDPVGLELKGPREGKTANALKDEANKQISDEYTKGVTYKTLTDGKEVAFMGVVFD</text:p>
      <text:p text:style-name="Text_20_body"/>
      <text:p text:style-name="P2">&gt;IX_PDDEXK_nuclease_C_terminal_wBor_00002</text:p>
      <text:p text:style-name="P2">NEATFKALIQGLFITNKSNYLVSSESNILGDRIDLIIYDLEKKVVVAAFELKHHGSLKEAAKQLEGYLNNSEHEDITRIC</text:p>
      <text:p text:style-name="Text_20_body"/>
      <text:p text:style-name="P2">&gt;X_PDDEXK_nuclease_C_terminal_RgraBWI</text:p>
      <text:p text:style-name="P2"><text:soft-page-break/>SEKDFQSVVQGLFMGQIFNQCKVNTFAEATSGTGRVDIVLKFINKNNEEHGTPIIIELKYQQFSNALLEHVQVQLEQYRDTLKAMTDQEKVILVSMIFN</text:p>
      <text:p text:style-name="Text_20_body"/>
      <text:p text:style-name="P2">&gt;XI_PDDEXK_nuclease_C_terminal_REPsaPante1_00254</text:p>
      <text:p text:style-name="P2">SEDDFQAVVQGVFSHYSDAQFQGGERISVVPEMQSGGGYRVDIGLVEKKVFVGIELKWDDTKGVPQTNKHQVSGTEITAKANDAEKQLARYKEQPNNIKSLTDGDKAAMLWAVFH</text:p>
      <text:p text:style-name="P11"><text:line-break/><text:span text:style-name="T7">&gt;</text:span><text:span text:style-name="T8">I</text:span><text:span text:style-name="T7">X_PDDEXK_nuclease_C_terminal_wCon_00690</text:span></text:p>
      <text:p text:style-name="P9">KEIDFQAIIQGLFINGETEDGKEIRVYMESNAPAQGRMDLALSFTQLSKNVCSFIEDDPIIIELKYATSTSNADKELKKAEKQMGEKYTILRSFTNKKTAKHVAMVFN</text:p>
      <text:p text:style-name="P9"/>
      <text:p text:style-name="P9">&gt;<text:span text:style-name="T9">X_</text:span>PDDEXK_nuclease_C_terminal_OtsuBor_01821</text:p>
      <text:p text:style-name="P9">EERDFQAILHGLFSFKKFENTTLRAISEVTFGTGKADLVLASNRSILYFELALLKEHNVDTLLNKKKQQLDKYLVNAKVITNDKNANGVVLIFD</text:p>
      <text:p text:style-name="P9"/>
      <text:p text:style-name="P9">&gt;<text:span text:style-name="T9">X_PDDEXK_nuclease_C_terminal_REMetSeq_00512</text:span></text:p>
      <text:p text:style-name="P9">TEANFKSVLHGIFLHKKYHEESILVVPELSVGHGRADLVLVLASESELALELGLGDERNVPAKQQQLEKYIAYLKTITDAKEAKGVSLIFNQKATAAK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3:47:59.150301800</meta:creation-date>
    <dc:date>2026-02-18T11:42:11.756754100</dc:date>
    <meta:editing-duration>PT6H56S</meta:editing-duration>
    <meta:editing-cycles>14</meta:editing-cycles>
    <meta:generator>LibreOffice/25.8.4.2$Windows_X86_64 LibreOffice_project/290daaa01b999472f0c7a3890eb6a550fd74c6df</meta:generator>
    <meta:document-statistic meta:table-count="0" meta:image-count="0" meta:object-count="0" meta:page-count="4" meta:paragraph-count="56" meta:word-count="56" meta:character-count="4181" meta:non-whitespace-character-count="4180"/>
  </office:meta>
</office:document-meta>
</file>