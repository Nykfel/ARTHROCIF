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0f94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0fe6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3e89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1239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206f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2377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1633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2207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1943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2512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280f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2979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zxx" fo:country="none" fo:font-weight="normal" officeooo:paragraph-rsid="002d03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zxx" fo:country="none" fo:font-weight="normal" officeooo:paragraph-rsid="003034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zxx" fo:country="none" fo:font-weight="normal" officeooo:paragraph-rsid="0030e7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zxx" fo:country="none" fo:font-weight="normal" officeooo:paragraph-rsid="0031ce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zxx" fo:country="none" fo:font-weight="normal" officeooo:paragraph-rsid="00398c7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urier New" fo:font-size="12pt" fo:letter-spacing="normal" fo:language="zxx" fo:country="none" fo:font-style="normal" fo:font-weight="bold" officeooo:paragraph-rsid="00398c7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zxx" fo:country="none" fo:font-weight="normal" officeooo:paragraph-rsid="003cce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8080" loext:opacity="100%" style:font-name="Arial1" fo:font-size="12pt" fo:language="zxx" fo:country="none" fo:font-weight="normal" officeooo:paragraph-rsid="00398c7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zxx" fo:country="none" fo:font-weight="normal" officeooo:paragraph-rsid="004083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officeooo:rsid="00100d90"/>
    </style:style>
    <style:style style:name="T3" style:family="text">
      <style:text-properties officeooo:rsid="003e89f8"/>
    </style:style>
    <style:style style:name="T4" style:family="text">
      <style:text-properties officeooo:rsid="00206fd8"/>
    </style:style>
    <style:style style:name="T5" style:family="text">
      <style:text-properties officeooo:rsid="00220750"/>
    </style:style>
    <style:style style:name="T6" style:family="text">
      <style:text-properties fo:font-weight="bold" officeooo:rsid="00220750" style:font-weight-asian="bold" style:font-weight-complex="bold"/>
    </style:style>
    <style:style style:name="T7" style:family="text">
      <style:text-properties officeooo:rsid="00237746"/>
    </style:style>
    <style:style style:name="T8" style:family="text">
      <style:text-properties officeooo:rsid="00152954"/>
    </style:style>
    <style:style style:name="T9" style:family="text">
      <style:text-properties officeooo:rsid="00163306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officeooo:rsid="0106d3cd" style:text-blinking="false" fo:background-color="transparent" loext:char-shading-value="0"/>
    </style:style>
    <style:style style:name="T11" style:family="text">
      <style:text-properties officeooo:rsid="0025125b"/>
    </style:style>
    <style:style style:name="T12" style:family="text">
      <style:text-properties officeooo:rsid="00280ffc"/>
    </style:style>
    <style:style style:name="T13" style:family="text">
      <style:text-properties officeooo:rsid="00297902"/>
    </style:style>
    <style:style style:name="T14" style:family="text">
      <style:text-properties officeooo:rsid="002b41c7"/>
    </style:style>
    <style:style style:name="T15" style:family="text">
      <style:text-properties officeooo:rsid="002d03f9"/>
    </style:style>
    <style:style style:name="T16" style:family="text">
      <style:text-properties officeooo:rsid="002e0bb5"/>
    </style:style>
    <style:style style:name="T17" style:family="text">
      <style:text-properties officeooo:rsid="002eeb43"/>
    </style:style>
    <style:style style:name="T18" style:family="text">
      <style:text-properties officeooo:rsid="003c6d3e"/>
    </style:style>
    <style:style style:name="T19" style:family="text">
      <style:text-properties officeooo:rsid="003cce37"/>
    </style:style>
    <style:style style:name="T20" style:family="text">
      <style:text-properties fo:font-variant="normal" fo:text-transform="none" fo:color="#000000" loext:opacity="100%" style:font-name="Courier New" fo:letter-spacing="normal" fo:font-style="normal" fo:font-weight="bold"/>
    </style:style>
    <style:style style:name="T21" style:family="text">
      <style:text-properties fo:font-variant="normal" fo:text-transform="none" fo:color="#d6161d" loext:opacity="100%" style:font-name="Courier New" fo:letter-spacing="normal" fo:font-style="normal" fo:font-weight="bold" fo:background-color="transparent" loext:char-shading-value="0" loext:padding="0cm" loext:border="none"/>
    </style:style>
    <style:style style:name="T22" style:family="text">
      <style:text-properties fo:font-variant="normal" fo:text-transform="none" fo:color="#170401" loext:opacity="100%" style:font-name="Courier New" fo:letter-spacing="normal" fo:font-style="normal" fo:font-weight="bold" fo:background-color="#f9b1b6" loext:char-shading-value="0" loext:padding="0cm" loext:border="none"/>
    </style:style>
    <style:style style:name="T23" style:family="text">
      <style:text-properties fo:font-variant="normal" fo:text-transform="none" style:font-name="Courier New" fo:letter-spacing="normal" fo:font-style="normal" fo:font-weight="bold"/>
    </style:style>
    <style:style style:name="T24" style:family="text">
      <style:text-properties fo:font-variant="normal" fo:text-transform="none" fo:color="#d6161d" loext:opacity="100%" style:font-name="Courier New" fo:letter-spacing="normal" fo:font-style="normal" fo:background-color="#ffffff" loext:char-shading-value="0"/>
    </style:style>
    <style:style style:name="T25" style:family="text">
      <style:text-properties officeooo:rsid="004083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 <text:span text:style-name="T1">OE198796.1</text:span> VIRT-3152279:5'3' Frame 3, start_pos=607</text:p>
      <text:p text:style-name="P2">MSLVKLLHTGANLLVLANKEEQMPNTSPPELMQLLLSTTLKGNTNTFLNF QERFQSLIDQSPSLLHSVGKDGYFVAFFFGAFASFLDAGLANIDPNTQVQ</text:p>
      <text:p text:style-name="P2">NIFFRFDKHNNLKLAVLVHEKPLHKLLCMTVSETNQALTFDDDELKNIDW</text:p>
      <text:p text:style-name="P2">QIATTNRAMRLQYEVIAYNLTIDKKTYKALLTEVEKPKLKLNSAQGAKPF</text:p>
      <text:p text:style-name="P2">TRIVSLKPNLEQSIRELSDSDNINQAMNQVLEHIVKTYKHYSNENSAVTK</text:p>
      <text:p text:style-name="P2">FFENEARDHGYVAGVFTNFKYRQHLKLYSEIFEGKGQADLVLLVRGHTKS</text:p>
      <text:p text:style-name="P3">SNSIPVIIEMKAGTSDNSQIAVGQAKAYVKGRFYNFIRILTTNKQVLCVG</text:p>
      <text:p text:style-name="P3">LNLHFSHHANYSFYATSCIEREGNSIIEKFLSDSRRNPLNTQIIREQLEY</text:p>
      <text:p text:style-name="P3">LYYGIVWSNGGNSNDRYMSRFILGQSVFIPDAGSHKCIFVYSENEKMQEG</text:p>
      <text:p text:style-name="P3">TIQRPRDSEKKMKDHVTTIILIDGSKAFILNINELQAGLKSKNHIIPIEQ</text:p>
      <text:p text:style-name="P3">INKEVNIIYEISCNLVGAPNNSNPFHRYCADGAITVTKHNSLDKYRDIKE</text:p>
      <text:p text:style-name="P3">RAFDGTIKPLNNNIEFQNAFNTAKNSGQYNDYKKVFKVVAELLAPFKENI</text:p>
      <text:p text:style-name="P3">ANEGEFQAVLHGLFSSYIAEDVRVFTEFQVGSGGETRGVGKEGKKGKLDM</text:p>
      <text:p text:style-name="P3">VLVVYSNPPVGIELKFATTEESLKQKVKEAEKDLEAYAQATAYKIITDTE</text:p>
      <text:p text:style-name="P3">QVKLMYAVFNASAQNAASLIKVSENFKDALVSHSSEAMMRLTSNAPQSTT</text:p>
      <text:p text:style-name="P3">QNRGR</text:p>
      <text:p text:style-name="P3"/>
      <text:p text:style-name="P3">&gt; OZ389556.1 <text:span text:style-name="T2">ADN</text:span></text:p>
      <text:p text:style-name="P3">tccgcagataaataacatggtcgagataaaagttgttgagaattaccagcttggaatgtatgcacagcattatatgtaactatctcttcgttagatatattcttttcaatagtacatactatgtgtcttgcgtgtggctgcctagaattaggacgagatgatataagacaatgatgattcttttcgtcatagcgcactgaaacaaaaggaccttccatcataaacatctgtttagatagatagatagcatccttaatttcatatgtataacatgtattcaagcgacacgctataaatccacctctactgataccactgccaggatttggtggcactgttgccattgatacaaccggtgacttatcaccattaccctctaagacactaacagcacaagaagtttgtctaatatcaaactgagtaatagtaccattttgcgcgccagttaggaaaatatttggattgtcacctgaccaacaacaactccaaagtggatattctgtttggtatgtgtgcacagtcatattattttgaatgtccattagctttgcacatttatcaaagccaacactaagaagaatagtttgttgcgtagaatgaaaagtcacatctcttatagcctgagtgtgtaaaataataaattgccgtaaattgaaacattcgcaatccatcttccttatgccatatccgttgaataatgtacttgttgacttctgggaaacagctaggaatttgtaccatggattataatccaagacccggcagccaccttctttgcagatttctatagattgttctaaatgaaactttcttgaagtagggagacttgaagcgctttggccagtatcaatgattcttgatttttgactttccagttcggtaatacgtttcttcatgcaagtcatttgctcctcgtatatttttagacgaatgctggcctgtgataattccattcgtaaacgattcttttcagctgatatattggtaaagtccttcttcagattgtcgtattcagtaacgtcaattgctgtcagttttttcgcatatagcattctaatatgtttcactgcagctttcttattacattgcggacaccggcgatttgtactgttgcaagaatattgtagccacctcagaatgcaactatgtccaaacagatgtccacagcgtaagcaacataagcggtgttctcctgagctggtccattgctccatacatattggacatgtctgatcagaatctacatccgaaacatccaagtttacactagctgtatttgctgcaaaggatttaattttctttagtcaagatacagacacgatatatatatatatatatatatatatatatataatataaattgatacatcatgcatatcacacatgaaatgagatacatccactatattacagttatagtacttttattataatggatgcattccatttcttgtgtgatacgaatgatgcatcattttccttgttgtttaccaaatgttcaacaaggataaataatgcattatgcatatcctgcataaaacagaatacgtccagtataatacatactttgttgtaagttttcagttggaacatcattctcttcattattttgcacatcactgggcaaaacattttcatcttcgtgttgatcttccacatcttgttcttctatttgcattcgctcttctacgatattttcgtctgtaacgataaaataaaattgtcaaatgttagacttgattaaagtctaacataaataaagtctgattgtaaacaaacataactcattaaacattaaatgttctttattataaaagttacataaatgttaattatattacccacaaattttacaattaattatatccgcgaataaataaattacgtatcgtgcatcttttttgctcctttcagagttcgtatattcatataattgtttattgcacttactgccctccataacctttaagtcttattgagttaaattgatttgattaaactttcaatacataatgatcaacacaatctcctctttcttgttttattaaatatctattgtagattgggacataggatcatttatcgaaccgttttcctttctttttaatcgttgataaattgtaatttcattgaatagccggttggttctttatatgctgcggtccatttgatgctacaaatgttttgaagcattctttggctagtatttcatttgtcgtacgacaaaattttcaagcgtgttgattggctacgagatagaggatttctcgagtctctagaataaatagagtttcctctatctcgtagccaatcaatacgcttgcaaattttgtcgtacgacaaaattttcaagcgtgttgattggttacgagatagaggatttctaaggtttgttcgcgtcgccatgccccaacatgctcctactcactccaatgcactctaattggttggtgtcaccagaatgatcggaatcaacctattagagtgtattggagtgagtaggagcatgttggagcatggtgacgcgaacaaacctctagagacttctcgagtctctagaaatcctctatttcgcagccaatcaacatgtttgaaaattttgtcgtacgacaaatgaaataccagcctttgggtgctttccatttagtgacacaagtcgacacaaatgtcgttctatctttcttgacattcaaaagcattgaactataatcatactggaaggagcactcctttgttctcgtgcgatccgaactgtgtgaaggagatagttgaagaagtaccgtgttagccttgtctaactaactgtaataatcacgtgacgcgatatattacccattctaagaacatttaccttcgcatttaccttttttcgcactttattacttatgtaatgacaaatccggccttttatctactgtattacaaaaatt<text:soft-page-break/>ttttacaacatctcctccccttttgtacagcatctcctccccttttggatcgtgcacttcacatccacggtcttacatataggtcttgcgactctgacaaatttcaatggtggggatgactcagatataggctggtattcatagtcggatcttatttcaagaccgtctcaagtaatgtcttaagatgctaatatggttctgtgattggttgatgacatctcaagacaatacttaagacgatcttaaatataagaatcgactatgaataccggccatagtcttcaagatcgtcttaagtaatgtcttaagacgctaatacgactctgtgattggttcatgacatcttaatattgaacttaagacggtcttaaataactatgaataccagccattgaagcaatttttagttgttcatcgcatcgtctagacgtgtcgctgctagcgagtatcccctagagaccctatactaagagtctggacactgttgcaaatttgacaaaacatggtgtcgtaagtggtggggatagtacttacagtatagcacggtgtagcactttaatagcatgtatcagcaagatggatgaacggtgagcacacatgtttttgcatgctgtatccatttaatgtatatttttgaaagtttgacgcaacagataatctgttgtgttcgttgactattctttatagtccgttctatatttcaattactttttcaactcatacatatcgctctaattattgttctatttttatcagttgaataataccgcgtgctaaatatatattttcgagacatcttattggttccgccatattttgtcaacgctaatagaaagtatgacaacagtgtccagactcttagggtctctagtgtccccgaatgatataacctgtaaattttttgtttaacagcgtctctctgcttttctcgttagcgtcgttcgcgtaattatggctgcattcggaaacatcacccgaatatctccgggtatcattttattcttatttaaggggatcctggacggatcgaattatcgacatttacagtcaacgtcactactttgaattggctttatagatcgcaaaattcttttacagaattaaattatacatactaatgaacagtagaaactatcattttgtgttaaaactgaaaaaaaatgtaaaaataatattttagtcggtatgatagagctgtcagtgcgtgaaacatttgcttacatgaaacgttctgtatgttatatgacatatacaaaatgaacattttccactgttcagaataagtgtatagacaacaatcaatcgttgaaattcagattgatagcctagaaaaagaaccgtttgtttgactacctttttgcgaatgtgttcgtgcaatattgatgtagtagtgtgtagcgatgtatcgatgtgatgtatcggtcggtaaagtcggctctcgcgtcagagtttacaggatccccttaagggcgaattcacaccttggcagaatagcggaaagcggaaaagcagcagccaatgaaaagaagcattcagttgcactgagttgcactaagttgcactgaattgaactaagttgcattgagcagagatattaggaccagagaatgtggcaaaggcggatgccctggccaagaaactgagggaggcccttaaggaggaggcacgagtttccaggcctacagccatgggtgaactccaatgctggaatattgacgacacggtggactcggaagaagtgaaaaacgtgatatctgtcgcgggggattgtgatccttcggaggttagaacaggagttattcggaggatgcatagtggacttaattccgtgtggattaagtgcccattagctgcggccatcaaagtggccgccacgggacgagttcgcattggctggacgtctgccagggtgaggctcctggaaccgcgtccggtacagtgtttcaagtgttggaggtttggacatgtacggaatacatgccggttcccggaagacaggatcggtaattgcttccggtgcggctcaagggatcatgtcatcagagactgcagggcctcaccccggcgctatttgttcgcaatcggggcggggtacgaatcatcgtttgggatctctttctatctgtaatgagccgggcccggctggccccgttcgtgtgatggaacatccggctgaatacatggaggtgtagaacatggagatgggacagcacattgggtgcggatcccgggggagcttcgcaatcgctggatccggttcttttcgagtcttgcggcttacactggagggattgaggattggggggacttctccacgactggcgggtcgccttctcttttctccctccccctggtggggagagcgcatggtgggaggaggagaaggaggatgggcgctgtgcgcgatatggctgccccatgtgctcctgtggcgaacggagagcaggatggtttcctgtactggacaagctggtgatttggttggttcggcggccttggtcgggctgtttgtttcgtcctttcttctgattggctttttctttccggtttttaagattgttttgctatggatgcatcgatatccatacaccctgaatgggcctggatgtccggtgggcgtcttggtcgtccggtgttcctggagcttctctcctggggttccgcttgttcccggggtcccccccgctgtgttcgtgcagcgggatgggagtcgtcgggggtgctcggttcccttggtgggtggtttctggaggctcggtcgctcggggcgttttttcgactgtccatggtactaatgttttctgtgtgcgggcgtctggctctgggggtcggtcggtcggggctccccgcacgccgctttttcgagtcccggctcattgcgtaaggcaatgagttctccgggaaccccttttggggcggtgggccgcggctggtcgtccccctgggctgttgccttgctcctgggttgggccttcacgtaattgtggattgcatgcggggggattttcctggaatggttgtccttgtttgtgtgcaacgttgtgaattgttggatggagttttatgtctcgtccagcccgggaggatgggccaggagtggtccatgttcttttgttctctgcgttctttcccctaggtgatcctgaccggtcatttcggtggccggtcaggttttgggtgaacgcgcatgtgacgacgtggtgtgattggtatagtccactgcgttgtgttacgcgtggctcggatcggggggaacatcgatgcagtcgatgaagcaggcctgatgattggatgggcggcttgccgcttgaccactattatctggtcttgctgaggcggtcggacacaggcggcacgtaagtgtctttccccttgctcgactaggtattcgatggtgtttccctgtgaagagttccgcaggtggatcgtctcgtagtatcctctgtttgtctgattatggtggtgggttcacgtacggctgtgacgtcccagaagtagtgcctcgtcgtattccctgtgacgtcacgtgtagccctgtattcgtcctgcacgggggaagtttttagtgggtgcaagccccacataacccgaggggccggccctcgggtatgcgcaaggcattttcctcctccaacgcaaaacaaaaaaaaaaaaagttgcattgagcaactgagtgccacttctcattggctgctgcttttccgctttccgctattctgccaaggtgtgaattcgccctaacattcggtgaacaaggataaaatgatacctggggacactctggtgacgtttccgaacgcagcctatatctcggaatcttggaatatacgaataattagtgtttagtatttttgacaaatgtgtgaaaaatggggagatcgtgcgttgtatgcaagtcgagttataagaacgcgaccaataattcgctgttcaaagtgccggctgattccgaaatgttaaactgtaatacccggtgaaatagagttgaagacgtctcatttcgtttgcaaaacgcatttcgagactaagtacgtgatcacaaagtatgtaaaagcatgcttcgcgaaacattcctcccaaatcaacgtgttcgatttaacgttggaagaagttctcgagacgtacgagttcacgtttccatgcaaagagcacgcatccgctattttatcctttgcgctagtttatgattttgcgactaaaatagcacgtctctttcacgtatagtgcagacagagatgatttgcctgtaacatcgtccaaaaatttcatctgattatataaactgaattataatggaattataatggtaacgtaataatatatttcagagagctgcgtgtatgtactacaactcgaattgcgacgaccgatcacgtacaaattcattaacgcacgacggatttaataaaggtttgttcgcatcaccatgccccaacatgctcctattcactccaatgcactctaataggttgattccggtcatttcggtgacgc<text:soft-page-break/>caatcaattagaatgcattggagtgagtaggagcatgttggggcatggcgacgcgaacaaacctaagggtctatccagacaaacttgcatagccgcataaccatatgcataaggaaatggattggtctatttccttatgcacatgtatatggaccaatcaattttcttatgcttacgcttatgcgctatgcaaatttgtctggatataccccggctcccgcagatcagagcgatttagtcgcgcgcgacgcacgatatccaatgaacgtgccgcctttccgctcatctctgtacgcttattggatatcgcgcgtcgcgcgcgactgaatcgcgctggtctgtcggaaccatcgcgacgatacgtatttggtccacgaaaacgcgaccgtgacgatcgcaacggaatacagtgtgttcacacggtgtgttcacggtgttcacggtgttcacggtaacgaaagacaactttttcgccatccatggtccacgtccatcttgtaaacattaagtagtacgagtcccgtttagcattttccacaccgcatagtgcatacgcacatgtaaggctgcgtttccactgagcgcgccacgcgtcgcgtcaaccgtagttaaccaatcaaaacgttctattttaaatgagatgttttggtttttaaaatagaaagttttgattggttaactatggttgacgcgacgcgtgacgcgctcagtggaaacgcagcctaaggatttatatggttgatattttccgcgtaacgcgtatcgcggaagggtgacgtcccatggcgcgcattgtgatacgcgcgtatcgggcgtatcacaatgcgcgccatgggacgtcaccctaatgggccatctacaatgagtcgcagttgtaagagttgtaagaaactaaccaatcacagttcattatttttcgatcgcaaggagtataatggactgtgattgatcaatttcttacgactcttacgattgcgactcattgtagatggccctttaagtcattgcaaattgaagtattgcgaacgtgaacggtttggtcccttttttgaatcttattcaatgggtgcattcagaagcacaaccgctcactgagcgctcagtgagcggttgtgcatctggatgcacccaatgtaaaacgttaacatttaaaattgagcataatatacacaaagaaatactgactgattttcttatacattatgcgttatgcattatggagaagtgtgtgctccccgcttagagtctattcagacaaacttgcataatcgcataaccatatacataaggaaatggattggtctatttccttatgcacatgaatatgaaccaatcaattttcttatgcttacgcttatgcgctatgcaattttatctggatatacccttaaggcggggagcatacttctccataacgcaaaacgcataatgcataagaaaatcagccaatcagaatcctcggaaacgaggagtgggaataaaaataaaggattctgattgactgattttcttatgcattatgcgttatggagaaatgtgtactctccatttaacgctatgctagtgccgttcatggagcttgttatcgctatcgcgctattggctccatgaacatgttggtagcgtttgcgttgatagcgctaatagtgtctccccgaacgcacccacagtgtacacatttattatacgttttgtcattaaacctgttagccgtgatttaatttaaccttcaacagatataaatcgtaaaagtattatccgtgccagcattgcaactaaggggaaaatcttcagccaagtacatctaagggaagtaattatcgttagcaattgttaagaacattgaaaaaacatactacaattgcaattaaataatacagaggtatgcttctttaacacaagatagtcggtccaaaccggccaatgtcatgacaaatttatttatttactctttccaaattcacaaaaggtacatatatttttgagaacaatatattaatttgtaatttatattataaattaatatattgttataatttgtattataatttgtataaaataatgttgtaaaaacaaaaatacagaatttttgcaaagctaggtaaattagttcgtatgtaaatttaatgaaaatgagctaatatagctagttgtagtatagtgtagtatagtgaagttataattaaaattattataattaaaattactgtaactaaaattactataaataaaagttcgcacaggtaatgagccaattattgtgggtcaattagtgacagcacaggttctgctcggtttctgccaatctaccctcaaattacattgcacaaatcctgttcgatttctaccgccaatctgctgacatagcatatcagctttgtcatatttttggcggtagtttgtcaacatcgtcagatagtacagactctgtttgaaatttgctgctttctgccatcagaaattgataacatattctgctcaaaatctatttctgcaggtttggctattgggaaagtttatttatcaatttttctataaatcaatattgaggttatgtttaccgacataacagaaaaaggaaaaattatttaatatattcaaatagctatatttatattcttttattttacttatattaatttatacttttaagtttactatttatttttatatcgaattaagtatgaaataattatatttcaaataactattattttgctttttttttctacatatcataagacttctgtttacttattcttcttgtcccaaacagctttattgtcaagattattagttgagtttaatataaaaaaagcttgctatatagataaactagtttagagttttaagttttaatattgattattaaatattgtaattttataatctaacatcttactttagcatttcaaaaagtaacgaaaaaagtaacgaatcgttactttttaaataacggtaacgcttttttttaaattagtaactagtaacggtaacgagttactttttacaaaaagtaacggtaacgataacgcgttacttttttagagtaaccctgttcccaaccctgcttaaatcatcctacgaaaaagtaaggtggaaattttatccatttaagtgcaagtcttctcaaacgtttccgaacgtttttgattccaacatgggagatagggtgcacttggatgacattttcgaacgtagtcctgacgatgacttaaagttaccagaaaattttgaagtaagacgagcagtaggtggaggaaattgtttctttgattcatttaaacaaggaatagaacaacaattaggaataaaagttactgttgatcaattacggaaagattgtaaagaatttgcactaaataatccaccagaatggttcacaagtgctatagaaatcaaaagtgatataaaagtggaacagatattcacccggagacgcaaaagaagaagaaaaagtgttattactaatagttataatgttgtggtacgcagtgaaaacccaagttatataaaagagattttaaatagtagcaaatggggagatcctgacgttgaaggtagaattctttgtcaaaaatacaatgtgagattacatgttgttaagaaacaatctatggttgcaggaggatggatacatcagattataagtgtaacaggttctgtacctaaagatgctagtaatgtgaactataatgaagaaaatactatatacatagtaaaaaacgcagataatgctcattttgaaccaatacttgacaaaacaaagagtagtgtagttcagcaatcttctagcaaatatggaataagaaaaaaagataaagagcctaaaccagaattaattgaaatgtttttatttgcaattgacgaattcaaggacaatttcaaaacactcctagaagaaattcccaaaaaacatccagttccatatgatgaattctttatatatttcttccttggttcagctatcacgcttcctgatagattaagagaaaaagttggtattaaggagatatattttaatataagtttagaagataagaaaagtataaaattaatttttgatgtcaataaagacaatcaaagcagaagattagtatttagaactattaatgttaatgtaaatgttgaaagtgaacaaagtaattttaataaagatgatcaaagtgataatgatattaaagaaatagctaagaaattatgtttagcagatcagagtgtaaatcttcctgagatagatgaaaagtcttttcatctaagtttaacaaaatcaaaacggttattggaaatcaaaaaagatcaatatgtaaaagaagctttacaaaagattcaagaggaagagagaatcaaacagccaagcttacatggggataatgaagagaaatttaaagctgtagggtggcaagataaggaacttacaaaatggtttcgtagaaatgaaaatagcaaatctaggtttgaagatgcattagaaatgctttctaaggaaacagaggaagtaaagaaa<text:soft-page-break/>ggtgtagaaaaaatttttgatagttttattgaagtatgcagagaagaaaagaattttccacaaaaacaaagagataaaaatgaaaaaaaaggtcaaaatagaaacgatcaatataaagaaagtaggttccatggttttatttatggtactttaatgctgaattttaaatcactgtatcatcttaattgttacgctgaaagattttctggtatgggaggtggtgctgatttagtacttatttcacgcaaagatgaatatagaaacagaaatttaaacgctgttccagttatcgtagaattaaaagtagataaaaatgttcgaaatgcctgtgaacaagtaaaaagtaacattgttcctagtgtaagaacttttgctgaaaaagcaataattgcaggagtaagtcttttgagtaatgaaaaaggatcaaataaaaagtggttaccattaatagtagaagaacataatatacctaattcagaaggttttataacattgttactaaaaaatatcaacgattcaaacctatctaaagatattcaatctaaaaatattcaagaaggattaaaatatttacattatttaattcctggtattgatcgtataagttatccaaagctatgttatgagcaccgtaattatcttagtagattgatcttaggagagattttagctagtagtagtgaattgaataaacttgtttttattcatagagacgaagatgtcagcgaaaaagttacaaccttgctattgcatcaaaacgataagaacttaatcgtcattttgaatattattgagttaaatacgaaagatttaggtgaaaataattttaagttggacaaggccgttcctctctttactagtaatgaggcaaaaaatattaattctgtttatcaaattaatataaaaatagatttcagaaattctgattttagaaataagaatagtaaagataaatcatatcttcaagaagatattaaagtagaaaaatttgatttaggggaatataaaagtatgtcagaatatacaggtaaatttataaaagttggaaatatagactgttttagtttgaataaggaaggaaaattggagttagtgaaaaaagaaaatttaattaataatttaaataaagttttgttccctattaaagaattaattacgggtgttgcaggagaagacgaacttattgctaaaagaacaaatatcaattttctagcagtaatacaaggcttatttacaggtaaacaaaatattgctaatggaaaaaatcagattatcaaaatattgccaaaagtgaatattgcttacaaagaattgatagatcttgccatatctattgcaaataaaaataaaagcattagagaaaatgaagtagtttttatttatactagcaaaccagatacaatcacagaatatcttttatacagcctaactgataaaatgttaccaaagttatacttgctaaaatttaatagtaaaaccaaagatgaaaataacttgataactatagatattaggggtctttatattagacataattcctataatagagacaacataattaatgacttgattgattatattgttgaagaggatataaagggatttgatgatttgttaaaaagcgaattaaatgagttattaaaaagtgatactgatagagagcacactttggaaagtctgtataatatcgtagcaacacttaatgaccgaggtggttataaatgggtattacgaatctatgaggaaatttataagatacagaaagacattttaatccttgatcatcctgatgctttaagtattcgtcattgtatggctgaaatacttgaacaacaaggcaaatatgataaggcatcaaagatttataaggaggtatatgaaggaagaaaaaagatattaggagaatataattctgatactttaattacttggtataatatagctgcagtgctagagcaccaatgtaaatacgatgaagctttacaaagccataaagaagtttataagatacaaagagacattttaggttataattcagctactttagctactttaacaagtatggcggatgtactgattaatcatggtaaatgtaatgaagcattacaaattcttcaggatgtttttaaacaaaaaaacttaagtcttgatcatctaagtatttcagatatttcaatttctatggcagcaattctgatccatcaaggtaaatgtgaggaagccttgcaaatgcttattgagatttttaataaaactacaaaaacttttggaacatgtcatcaatcaactttagaagttggtaattatatggcagtaacatcctcttttctaggtaaatatgaagaagcatttaaagttttgtatgagatttttggaaaaagaaaagatattttgggatcatataatcctgctacgttgtatactcagtttagtattggaatagtactagattgtcaaggtaaatacgaagaagcgcttgaaattttcaataaggtttacgaaagaagcaaaaagattttagggccagagcatctcgacactttaagaactcacaatattatagcatctgtgcttgtcaagcttgataaatatgaagaggctaaacaagcaattaacatgaactatgatgtgcataaaaggactctaggggaaaatgactataatactttattaactttgggacaaatgtctgaagtacttttcaaacaaggtaaacataaagaagcactagaagttttacagaaagttttgaatgaacaaagaaaggtaccggacaatgaccttaatattttaaacacaagaaatcgtatagcccaaatattttccagcttaggtaaatacgagaaggcattccaaacttataaagagatttacgagaaaagaaaagacattttaggttctgatcatcatgatactttaagtacttggaataatatgaaattaatgctttttaacataagtacatataaatataaatatgaagatcgagttgttatacaattaaattttgcgattcaacatggtgataaaaatatggttgagaatttgatcaaacgtggatatgatgttaatattcaaacaagtaataaagttactccattacatttagctgttctggaaggccatattgagattataaaattgttattaaaaaatggtgcaaatattgaagctgttggcattaacaattggagacctttacattatgctgctttttttaataactgtttgaacactgttaattctctgttagaaggaggggctaatattaatgctgttgataaagataatagaataccgttatattatacaactgataacttaattaaaaaagttcttatgtcaactcaggaattatttaatgctataaaacaaaagcaaaataaatctaaaatacaggaattgcttaaaaatggagcaagtgtcaatgctgtctctagtagtgatcgtttaacagtgttgcattttgctgtttacaacggaaatatagatattgtaaatgttttattacaaaacagagctgatgctattagggttactaataagggtaatacaccattacatatttctgctcaaaaaggttataaagaaatagttgaaggtttattactgcatataaaacaagtaaatcccaacgaaatgagtaattttattaatgctcaaaccattgttggaggtgctacatcactacacgttgctgctcaaaataataacaaggaagttgttgagatattattaaaaaatggagcacattatgatatcaaaaatatacaaggtaagacaccactagatctggcgaagcctgagtctgatgtcaaaaatctacttggttttattgatcaattgtttcaagctgttcgtgataataaaaaagatttagttaattctttattaaaaggaaaagattctagtatacttaaagcaattttaaatgctagaaatattgataaaaaaacaattatacaagttgctatttctaatcagcaaagagatattgcaaaattacttatctcagtaagcaagaaacattaaagtaacatttagaaatgttgattttatgtgcatattttgaacgtttgtaaataatattgtataaatatttcaaaaagattaattcataacatgatttttcaaacattgttgaaatgttttaaaaacattacaatactaaatgggtgaccgcgatgcagctattcgcatacgactcgcgggagttgttctaagtgcttgctaacttaacattattttgatgtcgacaataacattattataataattaatttaatcttttgaaaaatattaccacaatgttaaaaaaatattaatgcaatattacttacaacaacatagaaaatgttatttcaacattatcgaaacctctaaatcggtgtcaaagtttgttcataatgatgttgcatacaatattaaaaactacatacttgacaatattactatgttagtgaacaccattataataacgttgtagcaatgattttttgcttactg<text:soft-page-break/>ggtataaaagaaaacttaaaagttattcaatcttcaaatcaacaaaagactttacatcagtttgaagtttgaagtttcaaataaaaaatgcttaccaaatcataataggaaaaaaagaaaaactgaaaatgaatgttcattcacgtgggaaaatgtgtgttcaaaactgagcttttaattcgtacgcttcgcgtaattataatagtattaaattcaatcattaaatcatataatgattagtatattatatattgattagtatatcataatattatatattaccatctaaattcaagttttaacaaatcctagaaatctttcgattttttcaataatgaatatttcgtaaatagcataaaaacaagagacattaacattagtgaacttaacaacaataataaggttattattgttatgggtttttatcgataatttctttgagagattttcaggattgtgagctattaaaagacgcgatcgagtgccgctctgccagtccgtcgcaaagagaatttgctttctcacgtactactcgctatggcttttgttcgcaaagtataagatttccaccgctacataattcacataagctcgctctgaattacaggaatacaatagtctttgcagattccccgcacttgcgtctcgagttcaactccgctataaatattgtatataattagcgtacaaaatatatggtataacaaagtttaagacttaatacagtttaaaacattattaagtgttgtatattaatataagtgttgtattgtaatataaagacttatcctacaaccattatcctaaacagttccccactcgcgaaacattctgcttttgaacatttttctggtccttcaagcctctctctctctctctctctctgtgtgtgtttccctctgtctctgaccatcgtgcatcatgagcatggacgcagcgggcgtgctgagaagtcaggacgaactccagagccgcatcgctcgagcaggagagtacctaaaaaaggaagacgcgtcaaagatgaccacaacacattgtggatgacacattggaaatcggaagcgatcatgattatgttcgaaagaatttctacaggatagttgaggagacttacctggtgcagcgaagcttcttcgttgacttactgcacaacttacgcgaaaggtgcaacaaggacttggttcctggctacgccgtccacggcggaaggacagtcgcgtaggtcgcttcgtgcattcatctgccatatttcttcggcgcaaacgaaaagtggccttcttttcgcgatctgttttgcgttaagaaggacatttcactatcgaaaaattgcattacctcaaaacgagtctacgcggcgaacccggactgctcatccgaaacttgcctacgactaacaagaattttgcgcgcgcgtgattgattctcaaacttttaacgcttgatcgtgatgtctggacgtggccaaagggacagagcaagacgaagagccgctccaaccgagctggactacagtttcccgtgggtcgtatccatcgattactgaggaaggtaaattttgcgaaacgcgtaggcgccggtgctccggtatatctggccgccgtgacagagtacttggccggtatacttggtcgccgaagtgttggagttggctggcaatgcaacttgcgaaaacaaaaagatgagaatttttcgcgtcatctgcaactcgccatccgtaatgacgaggatgaacaagttgttctcgggcgtcattatcgctcagggtggcgtgctgcctaacattcaggcgatgctcttgccgaagaagacgaagaagaaggcgtaatcgtaaatcggtaatgagagacaacgaccattggtttgcagcaacggaaagtataacaaattacattaacggatcactaagagaacaagcgtctactcgtaagatcttccttcaccgcattcactgcactcccgcatatcaaaaccgagtccgcgcatgagcttaaacgcgttttccatggcatgatcaaccccgtcggcactctcgaaagcatcggccggccaatttcagattgtaccgatctgtttatgtatttcatagtcgagctgctcgattcgcaatcccgccgagagtgggagacgtccatcagcgggacatccgatccatcttcctatgagaatttgaagatgttcttagaaggtcaagtacgaacgttggaggcactttacatcagcaagacagaagcgaaatcacaagcaaattctcggaagcgacaatcggcacggtcgcaatttgcacaacggcaagggaaccgcaagacgtgttgttagctttgtcacgggcagcactacgtcttattctgcgaggactttaaacgaaaggattcgaaggcgaagaaaaaagttctctgtcaccaatagaactccaggtaaagatctactttaaaaactcaacatgccattaatggaaactctagagtaatgtggaaatctattattattttagcattctcttaattatattgggtgtacaacttaatttggtccgttttcaatagatggctctaggtgctataaataattgacggcgacagctgatttttgctgtatcgtgaagtgtcaacatctgtcaaccaaatattgtttacaagcctttgagttttgcacaacaagtttaatttttaccgcgttgaaaatgtcgagtttcgttccaaataagcatcatttgcgggaagttttgattttggaggaaaagtgcggctgaagcgcatcgaatgcttgtggaagtttatggtgaatctgcaccgtcggataaatcttgcagagaatggtttcgacgatttcaaagtgatgattttaatgttgaagacaaaaagcgttcgggtcaaccgaaaaaatttgaagatgaagaattagagacattacttgatcaagattcgtgtcaaacgctaaaagagctcgcagaagcattggaagttactcaacaagctatttcgaaacggctcaaagccgtgggatacatccaaaagcaaggaaattgggtcccatacgagttgagactgagagatatcgaacgacgattttgcatgtccgaaatattgcttgaacggtacaaaaagaagtcttttctgcatcgaatcattaccggggacgaaaaatggattcactacgacaacccgaaacgcaaaaaatcgtatgtaaagccccaaccgggaacaccaacgccgaagccgaatatccatggtgccaaggtaatgctctgtatttggtgggatcagaagagtgtgatccactatgagctgctaaaacctggtcaaaccatcacgggagacttctacaggcaacaattgatccgtttaaagcgagctatagccgaaaaacgtccagaatgtgcgaccagacacgagtccataatctttcaccatgacaacactcggcctcatgttgctgttccggttaaaaactatttggaaaatagcggatgggaagttctggctcacccgccttatagcccagatcttgctccttccgactaccatttgtttcgatcgatgcagaacgctttgactggaatacgcttcacttcagaacagggtatcaaaaattggctcgattcattcttggcttcaaaagatgaacgcttcttccatgacggaatccataaattgccagaaagatgggaaaaagtagtggctaacgatggacaatactttgattaatgtattaattcattttatcattcaaataaatgcgttttttgagcaaaaaaacggattaagttgtacacctaatacaatgcaggcaaatgcatatctgataagattagaattctttgaataagaagaacgaaatattgattaattttcttaagatttacctgtcattttcgtttttttacctgtcatattcgttttgttatgttaggttaacatttctaaagtatttgagtttagcatatttagcatgatacgaacattttacactcttttattcgaaattttgatgtttacatgtttacatgtttatttttacgaaaactttgttatttttataattttcaaatcatgaaactcattaaaaagtagaatttgaagaagtctcaagcaagtttttgcaacttggtagaagtttgaattgagttgcatttgtagaatttgattttgagctaaactcaatcataattttgtttttatcatattgcagaccgaatcattgtcgcaacatcttttcaatttggcgtcgaagatagtttttaggataaagatatcgtctctttttacatctcataaaccgaagaaaatatttttgttattatcggaatgcgttcaccacattgtataatagattatacagaaacattagtgagcaggaatgaattcatagaacttcttgagtcttgatggtcaaatagatgactgacattattgatagttgcgctttcggcattgaaatgaatgctttgtcgaacgaagagagtgaatttcgcag<text:soft-page-break/>aataggaaaaaatgtattccatccgccttggacagattttctacgattcaaaatcaaaactttcttatcatggttgtacgatatcgattacatatcctaccgcatacggagatcaccaactttttcatgcatctcatcatggataatatgacctatagagaaaagaataatattggtatgtaataggtatgttttcattgatgtgctgcgcgaattaaagaaacatttagataaaatgggcaatatcggtaaatactgtctccgttttttaatattttgcactctgttgcatgaaaattttttagacagaaaattacataaattcatacatccaaaatatgattataatcacagcaaaacgaagtgttaaattttagtcttacgagcgacgatcaactagttacataattattaaatagttaaattagtcataatttttttatattcgatagaaaattaagttgcttgtaataaacgataacttgcatttcagatttaactgatagtttgatggcttctcaagcatttgttttttttggcgctggttttgaaacctcattgactatgatagcaaatacactttacgaattggctttaaatcagaaaatacaagacaagttacgtgaagaaattgatcaagaatatatgatggcaatttaatatatgacaacatcaaggaattatttggaaaaggtattcaaaggtatgtcgtacaaaaagaaatattgaatcaaaagaagaaacatgagaaaaatatatagatttttgcaaacattataatacaattttatcgttgctaaaactaactatacttctttaacccgttgactggcattgacgccatatggcgcagaatttcggacgtccaaaaataaataaataaaaataatttaatagccaacgccgttatcggggcaaacaataactttattatttaaaattacaaaatataaatctaaaacttgcaaacttttcaactccgatttgagtgaactccttttcagtgcgtacaattagaagtaaagaagaaaatgttaaatggaatgaaaactcacgtccctctacaatgagaaatactgaagtatgtaacttagtaagaatttttttgtaataatgaacaaataaatttaaaaaaaattaaggtataattaaatgtaaaaacaaaagtaaaattaatagatgtcaatgataaaacattaagtgaatgacgaaacagtctcataagtggagagggacgcgaatgtcgtgtcacgaccgtgatggaagcgtgaatgaagccgactaagaagaacgcttataaactaatcctttatcgtgatatcggttcaggataacaatggaatcatgaaaatagaaagctcgaaaggttgaattctgcgaatagaaaggcgttctaatgtgtcgattaaatcaaaataaattagatctaaaaactctgtatcgttttgcaaatttaaactattaagttgtctcttgacaacctaatatataccatttcggaaacaagtgttttcctatattgcgtttcgctatccaaaatttgtacattagtcaaattcatgagatagactgatgcgatggattacagaagattatatcgtgtgtctattaatatggtttctatgctttgaaattctgttttttagtggtctactggtttggcctacataggatgcgttacaatttaaacaatcaattttgtacactattagattgcgaggaatgggagagcgcatctttttagacttttatttgtctagtttattcaagcctttgtaagcgagggttgtagtcgcccaattttttgttagttttttcctttcagctaaatctttcagctaaataggaaacataagaaatggtaaaatacttacgctcgttatgttcacatataaccatatctcatgaacatagccttgtttctctcgatgtggtttcgctgcttcaccaacgttccgattaatctcgcgactaatagcttagaaagtaggtgagagtttattagtcataccgaccttctcaaacaggaaattgtgaaagccttcttatctttatttcaactttttttatttttaacaataagtgttataaacagacttttggtactcccataagttctcccttatcgccagtaatagctgatttggttctgcaagacctaaaaattttagttttcaaaaacttacctttaatcctaccttttactatagatacgtaaacgatatagctcttacacttccgtccgataaactcacggaattagtagaaatttttcttttcatcctaggctttaatttactttagaaatgggtggtacctctttactttttagatttgacgctcattaatagggatggcaacttgattttcgatttatatcacaagcccacattttcagaacggtattttcattcatgtcattccttgagccagaagacaggcacgatttttggtagataggattcttatacagtcatacccggaattccacaaaaaactttgttatgataattaatattttattagacaatggttactctttagattttattttctttactatgaatttcagaataaaaaaactttttcacctttagtagttaaaacgctgatcgatctgatgcctctcgcaatagtaacgagcataggtattttaccattccttatgttccctatttagctaaaaggtttaaaaaactaacaaaaaattggactataaccctgcttacaaaggcttgaataaactagacaaattcataaaagtccaaaaagactcgcacccccatttctcgcgatcaaatataatacaaaatttattgttcagattgtaacacatcctatgtaaagccaaaccaatagaccattaaaaaaacaaattttcagagcgtagaaactatattactagaaacacaatacaatcttctgtaatcacgaaccaccgcattagtctatctcatgagtttgattggaataatgttaagattttggatagcgaaacgctgtccaatataggaaaagacttgtttctgaaatgatatatctcatacaggacaaaatatttttaaagtatttttaaaatattttttaggaagaatgaaatacttcaaaataatatacgaaaatatttttagaatgttcttatgtccgtcacatcatgtcgaaaatattttcaaaaatattttaaaaagattgcatgtaaatatattcaataatatttgtataatcttttgagaatattgcttcgaacaataaaatatctgaaatcttatgtaacaatatgttcgcatttaaacaatattttgcaatattcttgcaatgatcctaaaatattt</text:p>
      <text:p text:style-name="P3"/>
      <text:p text:style-name="P3">&gt; OZ389556.1 VIRT-1685741:5'3' Frame 1, start_pos=3528</text:p>
      <text:p text:style-name="P3">MGDRVHLDDIFERSPDDDLKLPENFEVRRAVGGGNCFFDSFKQGIEQQLG</text:p>
      <text:p text:style-name="P3">IKVTVDQLRKDCKEFALNNPPEWFTSAIEIKSDIKVEQIFTRRRKRRRKS</text:p>
      <text:p text:style-name="P3">VITNSYNVVVRSENPSYIKEILNSSKWGDPDVEGRILCQKYNVRLHVVKK</text:p>
      <text:p text:style-name="P3">QSMVAGGWIHQIISVTGSVPKDASNVNYNEENTIYIVKNADNAHFEPILD</text:p>
      <text:p text:style-name="P3">KTKSSVVQQSSSKYGIRKKDKEPKPELIEMFLFAIDEFKDNFKTLLEEIP</text:p>
      <text:p text:style-name="P3">KKHPVPYDEFFIYFFLGSAITLPDRLREKVGIKEIYFNISLEDKKSIKLI</text:p>
      <text:p text:style-name="P3">FDVNKDNQSRRLVFRTINVNVNVESEQSNFNKDDQSDNDIKEIAKKLCLA</text:p>
      <text:p text:style-name="P3">DQSVNLPEIDEKSFHLSLTKSKRLLEIKKDQYVKEALQKIQEEERIKQPS</text:p>
      <text:p text:style-name="P3">LHGDNEEKFKAVGWQDKELTKWFRRNENSKSRFEDALEMLSKETEEVKKG</text:p>
      <text:p text:style-name="P3">VEKIFDSFIEVCREEKNFPQKQRDKNEKKGQNRNDQYKESRFHGFIYGTL</text:p>
      <text:p text:style-name="P3">MLNFKSLYHLNCYAERFSGMGGGADLVLISRKDEYRNRNLNAVPVIVELK</text:p>
      <text:p text:style-name="P3">VDKNVRNACEQVKSNIVPSVRTFAEKAIIAGVSLLSNEKGSNKKWLPLIV</text:p>
      <text:p text:style-name="P3"><text:soft-page-break/>EEHNIPNSEGFITLLLKNINDSNLSKDIQSKNIQEGLKYLHYLIPGIDRI</text:p>
      <text:p text:style-name="P3">SYPKLCYEHRNYLSRLILGEILASSSELNKLVFIHRDEDVSEKVTTLLLH</text:p>
      <text:p text:style-name="P3">QNDKNLIVILNIIELNTKDLGENNFKLDKAVPLFTSNEAKNINSVYQINI</text:p>
      <text:p text:style-name="P3">KIDFRNSDFRNKNSKDKSYLQEDIKVEKFDLGEYKSMSEYTGKFIKVGNI</text:p>
      <text:p text:style-name="P3">DCFSLNKEGKLELVKKENLINNLNKVLFPIKELITGVAGEDELIAKRTNI</text:p>
      <text:p text:style-name="P3">NFLAVIQGLFTGKQNIANGKNQIIKILPKVNIAYKELIDLAISIANKNKS</text:p>
      <text:p text:style-name="P3">IRENEVVFIYTSKPDTITEYLLYSLTDKMLPKLYLLKFNSKTKDENNLIT</text:p>
      <text:p text:style-name="P3">IDIRGLYIRHNSYNRDNIINDLIDYIVEEDIKGFDDLLKSELNELLKSDT</text:p>
      <text:p text:style-name="P3">DREHTLESLYNIVATLNDRGGYKWVLRIYEEIYKIQKDILILDHPDALSI</text:p>
      <text:p text:style-name="P3">RHCMAEILEQQGKYDKASKIYKEVYEGRKKILGEYNSDTLITWYNIAAVL</text:p>
      <text:p text:style-name="P3">EHQCKYDEALQSHKEVYKIQRDILGYNSATLATLTSMADVLINHGKCNEA</text:p>
      <text:p text:style-name="P3">LQILQDVFKQKNLSLDHLSISDISISMAAILIHQGKCEEALQMLIEIFNK</text:p>
      <text:p text:style-name="P3">TTKTFGTCHQSTLEVGNYMAVTSSFLGKYEEAFKVLYEIFGKRKDILGSY</text:p>
      <text:p text:style-name="P3">NPATLYTQFSIGIVLDCQGKYEEALEIFNKVYERSKKILGPEHLDTLRTH</text:p>
      <text:p text:style-name="P3">NIIASVLVKLDKYEEAKQAINMNYDVHKRTLGENDYNTLLTLGQMSEVLF</text:p>
      <text:p text:style-name="P3">KQGKHKEALEVLQKVLNEQRKVPDNDLNILNTRNRIAQIFSSLGKYEKAF</text:p>
      <text:p text:style-name="P3">QTYKEIYEKRKDILGSDHHDTLSTWNNMKLMLFNISTYKYKYEDRVVIQL</text:p>
      <text:p text:style-name="P3">NFAIQHGDKNMVENLIKRGYDVNIQTSNKVTPLHLAVLEGHIEIIKLLLK</text:p>
      <text:p text:style-name="P3">NGANIEAVGINNWRPLHYAAFFNNCLNTVNSLLEGGANINAVDKDNRIPL</text:p>
      <text:p text:style-name="P3">YYTTDNLIKKVLMSTQELFNAIKQKQNKSKIQELLKNGASVNAVSSSDRL</text:p>
      <text:p text:style-name="P3">TVLHFAVYNGNIDIVNVLLQNRADAIRVTNKGNTPLHISAQKGYKEIVEG</text:p>
      <text:p text:style-name="P3">LLLHIKQVNPNEMSNFINAQTIVGGATSLHVAAQNNNKEVVEILLKNGAH</text:p>
      <text:p text:style-name="P3">YDIKNIQGKTPLDLAKPESDVKNLLGFIDQLFQAVRDNKKDLVNSLLKGK</text:p>
      <text:p text:style-name="P3">DSSILKAILNARNIDKKTIIQVAISNQQRDIAKLLISVSKKH</text:p>
      <text:p text:style-name="P3"/>
      <text:p text:style-name="P3">&gt;OZ404621.1</text:p>
      <text:p text:style-name="P3">cctgcattaagtgtaactagcttaaacggatcacccatgtcttcgcgcttcaagttgggactggagtctctagctaggaggtcgctaccacttttttaaacaaaaataaaatttactaaaacaaatattggtttaaaataataaaaatgttactcacgaaggtttgtataatttccaatgttttctaccttccaactgtatgataaacgcttctatatcatcatagtggggtgcaaaaccttgacttcctggaggggtcaaataaacattggtccctaccattgtcccaaaatattcctgtaacgtggctatgagtaaatgaactttttgatcatacgtctgcggatttagcactcgaatactacatccatttgaataataatcgtataaagctgaagccaccaccctgccttcttcgttgtgcacttctttgatatcattttcgtaggaaaccacatcaacatttcttgtatagtataagggaaattctctgaaaataccatctagtttctctgtactcagaatgttactgtaataagcctcgctgtttctttgaatgaataacgtttctcgttcccagtacttttcgaaaaatgtttttgggcttataggggctattagccatttgaacaatttaaggccatcaggcgatggatctgtcttatttaactctgatacaatttccgacactgtagcattgctgtcgtttgaattcatttttctaaacttactacttttgggtttatttgtctctgattttccattgtgttttaaaatatcttcagtctctatagggattaaaagaggcggttcgtcatcatcttcctcattattgtgggaaactattttcttggttgatttaattttctttaatgcctttttatttacatttaaaaatccattctgattagtagttttattattaacctggatactagtacgatgatccgtattagcgacattagcgttcatttgattagttttcttctttttcgccggtggaacggcattagttttggacttgcttttctgttttaatttttttttgtaaatggcaaatgctgacaccggagatgcactgtttacagacatatttattggcacaggtttatcacgaaattcaaaagaaaaaagtaatttctcacaattctgaatttgaggttatgtagccacattacgatcacgatcagtgttgccaataccaaaatcttatgattacaaatcctccgcacagaaataacaaaaaccaaggaagccacacataacttattgaggccttttcgttttacttaaaagctgcattttttattattccgaataattaattacacaacatataatatacctacaggaacaaattttttgcatgcgtattttatttatttatgcacagggttatcacgcgagaatgcacaccaccctaactttttattatgcaacctagaaaaaactgtaaatatacgaatttttcattgtaggctgcataataaaaatgttagggggtgtgcattctcaaatgcgataaccctgtacatactgaattccatcagtatctacagaaagaggtttgaggtttcaaaattgaagtttaaacagtttcagcaatattttaatattactattaccagaaaaaaaaaaaaacgtaaaataccggtttttcttaaacggctccggttcggactcacaatatactcatgcttaaaaatatgggttccgttccggttcctgtccaaaaaaaaaacggaaccgttccggttttcggtccataacgattccggtccgggtccttgatcacaaaaatgttttaacattatatgtaaaaaagtatgtagaatcacgtagtaagatggatacagcgatgtcttatttcagattagagatataaaagatcaaaatcgagattctccaatataaaacatagtctgtctctccctattattccaacttatatcaaaatgcaatcacaacaaatcttccacattttatgtaaaaaaagtacgtagaatggcatggtaagaaggatacagcgatattttattacaggttagagatataaaagaccaaaattgagataatttaaccttaaaacattgcctgtctctccctgctactccaacatatatgaaaatgcaatcacaacaaatcttccacattttatgtaaaaaagtacgtagaatggcatatagtaagaaggattcagcgatattttattacaggttagagatataaaagaccaaaattgagataattaaaccttaaaacattgcctgtctatccctgctactccaacttatatg<text:soft-page-break/>aaaatacaatcacaacaaatttcccacattatatgtaaaaaattacgtagaatggcatagtaagaaggatacagcgatattttattacaggttagagatataaaagaccaaaatcgagattattcaaccttaaaacattgcctgtctctccctgctactctaacttatatgaaaatgcaatcacaacaaatcttccacattatatgtaaaaaagtacgtagaatcgcatggtaagaagaatacatcgacgatatctcatttaagattagggatataaaataccaaattcgagattattcaaccttaaaacattgtctgtctctccctgctactccaacttatataaaaatgcaataataacaaatttttgacattatatgtaaaaaagtacgtagaatcgcatagtaagaaggatacatcgatatctcatttaagattaaggatataaaataccaaattcgagattattcaaccttaaaacattgtctgtctctccctgctactccatcttatatgcaaatgtaatcacaactaattttccacattatatgcaaaaaaagtacgtagaatcgcttagtaagaaggatacatcgatatctcatttaagattagggatataaaataccaaattcgagattattcaacctaaagacattgtctgtctctccctgctcctccatcttatatgaaaatgcaatcacaacaaatttttcacattacatgcaaaatggtaagtaaaattgcgtagtaagatggatacagcgatgtcttatttcaaattacgagtagagatataaaagaccaaaattgagattattcaatctaaaacatcatctgtctctccctattactccaacatatcaaaatgcaatcacaacaaatcttccacattctttgtaaaaaaaaagtacgtagaatggcatagtaagaaggatacagcgatattattacaggttagagatataaaagaccaaaatcgagattattcaaccctaaaacattgcctgtctctccctgctactccaacttatatgaaaatgcaatcacaacaaattttccacattatatgtaaaaaattacgtagaatcggatagtaagaaagatacatcgatatctcatttaagattagggatataaaataccaaattcgaggttattcaaccttaaaacattgtctgtctctccctgctactccaacttatttgaaaatgcaataacaacaagttttccacattatatgtaaaaaagtacgtagaatcgcatagtaagaaggatacatcgatatcttatttaagattagggatataaaataccaaattcgagattattcaaccttaaaacattgtctgtctctccctgctactccatcttatatgaaaatgcaatgacaactaattttccacattatatgtaaaaagttatatagaatcgcatagtaagatgaatacagcgatgtcttatttcaaattagagatataaaagaccaaaatcgagattcttcaatctaaaacatcgtctgtctctccctgttatttcaacttatatcaaaataatttcacaacaaatcttccacatcttttgtaaaaataatacgtagaatggcatagtaagaaggttacagcgatattttattacaggttagagatataaaagaccaaaatcgagattattcaaccttaaaacattgcctgtctctccttgctactccaacttatatgaaaatgcaatcacaacaaatcttccacattatatgtaaaaaagtacgtagaatcgcatggtaagaagaatacatcgatatctcatttaagattagggatataaaataccaaattcgagattattcaaccttaaaacattgtctgtctctccctgctactccatcttatatgcaaatgcaatcacaacaaattttccacattatatgcaaaaaagtacgtagaatcgcttaataagaaggatatatcgatatctcatttaagattagggatataaaataccaaattcgagattattcaaccttaaaacattgcctgtctctccctgctactccaacttatatgaaaatgcaatcacaacaaatcttccacattatatgtaaaaaagtacgtagaatcgcatggtaagaagaatacatcgatatctcatttaagattagggatataaaataccaaattcgagattattcaaccttaaaacattgtctgtctctccccgctactccatcttatatgaaaatgcaatcacaactaattttccatattatatgtaaaaaggtacgtagaatcgcatagtaagatggatatagcgatgtcttatttcaaattagatatacaataaatattggaacagtgaattaggttaattaggaattaagttaccagttgtcaaccgtcaattaacaagtcaaatttttaaatttcaaagttaaaacccccacttattattaagtcagtcgatctgtataaaaggttattctcaaataagggtatatctgtttaagaatgataagttgttgattaatggatattacaacaaaaatttttgttcccatataaattaataaattctaaattctaaacaataaattgcaagttaaggtcaatcctgtagaaattgatagctacccgatgtaattttgtaaaaggcacgagtagctacgcatttgggtagacaaattttgtttatatatagtaggtacttattatatactcgcgaagtgggtcatgataaggctaaaagatattattgcgaaatctgaaagggtcaaacatccagaaaacattttatttattattttgacaaaataaaacatagactggaattatttcatgtgttaaaataaaaaatacgatttgtgtagtatttttgctggttcagaaataattgctaatagaagattcaatattttctgtgataccctatatacatataaatacatatgtaaataacttctttcaaatgacatcattataacggaatgaatatttgaaattaattacgaacatcataaatattagacacaattaaacgtctgtaatattaatagctttataatcattcctctaatgtcttttaaatgcaatgtatttttcaaatgtattgatactagatatatttgtatatatgcccatttaaaatttgatccagtatcttaatataaattgttgttgatattgctaagctctttacagaggagttcggaagtcaaatgattaggaaatttctaaaaaaatattgtctgctgatcggaaaattgcacttactgcatttttagatataaacgttatgtataagaagtttaaaaattattttggcgattataagtgttaagtaagtgtacgttgaacagtgttatctaagcaataatattaatataatccatcatatcaacagagaagagaattgtaagtaaataattttaagttaattaattgtttaagtttgtgcctctgatactggttctttgtaaatagtttccaaactttttatgataaaataatgaaattttatacgtttaatgaagtttttattctcaattcaaaaatgtaaagatgattctaaaattttattcgggggcgtaacaatcggtggggctaggggtgtttagagccttaactttttcgccagtagtatttttcacaatttaactacagaaattaaaaatgtgaagttttctatctaaaaatagaactcttgtctaacttcgataaaatgcatggttttcgagataaattgatctgaagaatcttttgcatgtcatcatttggtttttaaattcatacttttttacatttccgcatagtagactattattgacagttaattagattattttcattattttatcataaaaattttggaaactatttacaaagtaccagtatcagaggctcgtcttcaaagggctgtagctcccataggagccatttctggacccatgtttatatgaatttttgttactatttttggtcatagaaactgctgttaaaatccttctagttaatttcgggacaccctgtatatagattattaaaatgcgattagaaaatacattgtaccaatttttgtaccaatttatcttttaatatctcaaaagtcctttagctgatttaattaaaagttggcaggtttatttataataataggagcgatttataataataggagcaatccttgagttctatagttctttctggtttcgttttcgtaaacaaaaaaatgtaaagcaaggtttatttccgatagacgtattttttttcttcaatgtcacttgtttttctccgatcatggttttgtttttaacgacatgtttttctgtcgactatgtctttaatgccgacacgttttttttcctggcgccttgtttttttctttaattaaagttaacgaaattttgccatttttcagtttcctttatattttatgaaatttgttagtcttcctatggttaagtagtccatatggaattttcttttttttgcaagaatcccccgcgttaaaaaaatatcgtctatttcaattttacaatttacaatttttcccaatgtaatgacctgtatagattaaaaattatgaattcaacagcacctat<text:soft-page-break/>aaattcacaaagaaggtaatcctataagactcgtatgtagtatcttatattaatgctccatcttataaattgtgtaaagaattaaagttcattctaccggggttaaccaatttcaaatcgaaatatgcgatgaaaaactcatttgaatttattaaaaatacagaaaatctaatactacagaataattaaagtttattcacatcaattccaataaaagaattaatgtcacttttagataatctaattgatatttctcagatcactataaaagaaaaaatagagttaaagaacctagtaaaagcttgtattcaacaaaattattatcgttttaatggtgaattttatagacaaaaagacggcttacctatgggttgagggttctcccatatctccttagctgaaatctttatggccaatctacaaaatttaattttcaatagtaataactatctaacaacccatgttttctattgggctcgttatgtaaatgatattttttgcatctggactggtactgaaagaaatttaagtaatttccttaacttaaattcatttaactttaaaatccagttcacaatgggatttgaggataataaccaattaaatttttttagatattaacattagaaaatccaatagtcacctaaaatttaacgtttatcgcaaacctactccacagacacggtcatacattataattcacatcaatcttggcaaatcaaactttcaccctttcatagtttaatccacaggcttacaaacttcccgttggacgaagccgccttcatgaaggaatttaataaaacaaattgcaaaaaatgatggatataacgagtcctaatagataaaatggtcaaaaacaaacagcgaaaaatgccccagagaattttttactgttccgaagaaaaatgtaaaatataatttcatcgattatgttccaaaatatagtgacaaaatttcaaacaaattaagtaatttagggacgcatacagttaccgtaaataaaacaaatttaggaaaaatcatgataaacaataaagaaaaaacaaataaacttgatacatgtggtgtatatgaaatcaaacgcaaagattgtaatgctgtttatattggtcaaagtggtagaagcatagataataggataaaagaacatacaaaatcaatattatataataacaaaacttaggtaattgtaaacagattaggaattatataggttgtataaatattaagacgggtatccaccaaagcaacattcaggaacatttatgttgctgttacatgtttccttgttacatgttttccaaaaatagtttttgtggaaaagtggaaaattggaagtggaaaattttgaaaacgtgtaacagaaacacaaatgttccttaatgttgctttggtgcatacccgtctttagagtaagtaccttttaattttagtattcattctgtaatactcttgataaaggcctaataagccgaaacacgtgtagagtgtatgtaatacatttttggaaacattaaaaagcattatttttcttaaaataattatttacaagatctttcacaagcaaccaaccacaaattcagttcagtgtatcttttatatgaaattagttttatttttaagaggctatcatacaatagtatagacaccctatatgctgtacatgtttatgatttttaggacatataaaaatgcaaatacaatcgaaattattaatttggaatttcgcgaatgtttaaaaatatctcttttgttttttgtagctttgactttattgaattttgtgccataaagtagctttatatatatttttttcagcagacgaccactttccatttgccccagatgtagaactgcgagaaaaaaactacatttagttaagcgtaaaggcaaaaattgcaatggtcatactttctaaacgtaaccatcttgttgctgaggaaaacatggaaaaagcagagcttttagtaaggccacgccgaaccaccagtgaagacgatgaggaccaccgagaaaaattgaatagtgacctcatactcactatgaggtcgaaattatcggaaaatcagatcaaacaaaacatagatgccttgttaaaagctggtgcaaatatcaacgcgcaaaacctcagaggaaagaccgcccttcacctggccatagaaaaaggttacgtcgaagttgtgaagtttcttataagtaataaagcagcgacgaatatagcagatcgagatggggtaacagcatcagacttgggaaaaagaagttccattaaagacctagtggatatcttcagcgctggaagcagcagtggtaaaagaaagaacgacgatgacgacgacgattccaacaaaaaaaataaatctgacgacaagggcgacaacagtggcaaaagaaaactagacgatccagacgaagtggaaaggaaacggagaaagctcttagacaacatggaaatacctagcggaggttcaaagtccgcacagcacggaaacattttccagttaaagatgttgatgttatatctagcgcgtggtatcgtggagaaatatccccaatttcgtttggccacagagctagatgaagccggaaaattcgacgacgtcgtctttcagcacttgaaggataacgtctggttgctacgtctgattcaagccaaacataaagaaggagaaaccgctgatagtccgttacaaaaaattaatgaacccaatttactatcattagacgagaaggaggaattcggtatcccaaaatattttaattctcaccttgaaattttgcaaagaattttagagaattctatatattccgtttttacaaagagcgaagtagaagacattttattagtcactaacacggatttcagtaatgataagataagagattattttgtattagattcagcatacgatatagacaaagaccctctacttaaggtggataaaaagaaaaacccacaatggaaaaatgccgacgtatacaaaataaaaaaccccaataacaatccgttggtttcgaagttaaaaccgatatttgaagtcaactctcaattctacaaactagttgaggaagtaactgaatgcgtacaacaaggtaaacaactagaaaaaactggaattatcaagaattattactacccgttaattaaagaagtttttgacattaaagctgttccaaaacaaggtggtgccgaatatcacctcgaatttaagtcggattttttaactggtgataaaatttctgaagctgcgaagaaattcagagacggcataattagagaaactgccttcgataaaagaagagatgaaatatctacttctgcggatttcggacaaggtaaattgtcaggctcagatattgagttagtcgcaaagaaactgggcgagtgtgtcgtaaagaagaagccattaaccaccgcagattttggtagtactcagataacgataatgaacgatattatcaatcggcaaacaaataaattccgcaccaaatttatgagtggaaaaacagacgatgcaaacttgaagaagcttagagaccaactaaaatccgagatcattaaacaaggaggtaaacaaataacgctaaaagacatggaagggatcgagtttaccatatccccagatttcggcgttagtaccttaccagaagatccggtgaaacttaagaagttagcagaggctctagcgggagcgataaagaataaggcagaagtgaaaccgtcgctaagtatagaatttcaagcatatcacattcccttggcaaacgaagttattagcaaggatgagaaaatatttcaggagtcttttgtgaacggcaaaattggaaagggggcaacggcaaagcctcttccaccgataactaaacagtttagaaacatgttactaaacgagctagtacctatcgataacgttaacatagaatatgttaaaaacgctaaaataaagattaccaaaggatttgcggaggattttagaccaacaggagatttcaagatcgaaaacgtagcaaaattctctaaggaactggagactcttttatcgaaaagtacaaataacgtagtagaagttaacgataaaactgtggataaaacatttgaggctaactttcaaaaaattgcaggctacgtgctcacaacaaaattcaagaaaatcagatttagtagtttttttctgggttctaacacattaccaggcaacttcatggaccttaaaagagctttagaaaccaaccttggtaagactaaatttgagtccctcttcaactacgagtttgacgttaaaggcattaaattcaaaacctgcgaagatggagctttattcagaaatctaccagtcctccacaacgagaataacattcaagacttcttcgataaattcaagttggtcgtcaattacccaaacagaaaagaact<text:soft-page-break/>cagcaatttagtggtgggagagttacagaatatttttaaagacttagacagtagagaaactcactcgctctatctagaaactatgcacgactggatggcagatagaatgggaacttttctcacgccgagcaaggcgtccgcactttttcaggatgtgacgcaacatctcaaatttagggaaatggaaggcatcaccaacttttatctcgatcgtttattctctgactatgaatttacaaagaatcacgaccctatcgttaattttttacaaggtaaacaaaaacaggtcctccatctgattaccgacaatgtgaaattaagctcagttaaaatggcccaaatattaatggacataaaacagaaaccagaattagcaaatataaaagagtacgtgtggggtctcggactaatttttatatcgttagatcaactatcacataaaaaatcgtatataactgaagatgttctaaattgcttccgtgatgaaactagaacaaatctgttagtgcttcctagtaataataaacaaaatgatcttcaagggttatcttccgacatcttgtctataattgaaaataatcctaaaaagaaaattattctaattacaaaacaaggcaacgaattggcaaacattatatcagaagcgggcactattaaaagccaaaataagtatttaagacaagacgacaaaaattctttgaaagatttaacgacagaatcgcagaagagattattagatttagaggtaaactttcaaggcagaaaagttaaactgagccaaataacaggtggagatgaaagtttaaaagagctgattagtaacaagattttgtatgagattatggtcaataaagaaataagcatcggtagcgatctaagaagtttgggagacattggggaatactacattcctcgaacgtttatcgaagaggtacaaatagagaaaaggatattatataaaagtttaccagattttttcgttgtccatgatcttgacggaaagctggctacggacaaagacaataatatctttgtctttgacaaaatggacaaagctgaacagaagttttacgcaatacatgaggacacgaccaaaccgaacgccgatatacatttgcttaagctggaatcgggaaaactgatttggcaacgatctctcggctctaaatccagtttgttgcaatacagaatcttaacgaatagagctgcagttttaaatgaaaatcagctgatagaaagcgagggagacagaacaatgataatatccgacaagccaggaatgggaaaatcaacggtactcatcgacttaggtctgaaattacaagaaaaatatcctggtctgtgggtcatgaggattaatttgctcgattatgtcgaccaattaaagaatataaaaaaagttaataaccttgaagaagccatggacttattagtggacaccttgtcgaatgtgaaggatccgcaactaagaaacaatctagaaaaatctctttttgaacgtagtttcgccaatgaaggtaaaatagctttgctatttgatggatttgacgaaatcagtccacactacaaggcagtagtggttcaactgcttcaacaattaaataaatctaaagttaaaaagcacttcatcacaaccaggcttaatatgagggaagatttggaagaaagtttaggcacattttcgcgtatgctcgagccattcaacaagcacaaccagaaagaatttttgactagatactggcagagtaaattacaactaagcccagagcaattagaaacatatgttaataaagcaatcagcgatttatttattatcaataccacaaaggaagatttcactggagtgcctttacaaatgaagatgatagcggagtattttcaatcgactattcaggaaggacgggaatttccaacaacgttaagactcgctgatctctatgaagggtttatcaagcaaaaatatgagatctttactagagaaaaagaaaggaaagaactagaaaaccctgcattggctcgaggagaagagattctgtacgaaacctatctgaaggaacacaaacagatggctttatatgcactcttcaatgaaaaagatttagaagtgttaatttcaaagggatatatggagaaaattaacaagctaatgggaaccatacaaaaataccacgaaagaagagggcttatcagtaatatcgtcaatgacaaacctcatttcattcaccgaactatagcagagtattttgctgcacaatatttcttggacgaactaatcaatcagcgtaagccacaggtacagacgtttatactaacggaaatactagtccagagggattataaaataattcgcgcttttctgaatgaacaattgaaagtggattatagcgccgtattaggcaatgaattaaatacgttgtggaactcggagaatcgcttgagtagcctttataatgtttacaaggagaatctgttacacgtatcggctgaagagggcaacaacaaaattttatctttaatcttgaacagtcttaaagaccaccaacaaacacaacgtgaattattggtctcgaaagataataacggtttacctgcagctcaaacggctgctgtatatgaccaaagggaaaccttggagatgttccgaaatgtctatggtttctatggtgagttgaagatcgaagaactgaggtcgcagctatttgagcaattaaaaggtgatttcaacgaagcccagaaagcaagagaaaaactacaactcatggccagttggtgcctaccgaagtttacgtacccaggtagtagaagacgaagaaatggagaaaaatgctcgttctcatggtgggatgttgataaaatatccgacacgcagactagagacatagaagacgtacgcatcgacagcgaaaaattcctagaatacacgaaagggatcactagtgataccaaaaataagcaactactagaactggtgcaacacattaaaagcgtcgatgctgacaggataataggaaggcaaaaatatctcctggatcaagtcatagcggacgatgggtttagaaacttcgtacaaaaagaacgtatcaatgaacttgcaggcaatacaattcgagagtctgctagcaaaatgagtcccgtactcaaaaataggttgttgaacgcagctggaaaagtccacatgacgatgaacatctatggagtatacagtaccattatgacatgcaaagaaggcctagcgacaagctgcgcgctcagccttggtggtatcgggtactccgtcatctcacagcccatcgaaagcgcccttataaaaattaccccgcgagtggtctcccaagcagggcaagtcggttccaaaattatacctaaaattttggggcacgacacgaaattcctaataaaatacggagggttaaagtacggcaccaaggtaataaagggagtaggggggctattaggtggagtattcgatattgtggacgctgccatctccacaaaggccctcatcgattgcgacaagcggaaaaataccaacaaaccttgcggcgagaaggaaataagagataacatagctggtataagctttgctgccatatctttcgttactggaatagccttattgtttgctggatccactttcggacttagcgtggctgtaggctttgtaataatgacggcatctatcatctatagcggaataagcaacatcatagaatacgaaaaaaagtacgacactaccggttgggaaaacttccggatcttctggcattccgttgccttacaaccgatgccggaagatgtagttcatttggcagccagatcggactacgtgaatagtataacgcagcaggcagctgatgagttgcgaaatatgaccgagaattttgtgggatacgcgtttggattggggaaaataatcgtcaatggagctgacgcgagatttgaaagagcgcgatctttcatcgacctggccaaaccgaatataaaacgtttcagtctgtctagagtccaaccgaaacatatcgacgacttccagcctatttgcttaccaagaaaaacagaaagtaactacgagtacaacagcgaaagttacgattcgcataagagcgaatattattgtgaaaatggagtaactttaatgatggaagatagattagtaagaaaagtaaaaaatcctactattttctatgatttcacgcatatagacagtggttacgtagctggaaactcttcagtttcaaacatattttatctaaaagaaggcaatcccgtagtacgtggaggggaatacacagccaacaactttattatcgcggaaaatacattctccggtgccattcaaactgactggaattcgac<text:soft-page-break/>gaatatcatcaacgtcagccaattgcacaatcaaagggtttcgctatcctggcgaaatcaacaacctatgtacacctacttggtcatgagatggagctcgcttgcaggatcagacgaaaaaatagtgaacatacaaaaattccaaagagaatccgtcataagttacaaaggaggtgataaaacacttgacaatatacattgcaccatgaaggacgtctacatggaccacaatctgttggtcgatgcaggagggggcttggacgaccacaaccgggactatttagttgggtgtactgacgcagtaatttggccaaatacatatgtagaggcccaggaaggtaaatatacctactatatcaaaactgaggggtataaagcgaagaaggcttcgtccaaaatcgatgttgtaggagaaggtaagattgtgtttccagaattatttctattgaaagactgcaaggagatcgcctactcttcgagtgataataccctttcgtttaccatgccattagatgaagaaggtacttttacgctataccttaaaaattatctgaaggaagataaatctcccaactttattttggtagataaattgggcagctatatcgttcccaaaatatttgataataaagcaacattggacatgttcgagatgtacgcagtttattccgataccaacgaattatctgctgctgtcgaccactacgacaagcttcttgtctctataatgtccgcgaaaaactacaaagtatttgggctagtgaaatttataacgggaaaagaattaaaaaaggcaatgtttggttcttatgatggagatattttcgtacttgatgataataccatttacgctaggggtaattcgggatcggacgcctatatcgtcaatgacgaagccacgtgggatagctacgatatagataattatgctaaagatttaaaactggatgttttgggaatcttcttcaaagcagaattcgatttggctaaggttaacgaaagggatctaaggttgaacgtgaaggacctgactagagggggaaacaaatacatcgacgtgctaaggtacttttccggtgaagaatatcggcatttgatggtagttgatcaggaaggtaccagctacatccctttccattccgaagaaactttacaattggttccattttaccacgcgagcgacaagaagaacgtttttatcgtaactaacgccacaagagctgtcatcgattgtaattttgataatatgtctttctataatagagacgatagtctccttatttcatccaaaaaattgaccgatacgagtggtcctttgagtgtgatcttaaaattctattattccgaaaatgacaaatggaagaacgtggaattgtattcttacaacaaaggtagctaccaaaaaattgacttgaataaaataaatttaagtggtgctagcaccgacgatgtttacagtcaaattataaaggagtacgtcgttgattttggaaggaaatcgacggaaattgctcataaccaaaatggcgaagagtcaatatacggagaaaaagaaaaaattggcgtcctcatattcaaggatatcaaaccccaacacctcgaagtagtacgaagtaataacgatgtaacatttaaagacaaagaaaccgcagacgaagttgtaataaaaaactggtataagagccacaaatatgctatgtctgtaatagaattcgattatggtttaggtttagaaccgataagaatcttcttgtttgatcaaaatatagacttaaaacagaaacttaacgacgctgtggagctggaaagtatcctcatatctgtaggtgacgatgtacacaaaatgctgaaatgtactttagccataaattccttgcaagtaaccgattcttacagggctttaggattcactcagttccagcaagctgctactttcataaggaattgcgattttccccaattcaagctccaacatttaagaggcataaagatatttttaccagaatattacctccaagtatataccttgaaaatacaactagagggacacgattccaacaccagcaaggggtatcgtgacataatatcggatcattttagcgacgtgctaggtgctgttaatgctagaattaaaattgatatcattttggatgacgaaatacgcgaattggatgtggaaacgcaaaaagctgtagaatactttttaataacaagttgttcttcttacgttggtagtaatgtattgtctgaaacgctaaaattgaagccatctctcaaagccttcctcgaaccaaagttgtttatcaaaacaatgttgctgtttatagccaagtcatacaacgatttcttatttaagtatccacgagtcgagaaaaatactaccgtggatatcgactatgataatcttaaattattagatatcacgatagttgaccgtccaaaaaataatgagatgaacaatgacgcgtttgctaattgcaaggcatttatcgaggaaaaaatcgagaagatcacagaagctctagctacggaccgtttcaagactttgttacagggctgggacaagaactttaaagcagacctgctaaagctcgttacaatcagcgaagaagacgttccctttacagttataaaagttgaatacaagaagaaaaatagagataatagctcaagtactgaaaatcttcatcgagaagaacgacatgcaccatttgatgaacttattgaagagattgacgaagtaatcgagcttccaataaggagtggagcgagtagttgcatgcaatattctctgataaacaatgtttttaaatatttgaatccggtcaattggttttccaaaagtattggtggttcagtaatggcatcaagcgttataagaaacaatcatatagaagactctgggttcatttcaagtgaccaatataagtggtttgatttgaataaagacactacgaatttctacagtgattcaaacgaaattccttcaagtaatgcatcaacaaatacgtttgaattttcctcgtacaatctcaatagtacattgctcttgatggatgtcttgacaagaaaatatacaagagaatcgtacctcaaagacagcaaatattatgactatcaaaagcaaatccagaaagatgaagctaattgtttggcttacaattattatcaataaatgtaaaggttgtttgaaagtagttgttatgttatataaaaatgtatatctatttcataaaataattataagtttaattaataatagggaagattttgatgttacttattatgttacttatttgtagatttatgttctttgtattgtttcagataccttttaagttgaatgcaattataaaatatatttaccattattttaaataatacactgcaaaatatatagtaacatgtggtctgttttgagatgatacttacatttaataaaacattttctaaatactttatccatcctggcatttttaattcaacaaactatgtttatcaaaatgtatatataatctaagttttcgtaacatcttagtaattagccgaggaagtgtaaatagccgtgtaagtgttgcagttttcaacattgcaaaataatcaaaaaaatgctttgataacctagaactatattcttacaacaaagagaaatttgaaataattctagcaacacaaatgaaaagtcctaaagaagtcctaaagaacttcaaattaattaagttacagggccgtagctagagggcggcgattttttccccgccctataaaattagcccttagctaaagccattagcgttagaacataatttatgaatttcattatagaaaaaatattttgctctttcacttgcccgccccaaaaatcggtcctagctacggtcctatgaagttataacaaaaaattagcaccaaatgaaattcctttaagtgatgctttaacaaatgtgcttgatttttcttcgtataatgtcaatagtatcttactgttgatggacgtattgacgagaaaatattgtacgtaaaaacggagaaatattatgactatcaacagcgaattcgaagagacgaaggcaattgacagcttacaattattattatcaagagatataaaactggatagataagttaagtgtaataagataagttaacatatgtagaatgtagacgttctagttaatattttgcatgtaaataaatactaattatatagatataattaggtataaggtatttagtataatacctaattacctattggctgttaacaaacttattacaataaaatcatttcttatttctaggcgtaaaaaccgtgtcaacgtaaaacttgttttgatttaaggtgagttctcacaacgactttttgcttcctgcgtcccgcgtcgtcagtttctgattggcgcaagaagtcaaaaatatttgaattcgccaatcagaaattgactgatggcgcgtcggccaataaaaa<text:soft-page-break/>attgacgacgcggggacgcaggaagcaaaaagtcgttgtgaaaactcacctttactttacttgactttttccagtggtagtgtaaaagattggaagaggggataatgcaaacattaagatccaatgcagtatgtagagtcaacgcaacataaaggtttccactcgtatacgaattagattttttattccgaataattacactatatatgtatatacctacaggaacaaatttttttcatgcgtattttatttatttattatcacgtgataacagggttattacgcaagaatgcacaccccccccctaactttttattgtgcgacctagaaaaaaactgtaaatacgaattttttttgtaggctgcataataattcagcctcctccatccctagttttccatcctagcagtttcagcaattctaatattactactattaccagaacaaaaaacgaaaaaaaaaaccgtaaaataccggtttatcttaaacggctccggttcggactcacaatatactcatgcttaaaatatgggttccgttccggttcctgttcagaaaaaaaaaacggatccattccggttttcggtctataataacgattccggtccgggtccttcacaacaaatttcctatatctcatttaagattaggaatataaaataccaaatttgagattattcaactttaaaacattgtctgtctctccctgctactccaacttatatgaaaaaacaatcacaacaaattttccacattatatgtaagaaagtacgtagaatccgatagtaagaaggatacatcgatatctcatttaagattagggatataaaataccaaattcgagattattcaaccttaaaacattattgtctgtctctccctgctactccaacttatttgaaaatgcaatcacaacaaatttttgacattctatgaaaaaaaaagtacgtagaatcccgtagtaagatgtatacagcgatattttattacaggttagagatataaaagaccaaaatcgagattattcaaccttaaaacattgtctgtctctccctgctactccaacttatatgaaaatgcaatctcaacaaatttcccatattatatgtaaaaaggtacgtagaatcgcgtagtaaggtggatacagcggtatcttatttcagattagagatatcaaagatcaaaatcgattcttcattctaaaacagcgactgtttctccctgttattccaacttatatcaaaatgcaatcacaacaaatcttccacattttctgtaaaaaaaagtacgtagaatggcatagtaagaatgatacagcgatattttattataggttagagatataaaagaccaaaatcgagattattcaagcttaaaacattgattgtctctcactgctactccaacttatatgaaaatgcaatcacaacaaattttccacattatatgtaaaaaagtacgtagaatcgcatagtaagaaggacatcgatgcctcatttaagattagggatataaaataccaaattcgagattattcaaccttaaaacattgtctgtctctccctactactccaacttatttgaaaatgcaataacaacaagttttccacattatatgtaaaaagtacgtagaatcgcatagtaagaaggatacatcgatatctcatttaagattggggatataaaataccaaattcaagattattcaaccttaaaacattgtctgcctctccctgctactccaatttatatgaaaatgcaatcaaaacaagtcttccacattatatatgaaaaaagtacgtagaatcgtgtagtaagatggatacatcgatgtcttatttcaaattagagatataaaagaccaaaatcgagattactcgaccttaaaagcctgtctctccctgctactccaactaatatgaaaatgcaatcacaacaaattttccacattatatgtaaaaaagtacgtagtatcgcgaaataagatgaatacagcgatattttatttcagattagagatgtaaaagatcaaaatcgagattattcaaccttaaaacattgtctgtgtctccctgccactccaacttatatgaaaatataatcacaacaaattttccacgttatatgtaaacaagtacgtagaatcgcatagtaagatggatacatcgatatctcatttaagattagggatataaaataccaaatccgagattattcaaccttaaaacattgtctgtctctccctgctactccaacttatatgaaaatgcaattacaacaaatttcccacattatatgtaaaaaggtacgtagaatcgcgtagtaagatggaaacagcgatatcttatttcagattagagatatcaaagatcaaaatcgagattattcaatctaaaacatcgtctgtctctccctgttattccaacttatatcaaaatgcaatcacaacaaatcttccacattttctgtaaaaaaaagtacgtagaatggcatagtaagaaggatacagcgatattatattacaggttggagatataaaagaccaaaatcgagattattcaaccttaaaacattgcctgtctctccctgctacttcaacttatatgaaaatgcaatcacaacaaattttccatattatatgtaaaaacgtacgtagaatcgcatagtgagaaggatatatcgatatctcatttaagattagggatacaaaataccaaattcgagattattcaactttaaaacatcgtctgtctctccctactactccaacatatttgaaaatgcaataacaacaagttttccacattatatgaaaaaaagtacgtagaatcgcatagtaaggaggatacatcgatatctcatctaagattagggatataaaataccaaatccgagattattcaaccttaaaacattgcctgtctctccctgctacttcaacttatatgaaaatgcaatcacaataaattttccacattatatgtaaaagagtaagtagaatcgcatagtgagaagcatatatcgatatctcatttaagattagggatatataataccaaattcgagattattcaactttaaaacattgtctgtctctccctactactccaacttatttgaaaatgcaataacaacaagtttttcacattatatgaaaaaaagtacgtaaaatcgcatagtaagaaggatacatcgatatctcatctcagattagggatataaaataccaaattcgggtttattcaaccttaaaacattgcaataagattataactgtctcttcctgctactccaacttatatgaaaatgcaatcactacaaatttttgacattatatgtaaaaaattacgtagaatcgcgtagtaagatggatacagagaagtcttattgcaaattagagatataaaagaccaaaatcgaaattcttcaatctaaaacatcgtttgtctctctctgttattcctacttatatcaaaatgcaatcacaacacatcttctaaattatatgtaaacaagtacgtagaatcgcatagtaagaatgatacatcgatatcccttttaagattagggatataaattaccaaaatcgggattattcaaccttaaaacattgcctgtctgtccctgctactccaacttatatgaaaatgaaatcacaaccaattttccacattatatgcaaaaaagtacgtagaattgcatagtaagaaggatacatcgatatctcatttaagattagggatataaaatatcaaattcgagattattcaaccttaagacattgtctgtctctccctgcaactccaacttatatgaaaatgcaataacaacaagttttccacattatatgtaaaaaaggacgtagaatcgcatagtacgaaggatacatctatatctcatttaagattagggatataaaataccaaattcgagattattcaaccttagaacattgtctgtctctccctgctactccaacttatatgaaaatgcaatcacaacaaattttccacattatatgtaaaaaagtaagtagaatggaatagtaggaaggatatatcgatatctcatttaagattagggatataaaatatcaaattcgagattattcaaccttaaaacattgcctgtctctccctgctactccaacttatatgaaaatgcgcacaacaacaagttttccacattatatgcaaaatagtacgtagaatcgcatagtatgaaggatacatcgatatctcatttaagattagtaatataaattaccaaattcgagattattcaaccttaagacattgtctgcctctccctgctactccaacttatatgaaaatgcaataacaacaagttttccacattatatgtaaaaaagtacgtagaatcgcatagtacgaaggatacatctatatctcatttaagattagggatatagaataccaaattcgagattattcaaccttaaaacattgtctgtctctcccagctactccaactt<text:soft-page-break/>atatgaaaatgcaataacaactagttttccacattatatgtaaaaaagtacgtagaatcgcatagtatgaaggatacatctatatctcatttaagattagggatataaaataccaaattcgagattattcaaccttaaagcattgtctgtctctccctgctactccaacttatatgaaaatgcaatcacaacaagttttccacattatatgtagaaaagtacgtagaatcgcatagttagaaggatacatcaatatctcatttaatattagggatataaagtacaaaattcgagattatccaaccttgcaacatttgcaactagtaaagagcgataattgaccaaaatttcaaatggattggagtttttatgagaagaaaatacgtgccgcgccgttaaaaaaagaacacactgtatctcgtcaacgggtacagataggttcctaaaaatttacacacaatggttatttttggtgataaaaaataatctgctattggattctttccatttatatccctaatattagttcttgaaaaaagtgaccctctaaattgccctagaaaacacgcctatggagtaattatttagccaatttaccaaattgtgcaactagtaagggattattcaatattttatttattattttgacaaaataaaacatagactgaaattatttcatgtgttaaaataaaaaatacgatttgtgtagtatttttgcttgtttcagaaataattgctaatagaagattcaagattttctgtgataccctatatacatgtgtaaataacttctttcaaatgacatcataataacgaaatgaatatttgaaattaattacgaacatcataaatattagacacgtatattccttcactcaacgacacaattaaacgtctgtaatattaatagctttataatcatttatctaatgtcttttaaatgcaatgtatttattaaatatattgatactagatatatttgtatatctgcccatttaaaatttgatccagtatcttaatataaattgttgttgatattgctaatctctttacagaggagttcggaagtcaaatgattaggaaatttctaaaaaaatattgtctgctgatcggagaattgcacttactgcatttttagatataaacgttatgtataagaagtttaaatattattttggcgaatataagcgttaattaagtgtacgttgaacagtgttatctaagcaataatattaatataacccatcatatcaacagagaagagaagttaattgtaagtaaatatacgttctttaatatcatgtttgttagttcaagtgtatatcgatttacctaaaaaggggatctaaacgaatttaaaaaaataccgtttttgaaaaaataaaaatatgtcgtgtaattctcaaaatttgaaatttatagattattaaaatgtgattagaaagtatgtacagtgcgttcattttaagtgtgaacggttttaaacggttattacgaggttattattaaagacagaacgatgggacaaacgtcacgtgagaggattagaaatacagttctttattcaataaagagaaaaaacaaatgacgcctgttttggaaagtattaatattagggatgtttttttaatgaaacgcgctatatacttttgcatcatttaatgacgcattctttctgaatatgatgtgtctaaagtggtagtttggatgaatagttcccttaatatagcctaaaaaactgttaaaattgtagaaattggttacaaaagttatattactgaaagacagccatgacttcaaaacaatatcattttgacaggtttaagcgtcaatatcaacgataatattattcaggttagttaatatgattgttacgtatattttgttacatattttttgtaaaaaagtacgtagaaaatagaaaaaggatacagcgatattttgtaccaatttatcttttaatatctaataaaagtcctttagctgatttaattgaaagttggcaggtttatttataataacaggaacaatcttttgtgtatttaatcaacttatttatcctagggacgattcaggaaggtttttatttattattaatgaaaaaagaaaagtgcgtcactactttttaatagtgtttcaccaagatcgagatgtcgagaagtcttgtcttgatcttgtctcgatttcgagaaaaaatcaagacaagagtttgatttcaaatatcgagacaagacaagagtcaggttgtcgagaacaagacgagacaagagtcaagtcatcgagaatcaagacttctcgattattaatttgcatagtaatattgttgaaaaatagagataaataaatatacaaggtgagtcgtgaggaactttacagacttctaccacatatagagtccattgagtggaatatcaaatggccattaaaaagtttaagatccctttttttattgatatacagagtgatttatcgattttgaccaaaacttcttttggctgccgcttttaaacggtaaattcaaattttgtcatattttggtaaaactataaactaatgtctagcatcactgtgacgtattcaaaatttagatatttcaggactggcgttagcaaagttcatcagtatgtccatacagaaaaaaacaccctgtatacgggtgttttcaaattttaatgccggttatttaaagagtacaaatgaacaaataaataatgccatacgaaatttttgtcaaaatcgataaatcactctgtatatcaataaaaaaagggatctgaaactttttaatggccatttgatattccactcaatggactctacatgtggtagaagtttgtaaagttcctcacgactcaccctgtatatatataatgtccaatatagaagatccaagacattttattaatttaagttaatttcatagtagtcggtgaatttcgccttttttgttaataccttgtcgtcgcttgccgaatcttccaaggtcggtaaaaaacgtttctgacaaatgttgcgcgaatccggtgcatcacttgttattatttcagtcttaaccttgccgcgacttggaaacttcccatataaaatacattgtggattttaagagggcgttgccatctatggataaaatccataatgtaccctaggttgtccaactagggaagaagctatagtgtttatcgagaccaagaagtatcgagactctcgatatcaagacaagaaattgatcaacgagaatcggtcaagacaagaagaaatacgtttcttgtctcgaaaatcaagactcttgaaaatcgagacaagaaatgacaacttctcgatcttggtgaaacactactttttaaaattaatttgcctttttttgttagggcaaataaaaatacattttttattttataatccttgagttctagtcttttctggtttcgttttcgaaaacaaaaaaatgtaaagcaaaatttatttccgatagacgtatttttttttcaatgtcatctgtttttctccgactatggttttgtttttaacggcgacatgtttttcggtcgactatgtttccttaatgccgccacggtttttcctcgtgccatgtttttttctttaatttaagttaacgaaattttgccatttttcagtttcctttatattttatgaaatttgttagtctttctatggttaagtagtcaatatggaattttcttttttttctgcaaaaatcccccgcgttaaaaaaatatcttttatttcaattttacaatttacaatttttcccaataatgacctgtatagattgaaatttatgaagccaacagcacctatactatatggtcgaaataatataaatcgaaatatgcaacgaaaatctcatttcaaataatcaattaaatttttttagatattaacattagaaaatcaaatagtcacttaaaatttgacgtttatcgcaaagctactccacagacacggtcatacattataattcacatcaatcttggcaaatcaaactttcacccttccatagtttaatccacagacttacaaacttcccgttggacaaagccgccttcatgaaggtatttaatacaataaaactaattgcaaaaaatgatgggtataacgagtccctaatagataaaatggtcaaaagcaaacagcgaaagatgctccaaagggaattttttactgttccgaagaaaaatgtaaaatataatttcatcaataattatgttccaaaatatagtgacaaaatttcaaacaaattaagtaatttagggacgcatacagttaccataaataaaacaaatttaggaaaaatcatggtaaacaataaagaaaaaacaaatgaacttaataaatctggtgtatatgaaatcaaatgcaaagattgtaatactgtttatattaggtacctttacacttgcactcttttcatgcgaacttatcaggtcgcgctaatcgttcgttctcagcgtcgggaaaagaacgtcccgttccaagtctagtcacaaaaattaccacgttcctatctcgcactattttccatttgatccgccacgacgagaagataatcctgtcagt<text:soft-page-break/>gtaaatcgaaaaccgtgtacttttccaagtgatttacgtggtgcgtggcattttagattttttaaaagttttgctgacattttttgagtcaaatgtacaaaattaaacaatttcttatttagaataagaaataataaattattttaaaatatattacacaccttatataataaattctaaaaactaataatctacaaaataaaaattttgtatacttatacgtcgttcaccaggataatcgcgagggaaaataatcaacaaaacttcacgccgccgccgagccgtcaggtctaatcctgcacgcattcattcaatattttcccgaaagcacgaattatatttagaccaacgttctttcgcgcacgatttgaacggggcgtgctaaacccaaaggaaagagtgcaagtgtaaaggtacctaataggtacctttacacttgcaaaggaaacacttgcaaaggaaagagtgcaagtgtaaaggtacctaataggtacctttacacttgcactctttcctttgggtttagcacgccccgttcaaatcgtgcgcgaaagaacgttggtctaaatatgaatcgtgctttcgggaaaatattgaatgaatgcgtgcaggattagacctgacggctcggcggcggcgtgaagttttgttgattattttccctcgcgattatcctggtgaacgacatagtatacaaaatttttattttgtagattattatagtttttagaatttattatataggtgtgtaatatatattaaaataatttattatttcttattctaaatgagaaattgtttaattttgtacatttgacttaaaaaatgtcagcaaaacttttaaaaaatctaaaatgccacgcgccacgtaaatcacttggaaaagtacgcggttttcgatttacactgacaggattatcttcccgtcgtggatcaaatggaaaataatgcgagataagaacgtggtaatttttgtgactagacttggaacgggacgttcttttcccgacgctgagaatgaacgattagcgcgacctgataagttcgcatgaaaagagtgcaagtgtaaaggtacctattggtcaaagtggtagaggcatagataataggaaaaaagaacaaaaaatcaatattatataacaaaaacactggaatgtcagtacattgcattgataatcattttatagacacaaaaaatattagactaaaccataatgaaagaaaaggcaaacgcctaaacctccttgaacaattagaaattaaaaaatctcttaaaaataaccctttgactacgaatgaccaacaaaaatttataaacacacggataatagataaattattaaaaattcccagttaaataaccagactaattagaaaattcccttaggtaattgtaaacagattaggaattatataggttgtataaatattagagtaagtaccttttaattttagtattcattctgtaatactcttgataaaggcctaataagcggaaacacgtgtagagtgtatgtaatacatttttggaaagattaaaaagcattgtttttcttaaaataattatttacagcatctttcacaaggaaccaaccacaaattcagttcagtgtatctcttatatgaagttaattttatttttaagcggctatcatacaataagtatagacaccctatatgctgtacatgtttatgatttttaggacatataaaaatgcaaatacagtcgaaattattaatttggaatttcgcgaatgtttaaaaaatctcttttgtcttttgtacctttgactttgttgaattttgaaccataaagtagctttatatgtattttttttcagcagacgaccactttccatttgccccagatgtagaactgcgaaaaaaaaaacaacatttaattaaccgtaaaagtaaaaattgcaatggtcacactttccaaaagtaatcatcttgctgaagaaaacatggcaaaagccgtgcttttattaaggccacgccgaaccaccagtgaagacgatgaggaccaccgagaaaaattaaatagtgacctcatactcactatgaggtcgaaattatcggaaaatcagatcaaacaaaacatagacgacttgttaaaagctggtgcaaatatcaacgctcaaaacctcagaggaaaaaccgtccttcacctggccatagaaaaaggttacgtcgaagttgtgaagtttcttataagtaataaagcagcgacgaatatagcagatcgagatggggt</text:p>
      <text:p text:style-name="P3"/>
      <text:p text:style-name="P3">&gt; OZ404621.1 VIRT-3394581:5'3' Frame 3, start_pos=2930</text:p>
      <text:p text:style-name="P3">MVILSKRNHLVAEENMEKAELLVRPRRTTSEDDEDHREKLNSDLILTMRS</text:p>
      <text:p text:style-name="P3">KLSENQIKQNIDALLKAGANINAQNLRGKTALHLAIEKGYVEVVKFLISN</text:p>
      <text:p text:style-name="P3">KAATNIADRDGVTASDLGKRSSIKDLVDIFSAGSSSGKRKNDDDDDDSNK</text:p>
      <text:p text:style-name="P3">KNKSDDKGDNSGKRKLDDPDEVERKRRKLLDNMEIPSGGSKSAQHGNIFQ</text:p>
      <text:p text:style-name="P3">LKMLMLYLARGIVEKYPQFRLATELDEAGKFDDVVFQHLKDNVWLLRLIQ</text:p>
      <text:p text:style-name="P3">AKHKEGETADSPLQKINEPNLLSLDEKEEFGIPKYFNSHLEILQRILENS</text:p>
      <text:p text:style-name="P3">IYSVFTKSEVEDILLVTNTDFSNDKIRDYFVLDSAYDIDKDPLLKVDKKK</text:p>
      <text:p text:style-name="P3">NPQWKNADVYKIKNPNNNPLVSKLKPIFEVNSQFYKLVEEVTECVQQGKQ</text:p>
      <text:p text:style-name="P3">LEKTGIIKNYYYPLIKEVFDIKAVPKQGGAEYHLEFKSDFLTGDKISEAA</text:p>
      <text:p text:style-name="P3">KKFRDGIIRETAFDKRRDEISTSADFGQGKLSGSDIELVAKKLGECVVKK</text:p>
      <text:p text:style-name="P3">KPLTTADFGSTQITIMNDIINRQTNKFRTKFMSGKTDDANLKKLRDQLKS</text:p>
      <text:p text:style-name="P3">EIIKQGGKQITLKDMEGIEFTISPDFGVSTLPEDPVKLKKLAEALAGAIK</text:p>
      <text:p text:style-name="P3">NKAEVKPSLSIEFQAYHIPLANEVISKDEKIFQESFVNGKIGKGATAKPL</text:p>
      <text:p text:style-name="P3">PPITKQFRNMLLNELVPIDNVNIEYVKNAKIKITKGFAEDFRPTGDFKIE</text:p>
      <text:p text:style-name="P3">NVAKFSKELETLLSKSTNNVVEVNDKTVDKTFEANFQKIAGYVLTTKFKK</text:p>
      <text:p text:style-name="P3">IRFSSFFLGSNTLPGNFMDLKRALETNLGKTKFESLFNYEFDVKGIKFKT</text:p>
      <text:p text:style-name="P3">CEDGALFRNLPVLHNENNIQDFFDKFKLVVNYPNRKELSNLVVGELQNIF</text:p>
      <text:p text:style-name="P3">KDLDSRETHSLYLETMHDWMADRMGTFLTPSKASALFQDVTQHLKFREME</text:p>
      <text:p text:style-name="P3">GITNFYLDRLFSDYEFTKNHDPIVNFLQGKQKQVLHLITDNVKLSSVKMA</text:p>
      <text:p text:style-name="P3">QILMDIKQKPELANIKEYVWGLGLIFISLDQLSHKKSYITEDVLNCFRDE</text:p>
      <text:p text:style-name="P3">TRTNLLVLPSNNKQNDLQGLSSDILSIIENNPKKKIILITKQGNELANII</text:p>
      <text:p text:style-name="P3">SEAGTIKSQNKYLRQDDKNSLKDLTTESQKRLLDLEVNFQGRKVKLSQIT</text:p>
      <text:p text:style-name="P3">GGDESLKELISNKILYEIMVNKEISIGSDLRSLGDIGEYYIPRTFIEEVQ</text:p>
      <text:p text:style-name="P3"><text:soft-page-break/>IEKRILYKSLPDFFVVHDLDGKLATDKDNNIFVFDKMDKAEQKFYAIHED</text:p>
      <text:p text:style-name="P3">TTKPNADIHLLKLESGKLIWQRSLGSKSSLLQYRILTNRAAVLNENQLIE</text:p>
      <text:p text:style-name="P3">SEGDRTMIISDKPGMGKSTVLIDLGLKLQEKYPGLWVMRINLLDYVDQLK</text:p>
      <text:p text:style-name="P3">NIKKVNNLEEAMDLLVDTLSNVKDPQLRNNLEKSLFERSFANEGKIALLF</text:p>
      <text:p text:style-name="P3">DGFDEISPHYKAVVVQLLQQLNKSKVKKHFITTRLNMREDLEESLGTFSR</text:p>
      <text:p text:style-name="P3">MLEPFNKHNQKEFLTRYWQSKLQLSPEQLETYVNKAISDLFIINTTKEDF</text:p>
      <text:p text:style-name="P3">TGVPLQMKMIAEYFQSTIQEGREFPTTLRLADLYEGFIKQKYEIFTREKE</text:p>
      <text:p text:style-name="P3">RKELENPALARGEEILYETYLKEHKQMALYALFNEKDLEVLISKGYMEKI</text:p>
      <text:p text:style-name="P3">NKLMGTIQKYHERRGLISNIVNDKPHFIHRTIAEYFAAQYFLDELINQRK</text:p>
      <text:p text:style-name="P3">PQVQTFILTEILVQRDYKIIRAFLNEQLKVDYSAVLGNELNTLWNSENRL</text:p>
      <text:p text:style-name="P3">SSLYNVYKENLLHVSAEEGNNKILSLILNSLKDHQQTQRELLVSKDNNGL</text:p>
      <text:p text:style-name="P3">PAAQTAAVYDQRETLEMFRNVYGFYGELKIEELRSQLFEQLKGDFNEAQK</text:p>
      <text:p text:style-name="P3">AREKLQLMASWCLPKFTYPGSRRRRNGEKCSFSWWDVDKISDTQTRDIED</text:p>
      <text:p text:style-name="P3">VRIDSEKFLEYTKGITSDTKNKQLLELVQHIKSVDADRIIGRQKYLLDQV</text:p>
      <text:p text:style-name="P3">IADDGFRNFVQKERINELAGNTIRESASKMSPVLKNRLLNAAGKVHMTMN</text:p>
      <text:p text:style-name="P3">IYGVYSTIMTCKEGLATSCALSLGGIGYSVISQPIESALIKITPRVVSQA</text:p>
      <text:p text:style-name="P3">GQVGSKIIPKILGHDTKFLIKYGGLKYGTKVIKGVGGLLGGVFDIVDAAI</text:p>
      <text:p text:style-name="P3">STKALIDCDKRKNTNKPCGEKEIRDNIAGISFAAISFVTGIALLFAGSTF</text:p>
      <text:p text:style-name="P3">GLSVAVGFVIMTASIIYSGISNIIEYEKKYDTTGWENFRIFWHSVALQPM</text:p>
      <text:p text:style-name="P3">PEDVVHLAARSDYVNSITQQAADELRNMTENFVGYAFGLGKIIVNGADAR</text:p>
      <text:p text:style-name="P3">FERARSFIDLAKPNIKRFSLSRVQPKHIDDFQPICLPRKTESNYEYNSES</text:p>
      <text:p text:style-name="P3">YDSHKSEYYCENGVTLMMEDRLVRKVKNPTIFYDFTHIDSGYVAGNSSVS</text:p>
      <text:p text:style-name="P3">NIFYLKEGNPVVRGGEYTANNFIIAENTFSGAIQTDWNSTNIINVSQLHN</text:p>
      <text:p text:style-name="P3">QRVSLSWRNQQPMYTYLVMRWSSLAGSDEKIVNIQKFQRESVISYKGGDK</text:p>
      <text:p text:style-name="P3">TLDNIHCTMKDVYMDHNLLVDAGGGLDDHNRDYLVGCTDAVIWPNTYVEA</text:p>
      <text:p text:style-name="P3">QEGKYTYYIKTEGYKAKKASSKIDVVGEGKIVFPELFLLKDCKEIAYSSS</text:p>
      <text:p text:style-name="P3">DNTLSFTMPLDEEGTFTLYLKNYLKEDKSPNFILVDKLGSYIVPKIFDNK</text:p>
      <text:p text:style-name="P3">ATLDMFEMYAVYSDTNELSAAVDHYDKLLVSIMSAKNYKVFGLVKFITGK</text:p>
      <text:p text:style-name="P3">ELKKAMFGSYDGDIFVLDDNTIYARGNSGSDAYIVNDEATWDSYDIDNYA</text:p>
      <text:p text:style-name="P3">KDLKLDVLGIFFKAEFDLAKVNERDLRLNVKDLTRGGNKYIDVLRYFSGE</text:p>
      <text:p text:style-name="P3">EYRHLMVVDQEGTSYIPFHSEETLQLVPFYHASDKKNVFIVTNATRAVID</text:p>
      <text:p text:style-name="P3">CNFDNMSFYNRDDSLLISSKKLTDTSGPLSVILKFYYSENDKWKNVELYS</text:p>
      <text:p text:style-name="P3">YNKGSYQKIDLNKINLSGASTDDVYSQIIKEYVVDFGRKSTEIAHNQNGE</text:p>
      <text:p text:style-name="P3">ESIYGEKEKIGVLIFKDIKPQHLEVVRSNNDVTFKDKETADEVVIKNWYK</text:p>
      <text:p text:style-name="P3">SHKYAMSVIEFDYGLGLEPIRIFLFDQNIDLKQKLNDAVELESILISVGD</text:p>
      <text:p text:style-name="P3">DVHKMLKCTLAINSLQVTDSYRALGFTQFQQAATFIRNCDFPQFKLQHLR</text:p>
      <text:p text:style-name="P3">GIKIFLPEYYLQVYTLKIQLEGHDSNTSKGYRDIISDHFSDVLGAVNARI</text:p>
      <text:p text:style-name="P3">KIDIILDDEIRELDVETQKAVEYFLITSCSSYVGSNVLSETLKLKPSLKA</text:p>
      <text:p text:style-name="P3">FLEPKLFIKTMLLFIAKSYNDFLFKYPRVEKNTTVDIDYDNLKLLDITIV</text:p>
      <text:p text:style-name="P3">DRPKNNEMNNDAFANCKAFIEEKIEKITEALATDRFKTLLQGWDKNFKAD</text:p>
      <text:p text:style-name="P3">LLKLVTISEEDVPFTVIKVEYKKKNRDNSSSTENLHREERHAPFDELIEE</text:p>
      <text:p text:style-name="P3">IDEVIELPIRSGASSCMQYSLINNVFKYLNPVNWFSKSIGGSVMASSVIR</text:p>
      <text:p text:style-name="P3">NNHIEDSGFISSDQYKWFDLNKDTTNFYSDSNEIPSSNASTNTFEFSSYN</text:p>
      <text:p text:style-name="P3">LNSTLLLMDVLTRKYTRESYLKDSKYYDYQKQIQKDEANCLAYNYYQ</text:p>
      <text:p text:style-name="P3"/>
      <text:p text:style-name="P4">&gt;emb|OZ375492.1|:44170671-44200925 <text:span text:style-name="T3">second test</text:span></text:p>
      <text:p text:style-name="P4">AAAATTTTGGTAAGACGGGAATTTTGCAGTTTTAAAATAAAAAAATGTGAAATTCAAGGGTTTTCCAGAC<text:line-break/>CATTTAGGAAATAATTCAGTTTTTCCAGGCTATTCAAGGCCTTGAAAAAAAATAATGAAATTCAAGGACT<text:line-break/>TTCCAGGTTTTCCAGGCCGTGTACGCACCCTGATTATGGCTAATTGGTAATAATTATGTTCACAAAAACC<text:line-break/><text:soft-page-break/>AAATTTCGCTCATCTACAGACGATAATCTATAATTTAAGACCAAAATGAAGTAAAAGGATTCAGTAGTTA<text:line-break/>TCTCTCACAAACTGTCTAAAATATCACCCGTGTTTCAAATATATAGATGGAAAATATATATATAGATATA<text:line-break/>CATATATTTTTTTTTTTTTTGTGAAGGGGCTGAAACAGCCTTAATTTTTAGCCTTAAGTCCAAAAAACCC<text:line-break/>TGTGAAAAATTAATTGAGCCCCAAGATTTTAAGGCAAAACATTGATGTCTTTATAAATCAACTTCTAATA<text:line-break/>ATATATAAACTTCTATTAATAATTATAGACCAATCATCAAAAGAGAGTCAGAGCCAGTATTTTTACTTCC<text:line-break/>TTGTACGGAGTAAAGGAAGTTGTGATAGCGAAAATTTTTGAATTCTAGATTTCGACAAAAATATACATTT<text:line-break/>TGACCCTCCTTGAATCCATGTCCCAGTTCAAACGAAAATAGAAGATAGAAAGTTTTTAGCGTTGTCATTG<text:line-break/>TGTTGTGTGCCTGTTAATACCGAAATTTTTAATTTAACCATTTTGAAGCATGAAATTTCGTTATAATCCA<text:line-break/>GTGTACGTCTTGCTTGAAACTACTTTTAGTAGATGGAAAGAAGATGATAAACAGCAGCTACTTAAGACAG<text:line-break/>ACTGACACGATTGCTGGCGAATTGTTACTATTCTTATATCTATGGGGCAGTTTTTATTAACAAAAAAATG<text:line-break/>TTTTATTTGCCGTGTTTAATCATTGGAATTAAAAAGGGCATTTGAAATACTGCTAGATATGATAAATTAA<text:line-break/>CAACCACCATCACACGAGCGTGTTAAACACACAAAGGTTGGACCACATATTTAAGAAATTGAAAGGAAAT<text:line-break/>TTCGAATTTATTCATAAAGTTTATATAAAGATTTATGACTTTCCGTTCATGTACAGAGAGAGCGGGGGGG<text:line-break/>GGGGGTTACATGTTTCCGGCTGCAATAACATTTTCGACCACGGGCCGCCACTGGAATAAATATATTAGGT<text:line-break/>AAACTAGCTTATTGAATTAATAAATATAAAATTACCTTTCTTTTCACCAGATGCTATCACTTTATCATAA<text:line-break/>ACAAGTACTTCCTTTTCTTTTTTTTCTTTAACTTTTTTCTATTAAAAAAAATAAATGTTATATATCTTTT<text:line-break/>AAATGACTAAATAGTAGATTTTATCACTACTATAAAGCATTGCTAATTCTAATGTTAAATGCAATTTTTC<text:line-break/>TAGTTGTAAATACGAAATAATTACAATAAAACTTAATTTCATATTTAAAGATAAGATAATATTAAATTTC<text:line-break/>TTTAATCCGCTGCTGCTTGAAAAACTCATCAATATTTTAACTATAGAATAGTTATACCTAGAACAGTTTT<text:line-break/>AATGATTATAAATTTTCTAAATTGTTGTACCTACTCATAATAGCTTATTTTTACATAAATCAGAAAAGTT<text:line-break/>AGTTTGACAACGGATTGATTTTTTTCCCCCCCGATTTTCTAAATTGAATATCTTTTAGAATTTACGATCA<text:line-break/>TTAGACTGATCATAAATTTTATAGGCTTACATAATATTACCTTGAAATACAGAATGAACTGAAAGCCACA<text:line-break/>ATAAATAAGGACAAAATTACAGCAACCATAAGGGCACCGTGCAAGCTGAAATGGTTATTTAAAATTTGCG<text:line-break/>GGAAAGAATTTCAAAACAAATGATAAATAATACTTTGCAATAGATGAAAAATTATGAAGAAAATTGCTAT<text:line-break/>TAAAGAAGCACATACTGGCGCTTTTTCCACATTGTGAGATTTTGCTTGTATTTTCTCTTGCTTTTGTTTA<text:line-break/>AACTTTTCTAATTTTTCTTTTCTTTTTGCTTCTTTTTTTAACTGGGCAGCGCTTTTGGGGGCTTCGCCAG<text:line-break/><text:soft-page-break/>CTTCACTTGCATCATTTACGTTAGTAACATTTATATCCGGCATGTTTATGTTTTAATTTTTTACCGGATA<text:line-break/>ACAGTAAATTATTTTATTTTACTTTAAGTGATATATGACGATTGTCGCAGTAAAGAAAGTCTGGAATCAA<text:line-break/>GTAAACATTAAAGATCCACCACGTTGTTGTTACTTGACGGCTGACGAAAGAAGAGCCAGACGACACGAAT<text:line-break/>CATTATGAATGTGATTCGTTCGTTAAGTAGAATGAATCAAAAGAGGAATCATTCAAAAGGGCACAAACCT<text:line-break/>TGAATGGGGGTCTTCAAAAAAGAATAGAGAAAGGGCACGTAAATAAACACAAAAGAGGGTAAATAAGGGC<text:line-break/>ACGTAAAAAAAAAAACAGCTGTAAAACATGCGCATTGCCTACAGACCCTATTTTAGGAGCCTTAGCCAAA<text:line-break/>CTAAGGCTCCTCTCTAGCGGGGCAGACTTTCTCGTTAGCCCCGTCTCTAGCCAAACCTTGCGGCTTCACA<text:line-break/>TTGCCTGCGACAGCGACAAAAAAATGTCTTTGTCGCATCATAAAATTTTCGTTTTAGCTTCTGCGGATTT<text:line-break/>TCCCCTTTCACACTGGTCGTTGTTTTTGTCTTGACGCATGCGCAGAAAGAGCATTATTCAAGTTTGTTTA<text:line-break/>CTTTTGCCAAGGCAACAAATGTTGCTTTTTAGCGTTGTAAAATAATACTTTTCTTTATAAAAAATATAAA<text:line-break/>TTTTGCTTAAATTCAAAATATAAACATTAATAAACTAAATGAAGATCGTTTTATAAAAGGTAAACAAAGC<text:line-break/>TTTTCATTGGTTCTCTCCCGCACGTGCTAAAGAGCGCTTTTCATTGGTTCTCTCCGGTGCGACAAAGACT<text:line-break/>TGGCCAACTCAAGCGACAAAGACAGAATACCCCTAGCGACAGCACCTTGCGACAGATTCGCTACCACAAA<text:line-break/>GACGTTTTTGTCGCTGTCGCAGGCAATGTGAAGCCGCCTTACGGTGGCTCGTCTGGCTCTGACGTCAGGT<text:line-break/>GCTCTTTCCCTTATGCTTGTAAGAATTGTTGTAACTCCTTCCTGTTTAGTAAATAATAATAATAAAAATA<text:line-break/>ATTAATTAATAAAAAAGTAAAATTAATTAATTAATAAATAAATAAAATGAATCAAAAGTTGACATACCTA<text:line-break/>AAGGAATCATTCTACTCCTTCCGAAAGAGTGGAGTCATTCCTTTAAACATGGATTAACATAAGGATGTGA<text:line-break/>ATCTAAAATTCAGCGGGGCCAATAAAACTTGGGGTCCGAACCCAGCTGTTCGGCTTTGACTGCTCGGCAG<text:line-break/>TTCGCCCTCTCGCGGAAGCGTTTGGAAACACAAAAGTAAACAATTACTTTTTTTTAAGTAAACAAACTCC<text:line-break/>GTATTATCGTCTGCTGATGTTCAATATTTTGGAACACGGAAAATGGTGATTACAATACGATAAATGGTTG<text:line-break/>TGGTCATATTTAAATCTCTTCTATCTGGTCTAGTTATAAATAAATAAATAATACTAGAATTGTATTTCAC<text:line-break/>TGCTAAAATAATCAAATATGTGTTTCGTATCAGAATGTAATTCCAGTACTTATGCGGACAGTTAAAAAAA<text:line-break/>GATGGTGTAAAGTTATTCTTTTTTCAAGCCTCTCGTAAGTTAAATCTATATCATAAATGATAGAATTTAA<text:line-break/>AATATTGATGATTTTATATTTGTCCTATTGAAGTATTTGTTAGAATTGATTTCATATAAAGCTTAATATA<text:line-break/>ACATGAGCTTATGTGGCATGAACTTGCATTGTGTTTAATTTTTTATTGTGATTATTCTAATGAAGAAATT<text:line-break/>TTCGTATCAAAAAACATATAATGTTAGCAGAATGCTCTGCTGCATTAATTCAAAAGTTATTAACGGTGAA<text:line-break/><text:soft-page-break/>AAAAAGAAAAAAAAAATAGCTTATGTGTACTAGTTTTAATGTTTATTTTTAATATTTAAGTGTATAAAAA<text:line-break/>AATCTTGTAGGAATTGCATTCGTAGAAATTTCTTTTTGAAATCGATAAAAAGTTATTCGTTATATAAATT<text:line-break/>CTCAGGAATGACAGCATAGGATAAAATTGACTTTCGTCATTTAAAAGGGAAAATATAATAATATCGAGTA<text:line-break/>GATTTCACATGTTAATTAAAAAAAAAGTATCCTATCATATTCCATGCTACGGCGACAACGAAAAACGAAT<text:line-break/>CTTCAAAACAAAAACATCCGGTTTAAGGCTATCTGAAGCGCCACCTTTAGGATGAGTTTCTTGAACCATA<text:line-break/>TTTTTAACATGGAGATGAACATCCTTATTCTAATCCATGCCTTTAAAGATCGGATATCAACAATAAACAA<text:line-break/>ATAATCAATAATTTTATTTATTCGCCACCCTAATTCAAATTAATTTATGTTTTTGGTTTGGTAATTATAA<text:line-break/>AATGTAAGTGATATGCTCTGAGAGAAATAATATTAAGTAGAATATGCAAGAAAGAATGATCTTGATTTAT<text:line-break/>TTGATTTAAATTATGTCTACTTTGTGTTACTACTATTCTTACACTTTTTCGCTGTAAACTAAACATAAAA<text:line-break/>TGACAGTGATACCTTTTTTATGGATCTATCGTTAATTAATTTTAAGAAATGAAAATTGAAGAAATAACTT<text:line-break/>CTACAGCTGAGATTTTCTGAGTAGATTTCTTTCTCTTTTCTATCTCATTGTTTTTATCTGTTATCGAAAT<text:line-break/>CATAGGGGGGGGGGGATGCCTATTAAAAAAAAAAGCTTTTTTTTTTAAATCCTAAATTTATTTTTTTTTT<text:line-break/>AATGAGAATAGTCTAATTCTCCCTTTCTTATTTATTAAATTAAAAAATCTTGTTTTAGCTAGTTAACTGT<text:line-break/>TTGAATACTTCCCTTTCTTAGTTTAAAATGACAGAACTTGATGAGGAAATATCCAGACTGACTACCAATG<text:line-break/>ACTCAATATATGGAATGTTATCCAACTTTGAAATTGACAAGAAAATTGGTAAAGGTCAATTCAGTACAGT<text:line-break/>TTATCGAGCGAAATGTAAATTAGATGGAAAATTTGTTGCTCTGAAAAAAGTTCAAGTAAAGTTTCAATTT<text:line-break/>ATTTCATATTTCTCTTTCTCTTTCTTTTTGTATTTATTTATTTTAGTAAATAACTTGCTAATTTTTTTTT<text:line-break/>TTTTTTTTTTTTTTATAGCTATCTGATATGTTGGATTCAAAGGCAAGATTAGATTGTTTAAAAGAAATAC<text:line-break/>ATTTACTACAGGTATATCGTATATGTCTTGCATATTTATTTTCTTAAAAAAAAAAAATGTTGTATAGCAT<text:line-break/>TAGCTCATAATGATTATATAATATTTTTGTTGTAGCAATTGAATCATCCAAACGTTATTAAGTACTTAGC<text:line-break/>ATCATTTATTGATGACAATGAGCTATACATAGTCCTTGACCTGGCTGATGCTGGTGACCTTTCAAGGATG<text:line-break/>ATTAAGGTATCATCATTATTATTATCAGATTGTTAAAACTACATAAGTTTGCCTCACAAGTTTTTGTTAA<text:line-break/>TTAGGGTCTGTTCAAGTATTTCCTATGGGCAAAGGGAGGTTCAGAATCTTTTATTTATTTATTTATTAAC<text:line-break/>TGAAGGGAGAGGGGGTCACAACAATTCTTTCAAGCATTAGAAAAAGTGTATTATTTTTTGAAGCCCCCCC<text:line-break/>CCCCTGTGCTCGTGTCCCAAACACTTTTACAAAGTCCCTGATCTTTTTATTTTTCTATTAACATTTTAAT<text:line-break/>GCCTATAAGTTTCCAAAATGCAGCCAGTAATTTGTCATTGAATCAGATTTTTATAAAAGTTAAAAATTAT<text:line-break/><text:soft-page-break/>ATATTAGTTCCCACTAAAGTTTGACTAAAATTTGTTTCTGATATCTTTCAGTAATCAAAGCCGGAAGTAT<text:line-break/>TTAGGTTTTTTTTTTTTTTTTTTTTTTTTTTTGTCTCATGCTGATAAATATATTTATAAAACGTAGAATT<text:line-break/>TAAAATAAAACTGTTTTTCTGAAAGTAGATCACCATTACAAATTAAGTTGTTTGTTATTATTTTTTAAAC<text:line-break/>TGGGGAGCAAAGAGGATGCTGTTTTAAAGAAGAAAAAAAAATGAAAATAGTAGCAATTTTATATTTAAAG<text:line-break/>AGCAAGAAATCTTTATACCTTCTTGCTCTAGACTAGAAAAATCTATGCATGTTCTATTAAATAACCAAGT<text:line-break/>TTTGCTTATTGCACATTAAAGTAATGTATTGAACCTTTTTTTTTTTTTTTTTTTAATAAATATTGTTATT<text:line-break/>TTAGTATTTCAAGAAACAGCAGCGTTTAATTCCTGAGAAAACTATATGGAAATATTTTGTTCAGATCTGT<text:line-break/>GGAGCATTGGAGCATATGCATTCTAAACGTGTAATGCATAGAGGTAACTGAATTTATGTGATAGCATTTT<text:line-break/>CTATATTTGTTATTAAGTTTTATACCACGTACACTGTTCTTTTAACAATATATTTATTTATTTTTATTTT<text:line-break/>TATTTTTTTTTTCTTTAGTGAAAAAAGTGTACTATTTAATTGGTAAAGATAATTTAAATTGGCATATAAT<text:line-break/>ATAAAAAAAATAACAAATATGTTTAATGAATGGTAATTTTTAAAAACAACTTTTATTAAAATATATTTTT<text:line-break/>TGCACTTTTTTTTTTTCTCCTTAGGTAATAAAAATTTTAATGGTTTTTTTTTTTTTTTTTTTTTGTATTA<text:line-break/>TTGATATTAGAATATACAAATTTTAAAATCAAAGTTTATTTATTGCAAATATTTTACTGAATCATTACAC<text:line-break/>TCATCATTTAGAGAATACAAATTTTATACTTTCTATGATGAAATAGCTAAGAAATATTTATTGTAAAAGT<text:line-break/>TTTAATAATTGATTAGACAGATTAATTGTATATATTCTAATATTTGTTATTATTTGTTGTTATTAATGGT<text:line-break/>TCGAATCCCGCTGAAACCAAAGACCACTGAGTACACGCCGAGAACGTGCTCGTTAAATCTGTGGGTCCGA<text:line-break/>AAGTCCTGTGTAGCCTTGTTGCAACACCATGGGTACATGTCTGGAGAATTTTCCTTCCCCTTTCAGACCT<text:line-break/>CTGGCTAAATTGCGGGAAAGAGCGTATGTATGTGTGTGTGAATGGGGATGGATGAGGGTGGTGCCCGACT<text:line-break/>AGAAAATGGTCAACAGTTCTGGCATTTTCCCTATCGATGGGGGGGGCGAAGAGCTAACCGCTCAGTGCCT<text:line-break/>GTCATTGGTAATGAAAAATAATATTTGTTATTAATTTAAAACAAATTCTATTTGTTTTATTGCCATTATA<text:line-break/>TTATGTATCTACATAGTTATTCATTTGTTTATTTATTTTCTATAATTCATTTGATTTGCACCAATATTAA<text:line-break/>CTGTTTCAAATTTTCTTATTTCTATAAATTTAAATTTTTCAGATATCAAGCCTGCAAATGTGTTTATTAC<text:line-break/>AGCTGAAGGAGAAGTTAAACTTGGTGACCTAGGTTTAGGAAGATTTTTCAGCTCAAAAACAACTGCTGCA<text:line-break/>CATTCTCTGGGTAACAATTCCCTCTATTATTATCATTATTATTTTTTTTCTTGGTCCCTTTACAATTAAC<text:line-break/>AATAACACTATTAAAAAATAAATAAAAATAAAGATTGTCATGAGTTCTCAGATTTCATTTTTAGGAGAAT<text:line-break/>TCTTATATAACTAGATAATACCCGTCAAAATTTGACGGTAAATAATTTTATAGTTCCAAGAAAAAGGGTC<text:line-break/><text:soft-page-break/>ATTTGACCATGGAATTACATAGCGTACCTAAACAAAATGAAATAAATAAAAAGGAGCATTTCGAACTCCC<text:line-break/>CCCCCCCCTAAAATAAAAAATAATAAAATGAAACTCTTAAAATTGGTACCTCTCCCCACTGTAACATAAC<text:line-break/>ATAATAAATACTTTTTAAAAAAAATCAGGCTATATGTATTTTTTTTTTTTTTTTAATGCACTAACAAAGA<text:line-break/>GAACCGAGAATTCTTCACCCCCTTTATTCTCGACAGATGGCAGCACATGCTTCAAAAGTTGGCCGGGATT<text:line-break/>TGAACCAGACCTGTTGTGTTGCCACCTAGTGCTATTCCGAATTATCTAAAAATCTTGCCTTCAATTAACA<text:line-break/>CTTTGTAAAAGCAAACCCTTTAATTATTTTTTATTTATTTAGTGTTTTAGTCTTATACTTATAAAGTTAA<text:line-break/>AAATAAACGAAGTGCCAGTTCCTTAAAGATGTATGTGGATGACGTAATGCAAACATGCACTCCTCTGTAG<text:line-break/>AGCTAAGCTCAATACGCGATCGCGATATGAATATTTGAGCCACATGAGTCGTTCACATAGTCGTTCAACT<text:line-break/>TTGTTTACAATGAGAATTTATCGCAAAAGTAAACAAATTGTTTTAAAATGTTAAATATACAGCTAAAATC<text:line-break/>ATGTAATTTTTTTAGTTCTGAATGTTTTATAGGAAAATAGGCTGAACAAACGTGATTTAATCGCGAAGAT<text:line-break/>ATTAGTTTTTAGGTAAGAAAAAATTCTGATCCAAGTTTGAAATTGAAATTAAGCCTAACGTGGCGTTTCT<text:line-break/>TTACTGAGCTCTTCAATTGAAAGATGAGTACAACTTGGAATTATGCCAAATAGAGATAGGCGTTTATATA<text:line-break/>TATAATTTTCAAATCGAAAGTCATGGATGATAAAAATGTGTTATTAAAATATTAAAAATTCAGCTTTTTT<text:line-break/>TTTTAACACGTACAGCAGGCGCCGCTTAATGTGATCACAGATAATGTTATCAGAATCGTGAAGTCCCGAA<text:line-break/>CGCTTGTATATTGACACATGTTAAAAAATCAGTTTTTGTAATCAGTGCTTCGTTTACTGTTATCACTTTC<text:line-break/>GCTTAAGGCAAGCCAATCCCCAACCCCTTTGGACCCCTTTTGTCTTTTTTTTTTTTGTTTGAATAAATTA<text:line-break/>TTGTGTTTTAAATTTGCAGCTGCATAAATACATGTTGTAAAATTAAAATTTTGTATTTTCTGATACTTTT<text:line-break/>TGTTTATTGTTATCAATCGGTTATTATTATCAAATAGTATCGGTCCCAAAGTGATCACATTAAGTGGCAC<text:line-break/>CTACTGTAGATTAAAAACACGCATTATGCTTTTTATAAGATGCATTCTGTATTATTATATATTTTGAGTA<text:line-break/>TAACTGCCCGTAAAGTATCAGTATTTTTTTTTTTTAGTTTTTCTAAAAGGTAAAATGAGGATAAAAAGCA<text:line-break/>ATGCTTCTTTTGAGTCCTTTGATAATTTTGTTTAAAATTTTATTTATTAAAAACCTGCTTCTTAAATAGA<text:line-break/>AATGAAATATTATTCCATTTTCATTGAAATTAGCTACCATTTTATAATTTCATTTTTAGTTGGAACACCT<text:line-break/>TATTATATGTCTCCTGAACGTATTCATGAACATGGATACAATTTTAAATCAGATATCTGGTCATTAGGCT<text:line-break/>GCTTATTATATGAGGTATAAAAAAAAATTCATGTCTATTTATATATTTTAAGATTTAAAACAATATTATT<text:line-break/>TAATTAATTCTATTTTGTTTGCATAGCTTATATATTTTATAAATTTAATTATTTCAGATGGCAGCATTGC<text:line-break/>AATCACCATTTTATGGGGAAAAAATGAATCTGTATGCTCTATGTAAAAAAATTGAAGAATGTGACTATCC<text:line-break/><text:soft-page-break/>ACCAATTCCTTCTGATCTGTATTCAGAACAGGTGGGATTTTTTTTTTTTTTTTTTTTTTTTTTTTTAAGG<text:line-break/>CAAACTTTGTGCTAGAAATTGTTTTATGTGTACTCTGGTTTGGTTAATCATTAATAATTGTCTTCTCAGC<text:line-break/>ATCAGGGTATTGTTTATTTATGAGAGGGAAAAAATTAACTAATATATATATATTTTTTTTTTTAACTGCA<text:line-break/>AAAGTTTTCTGGCATTTATTAAATTATTAAAAAACTAATCAATTTTGTTTGTCAGACTGATTCATTTAAA<text:line-break/>AAAAATGAAAATAATGTTTACAAGAGGTTTTTTGTTTACAATAGACTGCTAAAGTTAAATGCTTGTTTAA<text:line-break/>TTTGCATAAAATCCCTGCAAATACCCAAAATTCCTCTGTTTGATCCCCCCCTCCCACAAAAATAAATAAT<text:line-break/>AATAAATAAATTATCACAAAATAAGGTATTAAACAGTAAGTTTAGAAAATTTAAAGAAAAAATAAAATTA<text:line-break/>TCTTGCATTTTTTTAAATTGCTATATGCTTTTTATGTATTTGCCAGTACCATAAACCGGGGCTACTTTGC<text:line-break/>ACCTAGATGGGTAACTTTGCACCAATGTTTGAAAAAGACTTTAGTCCTTCTGGCAGATAAACTAATGTTG<text:line-break/>TCCTTTGGACAACACTGACAATAAAAGAATATATTCATTAGTTTATCTGCCAGATGGACTATAGTCTTTT<text:line-break/>TCAAACATTGGCGCAAAGTTACCCATCTAGCTGCAAAGTAAGGCGGTGTAAGCTTTACGGTATAGTAACT<text:line-break/>TTTAAGAAAAATAATAGCTTTCACTTTTCAAATTGTTATCTTTAAGATTTATCAGAGCTAAATTTATAGT<text:line-break/>ATTTTCCTTCTGTTGACAATAATGTAACTCTCTATTTCTTTTTCTTGTAGTTGAGTAGTCTTGTTGCCAG<text:line-break/>CTGTATTAATCCTGATCCTGATAAACGACCTGATATTGTATATGTACACAAGGTCTCACTCAGTATGCAC<text:line-break/>CGGGAGCTTTCACAACTAAGTTCACCAGTTTCTCATTAAGTTGCAATGGAATGTGTTAGTAAATTGCATT<text:line-break/>GAGAGGCTTTCTTTGTTACACATATTTTAGTTTAACAAAATGTACTGTTATTTATAAAATGTTGAGCTAT<text:line-break/>ATATAAACCAAAGATTTTAACCGAATTGGTCTTTATTGTTTTTGTTTTTTGATTTAGTTCAAGAAATTTG<text:line-break/>TTTGTACTTAGTGCAATAATTTTTTAATTTGCTATTGAAATTTTCTATACTCTGATTTTGATCTCAAGAG<text:line-break/>TGCTTACTGGTTATGATAAAATGTTATGTGTAATTTTTAAATTGTAGTGCTCATGGTGAACTTGTGGTAA<text:line-break/>ATTTTTTATTGAAATTTCTATTATTTTATGTATGATCAAATTTCCTTGATTTATTGCCTGGTTTCCAAAA<text:line-break/>TTATATTTTACTGTTGCTTTTTTTTTTTTTTTAAATAAAAAAAATTATACATTTTTAATATTAGCTTTTA<text:line-break/>TTGTTATTAATATAGTGACCAATAGTATCATTGCAATGAGACAGCTTTTTATATGACAAAGGTTGGGATT<text:line-break/>TGAGGTTAACTTTAAAAGAGAGAAATTACTTACAAACTGTATTATATTAGAGAAATATTAAAACATCTCT<text:line-break/>AAAACAATTTAAGAACAAAATGTACATGTTTAGTGTATTGCTATTTTTTCATCATTGGAACAAAGTGGCA<text:line-break/>CATTATTTTTGTGGGACCAATTTTTAACCATCCTGTGAGTACAAATGTAAAAATATTTAGATACTTAAAT<text:line-break/>TGATAAGTAAAATATACATATATAGCCTCTTTTAAGTAAATGTATTACACCAGTATTGCAGTACTTAGAT<text:line-break/><text:soft-page-break/>TCTTGAGTACCGAAAAAATGCCTTCTGCAATGCTTGCATAAATGTGCCTTAATGCTCATGTCTGGTTAAA<text:line-break/>AATATTTTTGCTATTTTAGAATGTACTCCAGTTGGCAATGGCAACAATTTTTGGGAGGGGGAATATAAGT<text:line-break/>TCAACTAGCCAACCTCTAGTTTAAGGCAAAGGCCACGTAAGAAGCAGAGTGCTATAAAGTATATTGTTTT<text:line-break/>AGTACAGAAAATGTACGCCCCCACACTTTTGAGCCAATCACCATTTTTTGAATGGTTTGTTAGAATTAAT<text:line-break/>TATGTTAGAGCCTTAGGTATACTAAATTATACATAGTCATTCATGCCTGTAGGTATTAGTGCTATTTATT<text:line-break/>AATGTTCTTAGGTATACTACAATATATTGTCTCACTGGCAGTGCCACCCAGAGAGGGGGGCAAAAGGGGC<text:line-break/>AGATTGCCCCGGGCCACAAAAAAAACTTAGCTCAGATGGGTCACATCTGAAGCGAAAAAAATTTTACCCT<text:line-break/>CTGAGTTTTTCAACCGTTTGTGCCAACTTTTTCCGTACACAAAAATCTACCTCAAATTCGGTTCACCCAT<text:line-break/>CTTATGTTGACAATATTTTTTCTCCCTGCAAAACGATCCGGATGATCGCTTTTGGAGGGAGAAAAAATAT<text:line-break/>TGTCAACATAAGACGGGTGAACCAAATTTGAAGTAGATTTTTGTGTACGGAAAAAGTCGGCACAAACGCT<text:line-break/>CCGAGGGTTAATAGGGGCCACAAATCCAAACTTTGCCCCGGGGCCACCAATAGTCTCTGGGCGTCCCTGC<text:line-break/>TCACTCGATCTAACATCTTAAATATTAATTTTTTCAATGATGTCAGATAGTATTTGATTTAATTATTAGA<text:line-break/>ATTTTAGGTTTGTACCATTGGTAATTTTCTTTCGGGAAGATGTTACAAGCACTTTGCGACTTTATTTTAT<text:line-break/>TGTTATTTAAACATGTGCTTTGTTTTAATATTAAAAAGTAGATAAGTATAATTTAATTAAAATAAATGTT<text:line-break/>TAAGGAGAATTCATAAAATAGATGACAACTGTCATAAATGAAATTTAGATTTCCATTCTGTTGAAAATTT<text:line-break/>GATTGCCTTTTTTAATTTTTTATTTTTGCCAGAAATACAATGTAATTTATGATGCATACTTGATATGGGT<text:line-break/>CCAATATAGATTTAATTGTTGAAACTTTTTTTTTTTTTTCCTGAATAAATGTGATATTTTTTATAGTATT<text:line-break/>TATTTTTTTATGAGTGCCATAATGTTTATGCAATATATTAATATTGCACAGCTTTAGTTGTTGTCTGTGA<text:line-break/>TTTCAGAGCTTTTAACTGTACACTAGAATACATTTAAATCCATATTTTGTAACCAAAATTTGTTGATGTT<text:line-break/>TTATATTGTGAAAATTGTGCTATGTACTATTAAATTGATTCTTTAAAATAAAGTTAAACACACACTTAAA<text:line-break/>TCTTTTTGCATTAATTTATTCATTGTTTTTCACACTTTTAGGGTACAATCATTTTTTAATTATTTTATTT<text:line-break/>TTATTTATTTATTCAAAAGTTTGCCATATTTATAAAAAAACATTTTAAAGGTAGTCTGAGTCTCATATAA<text:line-break/>AATAACAAAGCACTTAACTTTATACATCATAAATGAGCTGGTTATATTATTTTATGGTGCATTTAGTAAG<text:line-break/>TGCTGTGTTATTTTATTTGTTTATGTCAGTTTTTGGGTATTTAATTATTGAATGTATGTTGAAATATTGT<text:line-break/>TGCAACTCTCTTCTAAGAAATAAAGAAAAAATTGTAAAGTTAATTTGATTTTGTATTTTCATTTTTTTTA<text:line-break/>AGCAATTTTCCCAATGATGGAATTCACCTTAAAGGGTAAATAATATTTAATGTAGGTGGGCGAGGGATGG<text:line-break/><text:soft-page-break/>TTTGAAGGTAGTTCTAAATTAATAAATAGTAATTTTGTGTAAAACATTAATATTCATATCAAATATTCAG<text:line-break/>CATTAATAATTTATCTTAAGTCCCAAAAACAAAAAAAGTACAATCAAAGCATTAAGTTGGGGATATTCAA<text:line-break/>ACAAAATGTAATTTTTATGAATTTAATAGAAGTTATAAAGATCCTATAAATCCAACTTAAACAAGTTATG<text:line-break/>TGCAAGTAAGGGAGAAAGGTTATATTTTTCTACAAAAATTCCATTTCTTGTTCCCACTTCATTTTTTTGA<text:line-break/>AAATTTAGCACAATTCTTTTTTCTATTTAGGAATTCAAAATGTCAAATTAATTACTTATTACTTCAATAA<text:line-break/>ATGTTTTAATTTTTTTTTTTTTTTTATATAAGTTATATTGTATTACCTATTCAACTTAGATAGATATAAA<text:line-break/>GAATCAAAGGAATAAAAAATGCATGTTTTCAAACAGAACTAGTACAATTATTTTATTTACAATCTGGGAC<text:line-break/>ATTTTTGCAAGCAGAAAACTTAACTTTTCAACAAGACTTTTCATGCTTTTTCAAATCTTTGAACATTTCC<text:line-break/>TTAACTTCTTTCAACTTCTTTCTTGATTTTTCCTTCTCTTTCTCGAGCTCTTGCCATTTTTTATGGTCCT<text:line-break/>CCATTACATCTTTTAGATCCTGTTTCACGCTTTTTGCATCATCCTCCATAGTATCTGGAACAAAAGCAAA<text:line-break/>CTTCCGAGAAAGCAAGGCAGAAGAGGAAGACGTGTGTTCAGAGGGGTGAAAGTCTAAGATTTCTAGATGC<text:line-break/>GGAAGAATGTATTGGTATCTTTCATCTACATTAGGCATACCTTGTTTTATGTAGAGAAGGGCTCGATATT<text:line-break/>GAACATAATTCTTTGTGAGCTGGTTAAGGTGACACTTTGGATGGCTTTCATCATTGAGGTTCTGCATTGT<text:line-break/>ATAGGATTTTTCAACTTCAGATTTTAAAAATGAAACTGGTATTTCTTTTGCATACTTAAATTCATGATAG<text:line-break/>GGACCAATTTGGTACCTGGCTTTTAGAAATGCCATTCGATTCAATGGTAACATTGCACGATCCATGGTTA<text:line-break/>ATTTCTTCCAATGTGCTATGTATTTGTTCCTTATAAGAGGAGGTGTTCTTGGATAGAGAGGAACTTTCTG<text:line-break/>TACAGGTACTGCTTCACGCGTGCTCCTTTGCCCCCAGCAGAAAAATTGATATAATGCATTAAATGCCAGT<text:line-break/>AAAGAATCCAATAAAATTATCAATATTTTTATAGTTATTATGTTTACGTATAAAAGAATATGGACTACAA<text:line-break/>TTGCACTTATTATGGTTAAAGACAAAATTAACATTTTTAATCAAAGTAGGTAATGAAATAAATAGTCATT<text:line-break/>GAAATATTCAGTACTTTTGATCCCAAGAAAAAAATCTGTTTTAAATTGTATGCATTGTTGGTAAAACGAC<text:line-break/>TTTTGCTATTACAAGTTACAATGATTAGTTGTTATTATTTAATACTAATAATTTTATATTGTTGCAAAAC<text:line-break/>ATTTTTACATTCTTGCGCAACAGTGCTGTGAAATGAATTTATGCTCATGTACATTAACATTCATATCTGA<text:line-break/>ACTTTAAATTTCGATGCAAATATCCGTTTAGTGAATTCAAGAAACCAATCTCTAAATGTTTTTTTTTTAT<text:line-break/>TTTTTGTGCTTTGTTTTGAAATGTTATTGAAAAAGAAGCAAGCACAATTTTTTAAACATTTGTTCTAAAC<text:line-break/>TGCTAAACTAGGCGACATTAGCTTAAGTGACATACTTTAAAAAAAAAAAAAAAAAAAAAAAACATAAAGT<text:line-break/>ATACTTTATGGGGTTTTTTTGCTTTTTTAAGTATCCCAAATTTCTAATTATTACTGCATTGATTAAAAAA<text:line-break/><text:soft-page-break/>ATTTCTTTATATTCTGATTTGGCACTGTAGAAAAGGTAAAAACAACAATTCAGGTAGAGAGGCTTTCAAA<text:line-break/>TAGAACTTGTTGACCCTGCCATAAATTTATTTTTTGGGGGGGAGGGGGGGAGGACTAATTAAAATTTGGT<text:line-break/>TTTTAAAATTTAAGATATTGTGACCCTCTGCATCTTTACGTAATAAAAAATATAAATCTAGAAATCCCCT<text:line-break/>GCCGGCACTCTGCTCAACATAAATATCTACTGCATATTTATTTTTATAGTTTAATGCTAGCACTCCATAA<text:line-break/>ATAAAACCATGATAAGCTACTTCTGAATTTAGAAGTACTTGCTGTTGATTCGTGTTGTATAAATTTATTA<text:line-break/>ATTGCTGATAAAATGCTTTTACATTATTGACGAATATTTCTTGATCCTTCTTAGGAGGCTCTGGAATAGC<text:line-break/>AATTAAATCTAACATTTTATCTAATAAAACATTAGAGTTTGTGCCTTCTTGCATCTCTTGTAACGGTTGA<text:line-break/>ACTTTAACAAATTTATCATTTGAACTTGTATTTTTGTAACTGTTATTTTGTAGCTTAATCTTACTAGTTT<text:line-break/>TAATATTTAAATGTAATGCTTGCGAGTCAACATTTGCCGAATCTATAGTAGACTCTGTAGTCTTTTCCCA<text:line-break/>AAATAGCGTTTCTATTTTTTGGATATCCTTCTTTGAATATTGAATATTGTTAGGAACGTTATCATCTTCT<text:line-break/>CCAATAGATATTGATCTTAATATTACTTTATCTTCCACATTATTGTTAACTTTAAACGCGAATTTTAAAA<text:line-break/>TTTTAGTTGTAGAATCATGACTAATACTAAGGGCAATATCATTAATATGAGTCTTGTCATTGTTTAATTC<text:line-break/>AGTATTTTGAATAGTTACACCAATACTAGAAAAAAAATGAATCCAAAAGTCTACCGTACCAGCATTTTTT<text:line-break/>TCATGAGGTGTTCTATTTAATACTCTTTGGCATTGTTTTTCAAACTCGTTAGTATTATATAAAAAATTAT<text:line-break/>AAGCTAATTCATTAGTCATTACTTACTTACTATATAATTGTTAATTACTTGTTAGTTTATTTATAATATT<text:line-break/>ACACTTGCATCTCCAGTAATAACCCCTGTAAGACATACTGTTACATCATCATTGCAATGAATAATATCGT<text:line-break/>GGTCTTGGTTTTCCACAGCTGATATTAAATCTTGCAAAATATTATTTGCATCCTTGTTGATAGCTTTATC<text:line-break/>TTGATTATATTCTTGTTCTTTGATATAATTATCTAATGCAGGTAAAACGTCTTTAAACCGATTAGAATTT<text:line-break/>ATAAATTTTTCTTTAAATCTTATAGTGGTCTCTATAGATGGATTAAACCATTTAAGAACTTCTGTTTCAT<text:line-break/>AGAATGTCCGTGGATCATCTACTTCAAAAAGATACTCCATAACATCATCAATCATTAACTGGTTTTTAAA<text:line-break/>GTTATCTATTTGTATCTGTGATGAATTGCAGCACCAACTAACAAATTCGTCAGCCAAATTAAACATATCT<text:line-break/>TTGCATAATAATTTTATGCATACACCTACTGTATCTTCCGTGGGATGTAATATACATGTTTTAAACTTAT<text:line-break/>TTATTTCTTCATCAGTAGAACACCAATAATAAACAAACTTTTTGAATGATTGTAATTGATCATCTTGTTT<text:line-break/>TATTAGATTAACTATTAAATCTACTATCTTATATATTTGATCATCTTGATAAAAATATTGTTTAAACTGA<text:line-break/>GCAATTTGTTTTTGGTCATTTATAAAACACCAATTTAAAATTTGCTCTAATAACTCATATTTATCTTCTT<text:line-break/>CTATTAATTTGCAAATTACTTCATCAAAATATAGTTGAGGTATTTTTGTTTTTAACTCAACAACTCCTTC<text:line-break/><text:soft-page-break/>TTCATCACCTGAAGCACACCAATTGAAAATTTGCTCTAATTCTGTAAAATCTACTTTGTTATTTGCTACA<text:line-break/>ATGGATTCTAATATATCATTGCAAATCCCGCTATATGTTAATTTGTGTCTAAACTCCTTGATATCATTAT<text:line-break/>CTGATTTAAAAGCCCATTGCAGAAATTGCTCTACTTTATTCCATTCTTTATTTTGTATAAAATGTACAGC<text:line-break/>TATCTCTCGTCCTTTTCCTTTTATAAGTCTTTGTTTAAAGCACTCTACATCTTCTCTAGAAAAAAGAGTA<text:line-break/>TGACCAATAAGCATCTCTAATAAATCCCATTGATTATTTATTATGAGAGAATGACATCTACCAACACCAT<text:line-break/>AATTTGAAAATATTATTTTCTTCTTTTGTATATCATTAGAATCACATAATATTGACTGAATTATATCTAC<text:line-break/>ATTTTTCCTGTAAAATAAACTGAAGAATATACTATGACAACTGTGACCATTCTTATGTTCAAAAACATGT<text:line-break/>TCTTTTAAATGTTTAGGAGCATATTGCCATAACTCTTTAAATATAAATTTATATTGATTATATTTTTCAG<text:line-break/>TATCCTCATGATTTTTTTGCATTTTATGCACAATACCTTCTAATACACGAAGATAATCACATCCAGATAT<text:line-break/>TATATCCCATATGTGATGTATCGTAGGTAAAAAATACTGTCCCCATAACCAATCATCTAAAAAGCTTAGT<text:line-break/>AGTATTTTCTTAGCATCATAAGTTTTAAATACTTCTTTTTCTTGTTCTTTACTTATTTGTGATAGAAGAA<text:line-break/>AACATCTAATATCAATATTAGGTGTGTTTTTTATTGCTGGAACTATTTGTCTTGATTTTGCTTCATTACT<text:line-break/>CAGTTTATCCCAGATATATTTTATTGCTACTTGATTTGTGCAATAATTGTCTATTAACTCTTTAAATAGA<text:line-break/>TATTCATTTATACTATAATTAGTACTATATTTTCTATTGTAAAAATAAACCGCCTTATCTAATTTAGTAA<text:line-break/>AATCTCCTGTTATATGAGCAGTCCAAAAATATACCATTTCTTGCCCCTTAATACACCTTAGGGTTAAGGT<text:line-break/>AGTATTGATAACCTTTGTAGCAATAATTGCTATATTATCTTCAACACAATAGCTACAAGCCATATTATAT<text:line-break/>TTATAATCATCCAATAACTTTTCCTCTTTAGCTAATAAAGTTTTTGCTGTCTCTTTATCATCTATTACAC<text:line-break/>CTCTTGCTGTCCAAACTAAATAATCTATATAATTTATTGCTATAGATTTTGAATATTTATAGTAATAATC<text:line-break/>AACACCAAAAATATACTCATCTTGATATTTTATCCAGTCAAATATTTGACCCCCTATAGGGTGTACAATA<text:line-break/>TTTGATAGGATTTTTTTTATATAGTTAGGTACAGGTAATTGTAATACCTTATCTAATACTTTATCTTCAA<text:line-break/>TCTTCAAAAATAATCTATAAATATCTGTATAAAAATCATATTCATATTCGTTGAATAATTTTACTATTTG<text:line-break/>ATATTTGATATCTGTTTGATTCCATAATGTAATTATTATGTTGCTCATTGATACATGTTGTAACGACGGC<text:line-break/>ATTAAGTAATACTTAATAACATCTTCTTCTAAGTTAATGTCTGTATTATTTTTTTGTTTTTTTGAGGTAT<text:line-break/>TAGCGATATTTGCAACATCTAATTTTCTTTTAGTCATTTTATAGTCACCATTTTAGTTAAAAACCCCAGC<text:line-break/>TTTAGCTCAGCAATTCCAAATATGAGCTATAGTGCTGTAACAAAAGATTTTTGTATGAGAGTCACACAAC<text:line-break/>TCTAGATTAAAAACTCATCTTAATACTCAGCATCTTTATATTTTTTCGCTATCCTAGGTTCTGTTGACAA<text:line-break/><text:soft-page-break/>AAATTATAGTTAGGCAAGAGAATAACAAGTTGCCATAGTAAGAAGAAATGGTAGTTTCTAGTTATCAAAA<text:line-break/>AAGGAACTACCAATATGAAGTATTACATAGAAGAACAAGCATGGGAAGTAATTTTTTAAGGAAAGAAATG<text:line-break/>GTATACACAACAAGAATGAAGAAAAAATGAGATATTTTATTGAAGCAATATGGTTTATTGTTAGAACAGG<text:line-break/>CACCGTCAAGTTAACTGGACTTTGGACAAAATCTTATCTACAAAAATAGGAAATTTAGTTTTAATAATTT<text:line-break/>ACCTCTTTTTTACTCATAGCGTAAGCTTTGCTGAATAATCTCTCCATTTAGCAAAGTGCAAATATTGGCA<text:line-break/>AAACTCTGTCCAATATCTAAAATGAACATCCTAGTATTTTGTGCCATTAGACTAACAGCTAACTCCTGCA<text:line-break/>AAAACACTGACTTCCCTCCTCCAGAAGGAGCAAAGATACAAATATTGTAATTACCGGCATTAATTTTATA<text:line-break/>AAATGGGTTGAAATTAAATAATTGCCCCCGCCTAGCGTGCAAAAGTACCCCTGACCTTGGTACTCCTTTC<text:line-break/>CACTCAGCATGAATTGGTAGCCTAGCTATTACTTCCTTAGATAGGACTAATCTAGTTAATTTAAATTTGT<text:line-break/>CTAGGATATTCCACATTAAAGCTTGTTGCATTGGCATCATGCTAAGTAATACCGGTAATTGTAGATGATA<text:line-break/>CGAAATACCAAGGCGAAAATTATTATTGTTATACAAAGTAATTAAGTTCTGACTAACTATATCAATTGAT<text:line-break/>TCTTTGGGGGCAGTTACCATTAATGACCAGTGTTCTGTTAAAAACTTCTCGTCACTACTAGCTACTTGGT<text:line-break/>CATTAATATCTTGCCACTCAGCCGCTTCCCTCTTAAGATCACGGTTACCGTGGCTATACCACTTCTCTGA<text:line-break/>AGCGTCAATCACTTTCTTGCCTCTTGCCGTAATCATGCTGCTAGCCGATTTGCTAATGGTACTGGCTACG<text:line-break/>CAGTAACTAATGATAAATCTTGCAGCTATACCCATATGGCTACGAGTACTATCATATCACCCAACAAATT<text:line-break/>GATAGTTTCAGCTAGTGAGAAACTTTGAGGCAATTCCTTAATATGATAGATTCTAGAAGTTAAGCCAGTT<text:line-break/>GTTACATGATTAATCTGATCTTCCTCTATTCCTTGCAGCATAGAAGGCATTACTATTTGCCTTGATAATA<text:line-break/>TTTCATGCGGAGTATAAGTAGTATTTGTACTGCCACCCAGCTCCATTTGTAGCATTAATCTTGTTAAAGC<text:line-break/>TATTAAATCACTAGCATCGCAAATATGCGGAGCGAGTTGTAATGATTCCAATTTATGCATCAAACTATCT<text:line-break/>CTAAAACTGATAATGCCACTTTTGCTATTGTTTTTTGTATCAAGCTTGCTACTAAAGGAAACAAATATTC<text:line-break/>GATAATCTCGAGCAATACGACCGTCAGAAATACCAAAGCTTATCGCTTGCTCCCTGATAAACTGAGCTCG<text:line-break/>TCTTTTGGTTATTTTCTCAAGTAAAGGATCACTATTGTTACGCATCTCCTGCCAGTAACCCAAAATATCT<text:line-break/>TCTACATCATGATTTGCCACTAGCAAAAATTGCAAGTAAGAATTTTCAGGTAACTCATCGTTAAAGAAAT<text:line-break/>GCGATAGATTCTTGTTTAGTGAATCGTCAACGCCAACAATAGGACAAAGCTTACGCTATGAGTAAAAAAG<text:line-break/>AGGTAAATTATTGTAAGAATAATTAAACATGCCAAAGAGGATAAGATTGCAAGCAATACCAATTAATAGA<text:line-break/>ACAGATTACTGTCAATTTTTAACAGTTAGCCAAAAGAATTATAGTTTGACCTACTACGCTGAACATGCAA<text:line-break/><text:soft-page-break/>AGAAATGTAGCCATGATGTTATTAATAGATTTTTAGAGAATGAAAAATATAGCCCTTCTTTGCTATGGGA<text:line-break/>ACACATTAAAAATGATGTTATTGTTTCACCTAATGGATATACAATATTTGATGATACGGTGTTAAACAAA<text:line-break/>AGGAACACGAAGAAAATAGAGATTGCTAGATTGCAGTACAGTGGAGCTACAGGTGGAGTTACTATGGGTA<text:line-break/>TAGGAGTAGTGAGTCTTGTATATTATAACCCCGATATTGATAAGTTTTGGGTAATAGATTATAGAATTTT<text:line-break/>TTCTCCTGATCATGATGGAGCGACGAAACTAGATCACCTACTCAACATGTTAAACAATGCCGTGTATAGC<text:line-break/>AAAAAGATTCCTTTTCAAACTGTACTTTTTGATACATGGTATGCTACACACAAAATTATGCAACATGTTG<text:line-break/>ACTCCTTGGGCAAATATTATTATGCCCCTATTAAAGCCAATAGAAACGTTAGTAAAACTTGTTCTTCTGA<text:line-break/>GCCTTATAGAGCTGTTAGCAAGTTGACGTTTTCAGATGAAGAAATCAGGCATTATATATATAAACGCCGA<text:line-break/>TCTCTATTTGGCATAGTTCCAAGTTGTACTCATCTTTCAATTGAAGAGCTCAGTAGAGAAACGCCACGTT<text:line-break/>AGGCTTAATTTCAATTTCAAACTTGGATCAGAATTTTTTCTTACCTAAAAACTAAAATCTTCTTGATTAA<text:line-break/>ATCACGTTTGTTCATCCTATTTTTTTATAAAACATACAGAACTAAAAAAATTGCATGATTTTAGCTGTAT<text:line-break/>ATTTAACATTTTAAAACAATTTTTTTACTTTTGCGATAAATTCTAAACGTAAACAAAGTTGAACGACATT<text:line-break/>GTGAATGAATCATGTGACTCAAATATTCATATCGCGTATTGAGCTTAGCTCTACAGAGGAGTGCATGTTT<text:line-break/>ACATGACGTCATCCACTTACATCTTTAAGAAACTGGCAGGCTGTTTCGTTTATTTTTAACTTTATAAATA<text:line-break/>TAAGACTAAAACACTAAATAAATAAAAAATAATTAAAGGGTTTGCTTTTACAAAGTGTGAATTGAAGGCA<text:line-break/>AGATTGTTAGATAATTCGGAATAGCGCTAGAGGTGGCAACACTACAGGTCTGGTTCAAATCCCGGCCAAC<text:line-break/>TTTTGTCTTTGAAGCATGTGCTGCCATCTGCCGAGAATAAAGGGGGGTGAAGAATTCTCGGTTCTTCTTT<text:line-break/>TTAGTGCATTAAAAAAAAAAAAAAAAACATATAGCGTGATTTTTTTTTTTTTAAGTATTTATTATGTTAT<text:line-break/>GTTACAGTGGGGAGAGGTACCAATTTTAAGAGGTTTCATTTTATTTTTTTTTTATTTTAAGGGGGGAGTT<text:line-break/>TGAAATGCTCCTTTTTATTTATTTCATTTTGTTTAGGTACGCTATGTAATTCCATGGTCAAATGACCCTT<text:line-break/>TTTCTTGGAACTATAAAATTATTTACCGTCAAATTTTGACGGGTATTATCTAGTGGAGTAGAGATTCATA<text:line-break/>TAAAAGGATTTGCTAAAAATAAGCATGTTAATTTGTTTAAATTTACTGTTTCTACCAACAGAGTTGATTA<text:line-break/>TGTTGTTACCAATAACAAAACTCAAAAATCTTCTAAAGCTGCACAAGATGAGTTTGGCTTTCGGTGGGTA<text:line-break/>ATTGAGAGCATGCATAGAGAAATTAAGCAACTTACTGGTATAGAACGTTGCCAATGCAGAAAACAGCGTA<text:line-break/>TCCAACGTAATCACATTAGTTGTGCATTTCTAGTTTGGGCTTTTCTAAAAAGAACTGCAAATAAAATAGG<text:line-break/>TAAAACGGTTTACCAAATAAAGTTAGGACTTTTAGATGATTATATGCAACAACAGCTCCGTTCTCCATCT<text:line-break/><text:soft-page-break/>TTACCTTATTTAGAACCTTCCATAGAGTAAGTTTTGATATTTAATTTATGGATTAATATGAAGAACTCAT<text:line-break/>GCTTACACACTTTATTAATCAGCATTTTAATTGTTTTGGTTAGTGGTTGTGTCGGGAAAGACTATAATAA<text:line-break/>GATATCTACCGCAAGAATAGACTCTGTTACTGACGCTAGTAAAGCTTTAATATTAATTCAAACTACACCT<text:line-break/>ATTGTTCATTCACGTAATGATAAAGCAATTGCAACTGAGTGGGAAAATCTTTCAGTTGCTGATAGTGTTC<text:line-break/>TTTATACTAAGAACTACAGAAATGTATATATTACACCAAACCTTACTGGTTATAAATACCACAGCATTGA<text:line-break/>ATTATACTTAGTTACCCCTGGTGAATATGTATTAAAAAGGCTTAAATATACGTGGGATAAATCATCTTAT<text:line-break/>ACATTTTCTAATATTAACAATATAGCTACTTTTTCTGTTAAAGGTGGAGATGTTTTGTATATAGGTAATC<text:line-break/>TAACAATTGATATCAAGGGATACGAACTTAATGCTCTTACTTTTTTAAATAGGGCTATTAGTATTCAAGA<text:line-break/>TAACTATGAGGTGGCTAAACAATATATAAATAAAGATTACCCACATCTTTCAACTAAATTGCAAAAAAAA<text:line-break/>CTAATAATTCTACAAAATAAAGATTAGGTTATCTGATGTTAAATTTCATAAAAAAACTTACAATAATATT<text:line-break/>AATAGCTCTAACTTTTTCTGGTTGTCAAAGCAGTCGAATTCCAGGTCAAAGCAGTAATTTAGTTTTAAAT<text:line-break/>AATGAGAAAGCTTTGATTGTATTTACAGCATCACTAAAGTCTTCTTCTTTCCCAGGTGATTCTAGTTCTG<text:line-break/>CAATTCCATACTGGGAAAATATTAATAAAAAAGATGAAATTTTTCCTTCAGAATCTGATACTTGGGAAGC<text:line-break/>TACAAGTGCTTGGGACTATGTTTTATATACTTACATAGTTAATCCTGGGGAATATAACCTAAAGAGGATT<text:line-break/>AATTCTGGTAGAATTAATATTAGATATTTTACCAGAAGTGAGTTTATTTATACAATTTTCCATGTAGAAA<text:line-break/>ATCTTATTAATAATCTTCTAGTGAGTGGAGGAGACGTGATATATTTGGGTGATATTACATTCCATGTAAA<text:line-break/>TGGTGATATGATAGATTACACAGTATCAGATAAATATTATGATAAAATATACAAAGATATAGAAAAAAAA<text:line-break/>TTTCCTATGTTAATTCATAAATTGAAGAAAAGAATTTTATCTAATTCTCCTAATCGTTCAATGCCTTCCA<text:line-break/>AAATTATTGCTATTGAAGAAGAAACAGAAAAGTTGCTTCATTAGCTGTAGCGGCTTGCTTTTGAAATGCC<text:line-break/>AGTGGCTTGCTTTCATCGGCAACAAGCGGCTCAAATTAACTGACTTTAAAAATACAGTCTGGCTCAATTT<text:line-break/>AATTGACCTTGCAAAATTCTTCCCGACTTCCGCAATTTTTAATAAGGCATAAGCTTGGAAGGCTCATAGT<text:line-break/>GCTGGGGTTTTTAAAATTTAGGCACAACAAAAGAACCTTCACCAAGCATATAAAATCCACTGCTTCCAGA<text:line-break/>AACGGGTAGGATTCCCTTCTTTATTTAAGGGGAGAGAGGTAGAGCTGCGTAAAAACGTTGCTCGAACAGA<text:line-break/>GAGAATATTATACACATTGCTTTAAGATTTTTTTTAATTCCGTAAATACAAAGCCGGTAATCGAACCCGG<text:line-break/>ACTAGCAGTGGCAGCGATTAGGAGGGGTAGGGGGGGGGGCGGGTGCCCCCCCCCCCAAAAAAAAAAAAAA<text:line-break/>AAATTTTAACTTTTAAAAACTTACTTTCAAAAATGTTTAAAATTACAATAAAAGAGACATAAAAGGAAAA<text:line-break/><text:soft-page-break/>GAAACAAATCACCCCCCCTCCAGTTTTATCCCCTAATCGCCACTACTGCGGACTAGGTCTGCTAGCGAAG<text:line-break/>TGGGACGCACGTAATCCCCCCTATAGGCCACCGGAAGAGTCCTCTTTGAGCGTCCGCAAGACATTTTGGA<text:line-break/>ATCCAAAATAGTACTTAAAAATAATAAACGCCTTCAACCAGAAAATATTCCTTCCGTGGAGGATCAAAAT<text:line-break/>TGTGATGGCAGCTCGCTGTAGAGTGAAGTAAAATCCAAGCAACCAACCAAAATAAAAAATGCGAAATAAA<text:line-break/>AATCAATCCGATCTAATCCAATCCAGCAAGAAAAGAAACTTTGAAATCGAATACATTCGAATGCTTAATT<text:line-break/>TATTAGTTAGTTGTTTACGGCTCCGATTTTGTTCGACTGTTTTGTTTATTTCGATGTCACGACCTTCTAT<text:line-break/>TGTGAAATTTGTGCTCCACAGTTATAAATAAATAAGTAATAAAATATCTCTGTATAAAAACAAACGGAGT<text:line-break/>AGACATAGAACTATTAAAAATGTGATCAAATCTTACCTACGAAAATTAACACACCAATTTTATTTCTCAA<text:line-break/>ATTTATAGATCACTTTTTAGACGGATTTTCCTGAAATGTTTAATAATCTGACTATAAATACATTTTAGAT<text:line-break/>TTGACTTTTTAGGTATTAAGTGTATGCCTCATCGAATAAAATATTCAATTACATAGGCGTAAACTTTTCA<text:line-break/>AAATTATTGAGGGGGGGGCTGGGGGCCCAAGTCTCCTGATTAAGGTTATGGTAATGAAGCATTTTTGACA<text:line-break/>AAAGAAATTTAAATTAAAATTAAAATTTAGTACTTTCGAAAGTGTTTTATTGAAGTATAGTGGCACACTT<text:line-break/>TTAATGTGTCTGAATCCGTCTGAGAAATGCTGGCGGGATATATAACATGATAAACACTATCGTTTTCGTC<text:line-break/>ATCAGAAAGAGAAATGAATGAAAAATTAGTGAATTTTTGAAAGGCAGTTGAATTTGATAGTGTTTTAATT<text:line-break/>TTTTTTTTTTTCTTTTTCATATTCCAGAAATAGTCTTCATTTAAATTGCTAGAATTTTTTTTTTTTTTTA<text:line-break/>AGTCTGAAAAGTATAAAATAAGCATAAAAATTTCGTTAAATATTGGGGGGGGGCAATATAACTTTACGCC<text:line-break/>TATGTTCAGTTACTTAAGAAAAATAAATAAAGAAACAGTTTATTAAAAAAATAATTAAATGTCGAAAAAT<text:line-break/>CGTTTTGATTACTATTTTCATGTGGCTTGTTATGTAGTAATGGGCTTTATAATTTATGTAAAAGATATTA<text:line-break/>ATATTAGAATACTTCTACAAATATTAAAAATTCTACTTTGTGTGTATTTTATCCTTTTCTTTAAAATTTG<text:line-break/>CTGCAATCTTTTTATTTGTCTTTATATTTAGTATTCTACCCATCTTAAACTATACTTTGTTTTTTAACTA<text:line-break/>AAAGCTCTTCTTTAAAAATCGTAGGAAAATGGCCTACAGAAGATTTTCAACAAAATTCTTTCATATACTG<text:line-break/>TCTCGAAATGCTTCAAGTAAGATACCAAATCTTGAACACATTGGAGCAGGTGGATTCGCTTTATTAGTAA<text:line-break/>GTTTATCAATTATAAAAGTAATTATGTAACAATTATTATTATTTTAACAGTTAACTTGATTAGAAATAAA<text:line-break/>TGCTTTATTATTTTATTACTAATTATATATTATTACACTTCTTAGCTTCATCGCCCAGCTATAAATCGCC<text:line-break/>AAATATTTCAAAATTTCATATATTCTGCTGACACAATCGTTAAAAATATTTGTGAAACTTAGTATACTTA<text:line-break/>AACCTTAGTGTGTATAGATACACAGAACTTTCAAATATACTTGTTTTATACAAGTAAATCTATGATAAGT<text:line-break/><text:soft-page-break/>TTCTTTCCTACGAAACAAATATAATTCCCATTAAAAACATCTAAACTGGGAGAAAAAAAATGAGAGTACA<text:line-break/>TAACCATAAGATGCTGTTAAAAAAAAATTAAAAATAATGGTAGTTAATTTTGAGAGACTTTTGAAAAAAT<text:line-break/>AATTTTTTACAAAACAAATAAACTTATATTTAAAAAAAGAAAAAGAAATAGTAACTGTTTTTTCGTTGGT<text:line-break/>AGTTATCTTAAAAATTTTATGCATTTTTCTAAATTTTTATTATTATTATTATTATTTATTTTACTAAGAA<text:line-break/>AACATGTTTTGATTTTTTTTTTTAAACAGCCTTTAGGTAAAAAAAAAAAAAAAAAAAAAAAAAAAAAAAG<text:line-break/>AAGAAGAAGAAGAAATTGAAAATAATTTTAGCAAAACATAATTTATTTATTTTTATTTTAATATTGTTCA<text:line-break/>TTTGAATAAAGGTTTATTATTTCAAGATGCATTTTATTCATAGTTACCTCAATTTAATTATTGCTTTATC<text:line-break/>ATCATATTGTATTCACGACAAATTAAATAAGACATTACATACTCTATGCAATATTTGTATCTACGTATCA<text:line-break/>TTATAGTCAGTGCCAGTTGTAACATTTTATCTTGGGACTTGGCAAGTTAAAAGAAGAGCATGGAAATTAA<text:line-break/>ATCTCATAGAAGAAGTTACAAAAAAGAGTTTAGAACCACCTGTTGATTTACCCCATGAGTAAGTCTTATA<text:line-break/>CACTTTCTATCCTGGTTTTTGTTATCAGGGCAGTATTGATCACTTACTCTCCTCCTAATGTATTGTTATT<text:line-break/>TCTAAATTTTGAAAAATAGATTGTCACAGAGTTCATTTCATGTTGATTATGACATTAAGTAACTAATTTT<text:line-break/>AAATGCAGTTATTAGATTTGACATTAAGGTGTGGAAGCAAAATTTTTTTATTTGCAGCTATATTTAACGG<text:line-break/>CAAATAAGGGATAAAACTGGGGGGAGGATTTATTTATTTTCCTTTTACATCTCTTTTATTGTAATTTTTA<text:line-break/>ACTCTCTTGAAAGTAAGTTTTTAGAAGCTAAAGAACTGGAGAGGAGGACCACCCTCCCTTGCCCCCCTAA<text:line-break/>TCATTACCACTGCATGCAGTTGTTGATAATAAGCTACCAAATATAGAAATTAATTTTAAAAGATTTAGTT<text:line-break/>GTCATTACAGTAAAATGTTTAAAGATTAATTTTGATATATGTTTTAGTCTTGAAGAGTTGAGTGAGATGG<text:line-break/>AATATCGAAATGTTAGAGTACGAGGAAAATTTGATCATAGCAAAGAAATGTATATAGGCCCTAGACAGCT<text:line-break/>TTTAACACAATCTAATGAAGAGGGATCACTAATGTCTTCGCAACCAAAAAGTGGTAATCTAGTAATCACA<text:line-break/>CCTTTCCACTTGACTGATAGAAAGTAAGGATATTATCATTAAGTTTTCTTTGAATTTTATATTGTAATAT<text:line-break/>AAGTATAAAAGCCCGAATTATTGTGTTATATTTCTTAGTGGCTATGACTAGCATTGATACTAATCTATAA<text:line-break/>AATGTTTTAAATAGATATTTGTATAGTTATTTATATTTTGAACTTTTTTTCCTCTGAACTTCTGATGGAA<text:line-break/>ATATTACAAGAGTATTATGTTTAATGCTTATGCAGGCAATAAATTCATATAAGTTAATCAAACCTACTGA<text:line-break/>TAATTTGTTTTTTTTTTTGATAGACTATTCCATACTGTCCTTTTTATTCTTTTAATTTATACACTTTTTA<text:line-break/>TAAAGTTGGCAATTGCTAAAGCTTTGCATATTAATTAATCTATGTTACTGTTAAAATTATATTTCATGTA<text:line-break/>TGTAGGAAAAACAAAATTCACTACACCCTGTTTATAACGATACTTTGCCGATAGCAATACTATTTTTTTG<text:line-break/><text:soft-page-break/>CTCTCTAGAATATCATTTTAGACAGCTTTTACCGATTTTAAAATTTATAATTTTTAGTAATTTATTTATC<text:line-break/>TTTGGTTAGTGTTATTATTATTATTATTATTTTTATGATTTCAAAGTATTTTGAAACTTTTTTTTTTTTT<text:line-break/>TTTAACTAAAGATTATTATTTTTATATAAAAACTGATGCCACTTTTTTTTTTTTTAATGCAGTGTAACAA<text:line-break/>TTCTTGTAAATAGAGGCTGGGTTCCAAGAAATAAAACAAATCCTGATACTCGTCCTGAAGCTCAGGTTTG<text:line-break/>TATTGAAACATTAACTTAACTACTGCTTATTCATAGTCCATAGCTTTAATTTAATTTTATTTTATAATAA<text:line-break/>TAAAAAGAAGACAATTTATTTTTAAATCTCTTTTCAAAATGTTAATATTGCATATTATATTTTATTACAG<text:line-break/>GTGACTGGCGAAATTGAATTAGTTGGCAAAGTCAGACTTCCTGAGATAGTAATTATCTTCACTTATTAAT<text:line-break/>GTGAAATTGTAGTTTGTTAAATTTTATAGTTATCTGTGTGTCATTACTAAACATGTTGTAGAATTTATGG<text:line-break/>TGTAATTAGTAAGTCTTTTGCTTATTTATATGTTGTAGAAAGTTGTTATTGAAGAACTTGGGGCAAATAA<text:line-break/>TTATAGATATAAATAAAACCTTCAAATATATACCAGAAAATAACAATTTTGCAGAGTTTTCAGAAGTGCT<text:line-break/>TAATTTCTGCAAAATATACATGGAAGAATGTTGTGTACTTAACAATAATATTATGTCCAGATTTTTTTTT<text:line-break/>TTTTTTTTTTTGAGAGTCATCAGAAAAATACCTGTTTAAATTTGTTTATAATTTACCTCAGGCATCCAAT<text:line-break/>ATGATTGGGCCAGCCCTGATCTCAAATCATATAACATATTTACAAAGAATATTTTTAGTAAGATTTATCT<text:line-break/>TATAATTATTAAAATATGTATTTTTTTTTTTTTTTCCATTAGAGCCTCAGTTTTGAATATGGACAATGAA<text:line-break/>AAGTAAAATCTAATTGCTACAAATATGGTAACATTTGTTTAGAAAACAAACATCATTCTTCTATTTGATA<text:line-break/>GAAAATCAGCTAACAAATTAGTTTCTTACAATAAGTTTAAAATATGTTTCTCAATTTAAACATTCTGCAG<text:line-break/>AATTTTTCCTATTACTTTAGTTTTAATTTATTATTATTCTCAATTTACATTTAAGAATGTATATACATAT<text:line-break/>TCTTTATTTCATAAAGAATTTAAGAATATTTTATAATTATTTGATTGCTTATTAATAATTTAACTTTCCT<text:line-break/>TATTCTTCCTTTATTTTTTTTTTTCAGAGGCCTCAGTTTTCACCAAAATCCAAACCAGGTTCTAATCACT<text:line-break/>TTTTCTATCGTGATGTTCCTAAAATGGCCCAAATGACTGGGGCAGAAGAGATTTTTCTAGATGCATCAGC<text:line-break/>AGATACAACTGTTCAGGGTGGCCCAATTGGGGGACAGACCAGAATGACATTTAGAAACGACCACCTGTCA<text:line-break/>TATTTAATTACCTGGTAATTACTTTTTCAAAAAATGTTTTATAAATTTTTATTGAGCTAAAATGTTCTTT<text:line-break/>TCATGTTTGGTTATGTAAAAATTTTCTAGGTCAAAAGATTCATGCTTGGATAAAAGCAATGTGACAAACA<text:line-break/>GTGTCAAGTGAAATTTTTATTTCTCCTACTAGTATTATTTTTATTCTATATTAGAAAATATTATAAAAAT<text:line-break/>ATTTTAATAAAAATTAAGAGTTATTCAAGAGACACATTTAAATTAATTAAGTATTAAAAATTACCAGTTG<text:line-break/>TATGTATTAAAAATTTCATTTTTAAAAATCCAAAGACATAATACTTCTAAAATAACAAAACCTGAAAAAT<text:line-break/><text:soft-page-break/>ATTACTGTACCTTTAACTATTATTTTTTATTTATGTCTTTTTCCCATTTTGTGCTAACCACAAATGTTCT<text:line-break/>TGTATAGACTTCATAAGAGATAAATGTTGCATTGACTATCAATCTTTCTTAAAGTATGATTTAACTTTGA<text:line-break/>ATTAAAAAAGGATAGTAATTTAATTTTGAAATACAGTTTCCAATTTCTTATGAATATAAAAAATAATTAT<text:line-break/>ATTTCACCTGTAATTATAGCAAAATTATTATTTATTCAATGACAGAAACTTTATAATTATTTATTTTTAC<text:line-break/>ATTTTCAATGTATAAATTAAAATCTAAATTATTACATTCTTTTTAAATGTTTTGCTTTTTCTTTGTGTAC<text:line-break/>ATATAATATAACCAATTAAAAATGTCACAACTTTCTCATTAGTTTTACTGATATTTTAAACTCCTATTGT<text:line-break/>AAAAGTTACATAATTAGAGGCTTTGTTAATTTTAATACTGATATTCGTAATTATTTTTTTGAATAATTAA<text:line-break/>TTGCTTTTATAAATTAACCTAATTAATATATTTTAGCTGCTTTTAATTATTTTTCTTTTAAATTTCCCCT<text:line-break/>ATAATTAAATTTTAAAATAATTATCAAAATTTAAATTAGTTTGCTACTTGTGCTGCTATTAAAATTTTTT<text:line-break/>TAATTTATTTTTTAGGTACTCACTAAGTGCTGTTACATCATATATATGGTATACAAAATATATTAAGGGT<text:line-break/>ATTAAAATTCTTATTTAATAGTTCAATAAAAATTAATATTTAACTTATATTGTGCTATATTTGTCTTTCT<text:line-break/>TTGATGCTTCAGTGAATCAATTTTAGAAAATATAAAAGTAAATAGACCTTTCATTTTAAATCTATTTAAG<text:line-break/>GTTTGGTTTTTTATACAATACTTACATGCATTATCTTTGTTATCAATAAGTGTTTACTCAACTTGTACTC<text:line-break/>CAAGGTTCAATTTAC<text:line-break/></text:p>
      <text:p text:style-name="P5"/>
      <text:p text:style-name="P5">&gt;emb|OZ389411.1|:13702777-13711972 Amblyptilia punctidactyla genome assembly, chromosome: 13 CGTGCTCGTTTCGGTCAGGGCGTCAGGCTCTGACCTCAACAGTTCCGCCTCCTCCAGATCCTCACATGGA CATGTCTCCATGCCCAGTGTCAGCCCATCATCATCATCTGAGATGGCTGCGCTCCACAACATCTTCTCCT CCGCTTCGTCTGAAGGCTGAAAGTTGCCCCCTCCATAGTACGAGGGGCAGCTTGAGCTCAGTGCAGGGGG CTCCCCAGATTTGGGGGAGCTACCTGCACTGAGCCCAAGGAGGGATTCCCCGACCGTGCCGGGACCCTCC TGGGGACCAATATTTTTATTTCCAGCTTCCATGTTTAAAGTACTCCTGCTATGCATCGGTCTTTGGGGAT TGGAGCAGACTCAGCTCCGGGAAATAGGCGGGGAGGGAGTAAAGGGGAGGGGGTGGAGAAATGGAGGGAA GGTTGTATGTTTGCTGGATGTTTGGATCACATGGGATGTTGGGTATGGGTTACGCGTGAAAGCACCGCAG ACAGACAGAGTTACTTTCACATTTATAATATTAGAAGAGATAACCTTTCCCAGGAACCCACCAATCATAT GCAAAAAGATTTTTTCAAATCGGATTGGTAGTTCCAGAGATTAGTGCGTTCAAACAAACAAACTCTTCAG CTTTATTATATTAGTATAGAGTATAGATTTCATATTATAAATTAACTACGAATATGGAAGTACTATATTC TAAGACCCAATTTTATTCTTCTCTACTAATTAATTGTTGTCTGCCTTGGAATCCACAAATC<text:soft-page-break/>AATCCCTCG AAAATATTTGCATTGTGCCTTGAGCCACAATTAACACCGAGTTAAAGCACATCCAGGACCAGCTATTCTC ATAAAATGAATTGTGTGATTTCTAAATATCTAAACCTTTTCAGCTTTTATCATGGTAGATTAGTAAAAGT AATAAAATCTTCATTTATTTCTTATTTCTGTTGGTACAATATGTGTTAATCTTATCTAAACATGTATAAT AATGCTGAAAAATTTGTTTGTTTGTTTGAACGCGCTAATCTCTGGAACTTCCTGTCCGATTTGAAGAATT CCTGGGGAAGGTTATAGGGTATATTTTATCTTGACATTCCCATATGTAACTCCCGTTGAGTTACATAAGT GGAACTGCGGGGACCAGCTAGTCCTAAATATAATATTAAACCCTGTTGGGTAAAAGCCAGATTCATTTAT TTTTAACTGTCTCTTTAGGTTAGAACCTTGTTCCTCTATCAGTTTATAAAAGCAGTAAAATTGTGTTAAT GTTTTTTTTGTCTTGCAGTATTTTACCGGATGATAAAATGTATGCAATAGTAAATAAGCTGAAGACCAAA AGCTCAATTACTGCTTCAGAACTGTGCATTGTTAAGAATAGTTTGATGAATGTATCAAATTCAATAGAAT TGATTTTAAATACTCATGGGGCATTACGAGGACTTGTGCGGGAGTTATCTGGTAAATATAATATTTAAAA TCCAGTTGCGATTGCATGCTTTCGTTTTATATCCCATGTTTCATTCAAATAGTAGAATAAAATATAAATC ATAATAAAAGTTAAACAATGCTTAGAATAAAACAATATTTATCTATAATATAACAGCATGAAGGCTATCA TCCTATTACGTCGTTCGTTTAAAATAAGATTGTTCTTCCTTCTGTTGGGTAGATATATTTTGTTGTTTTG AAAAAGAGTTTTCAACCCTTTACATGTTAAGATAATATCAATAACTTTTTATATTTATATAGCTTTTTTA TTTTATGTATGTAGAAAATATGTACGCAGGTACTTTATTCTAATTGTCAAACCTTTTGATAGTATCACTA TTCTAGTTTTGTTTAATAGTTGGAATTATTTATGATTTCATAAATAAAATTCTAGTGTAGATACTAGCTC TTTTTCTCTCCTTTTTTTAATTTCATTTTTTTAAACCTGAATGACGGTTGGTAAATTTTTCTTTTAATAC ATTTAAGAATACTAATTAATTATTATTGTCAGAAACTACTTATTTAACATATGTGTTAATTGTTGCTATG GAAGGTTGGAGTCTCGTGCAAAGGCTCTTCGAGCTTAAATGGAGTCTCAAATATTGTAAATGATGATAAT TGATGATGAACTAAATGATTCAGATAAAGTATTTTAAATTTTGGTAACATTGAAACTGTATTGTTTTAGG TTTATTTAACTTCAATATCAAATAATTTATTAGTAACTTCCCAATATTACAGGTCATGATGCAGCAAAAC AGACTATTGCGGCAGGCTGTCTTTGTAACCTTGCGTTAGGAGACTGTCAGTCTAACCTCGTTATTGCTAA GGCTGCTGGCCCACACCTTGTTGCAGCACTTGACAATCTTGCCATGGAACTGGCTGTGAGTTTGTATAGA TTCAGTTTATAAGCCTGAGTCCATGTTCTTAACTAAGCTGTCGTAACCAGTTACGCAGAAGTTTTTTTTT CGGTTATTGGTAACTAGTTGAGAAAGAAAAATTATTTTTCTACTTTCGTAACTTATTCTTAGTTACGGAT GTGGAAAAGTTGCAGGACCTTTTTGTAAGTAGTTGGCCACTTATAATGGAAAATTTCAA<text:soft-page-break/>TAATGACAGAA TTGAATTAAACAATTCAAACGAATAAGTAATATTTATTGGTGCATTTGTATTTTATTTAAGACTAGCTTG GTCTTGAAAAATTCGAAAATTAATGGTCACTCCAGGTATGCAACATAATATGTTCTTGTTAGTAAAACTA TTAAATTGATACCAAGTTTAGTTTGAACATATTATATTAATAATAATGTAAAAATTATAGTAATATAATT TCATTTTAGGTAACTTGCGCATGGACTCTTGGAAATCTAGCTGGGTCTGGTCCCAAAGTATGTGAGCTGC TAATCACGCAGGGGACTCTCAACAAGCTGATCAGTCTCTTATGTAGTGCCAACGAAGAGGTGAAGAGTGC TGCAGAGTACGCAATCATGCATTTTGTATATCAAATGAAAGACGATTTAAGGTTTGTGTGTTTATTATGT AATTGATTGCACAACAAAATTCCTTGACATGATTTCATCTGTCTGTTTGTCATTTGTCGCGGCCTACAGG TCCCAGTTTCCAAGATTTTTACCAAATTGGCATAAATGTTCTTTGGTTCAGTCAGCTTTAGTGCCGGTCG ACCACCCTTAGGCGACATTCCCGTGGCAGCGCCCTGCGCGGTGCTAGTCTATTTATTTTTTTACGTAAGC TTTACCAAGTTGTTTTCACCCTTATTGTTGACAGTAGGGCTGAATCTTTTGGTAATAAAGAAATTAAATT ACCTTATTTTATAGACTCTAGCCGCGCAGGCCAATAAGTGCTCTGTAAACCTGAAGCAATGTCTTCTTCT CCAATATTAAATCCATACTTCCCACTCAAAATGCTAAATGCTGCAATTGCGTTTCCTGAATTGATTATTT GATGATCTCCTTTTAAAGATGGCAAAGAAAATTCTATTGATTGAATAGTCGATTGAAAGACTATTCTGTT ATTCTGTTTTTCGCAATTCTACTCAAATCCTCCTCGATATAAGGGAGATTTTTTGTTTATTGCGTGTTGT TCTAGCGTGTTCATTATAGATTTTTCTTGTGGTGCTATTACGCAAGGAACATTAGGTTTCATTATTCCAG CCTTTTCGCCTGCTATGGTTTCTACGGTAGGACCAAGATATTCTGTATGGTCAAGTGCAATGGAAGTGAT GATCGTTAGAATCGTATTATCTATGACATTTGTTGCATCAAGCCTTCCACCCATACCCACCTCAACTAAA GTAATATCCGCTTTATGGCGAGCAAAAGCTAAGAAAGCTGCAATTGTTGTGGCCTCAAATAGAGTGATAG GTTGTTCCGCAACTGCTATACTGCATTCTTCCAGTGAGTTATGTAATTCACTAAATGTGGAGAAGTGTAC GTATGTGAGATAGACCTGCTTGTTGAACATAAGGTTGTTGGAGACTACCTGGCTGTTGACCAAAGGCAAC CATAGAACTATGTCTTACATCTACCTCTACAAACTCATTACCAATTTTTATAAGGGAACCTTCATCTGTT GCACCTTTATTAAAAACAGCATATATCAGTTTCACTTTGCCAGCATCAGTAATTACCTTATACGCTTCAC CTTCTTTATATCTTTTCAACTGGTCCTTAGCATCTTTTTCTTTTTTATCTAATTCTCCTTTCTTAGCAAA TTTTAGCTCTATTCCAACTGGGGAGTATTCTTTTTTTTGATCAGTAGCATTTATAACCAACATAACATCC AAGTTTTCTCCACCACCTATTTGAAATTCAGTAATAACTTTTATATTATCTTCTCCGTAGCTACTAAATA AACCATGCAATACAGCTTGAAATGTAGCCTCATTGCTTATTAATAATTTGAAAGGATGTA<text:soft-page-break/>GTATATGAGA AATTTCTTCAAATAGTTTTTTGTAATCATCATATTTACCAAATTTTATAGCTTTGCTCAAAGCTGCTTTA AATTTTTTATGGAAAATAAAAAATGGAGGTAATTTTACCTTGTAATTTTTTTTACCTCTTTTATATTTAT CCAATGAGTCATACGTATTTACTGTAATCCCCTTATTCTTATTACTAGGTGTATCATCCAGGTGGCAATT TACCTCACTTATTTTTATATCCTTAATTTTCTTAACTCCGTCTATATTTTCAATGGGACTGGTTTTATTA TCTTTCATCGCCTCTACTTCATGTATAACGAAATTACCCAAAGCAGCTTTTAAGCTTTTTTTATTATCTT CATAAATCTCAGTAATATTCAATACAAGTACTTTATTACCTCAAATTAATACGGTAGTCGTAACACAATC TAAAGCGTACTTATCTATAAAGGTTGGACGATGTCTCGAGGTTCATTCTGATGTACCTTGATTACAAATA AAAATACGTTTGCTTAATTTTTCATCTTAAATTCTATCAGGAATAAGCATTAACTGTCCTATAATAAATC GACTTACGTAATGTATATTATCACTACCTCCATTGCTCGAAACAATTCCATAGTAAAGATACTCTAGCTG TGTTCTTATAACCTCAGCATTCGCTGCTTCAGTGCCAAGTAACTTTTCTATTACAGAATTACCTTCTCGA CTAAGAAAATTTTCTACATAAATTTGAACATTTTCGTGATGAACCATGTCAAAATTTAATCCTACACAAA TAGCTTCATTAGCTATAGTAATGATTCTTATAGAGTTAGAAAAAGAGCCCTTAACATAATCTTCTGCTTG CTTCAATGCTTTTATCACTGTACTTATCTCACCAGTACCTTCTTTAAGCTAAATAATAAAAGGAATAGAG CTTAGCGACTTATCAGAACCGCGCAGAAGTAAAATAATGTCTGCGTAACTTTTTCCAGCAAATAATTCGA GATAAAGTTTTAGGTGAAAACGATACTTAAAATTTATCAAAAACCCATGATGACTTGATTCTTTGCCGCT AAATAGCGTTTCTTTTTCATATTTCTTATAGACATTTGTAATATAATTAAACATTCTTCTAGCGTTCTTT TTTACTTCTTCGAAATCTTGATTACTCAATTTTGAAATTAAGCTCTCTAGGTCTTGTTGGTCACGATCTT TTTCTATTTCTGTAAAGCCTTTTTGTGAATAATCAGTATTTTTACTAAAAGCTGAATCAACCTTTCCGTA CTTTACTTCTTTTCCTGTAATTGTTATTGCATGCTCTTCTTTTTCTAGTTTATCAAACTCTGCTCCCATT TTCCATTTCTGTGCTATTTTTTCTAACTCTCCTTGAGAGAACTTTAAATGCATGTTACCATCAACTTGAT CAGACGCCGTTATACACTTAAGTCCCTCATTAGTTAATATAGCTATTTTTAAAGTTCTCTTATTATCAAA ACGAAAATGAAGTTTTTTGATACCAATTTTAGTAGCAAGTTCTGTGTCTAATACAGTAGCAAACATACCA AAAAAGAAACTAGGGAAAAAGCCGGGCTTTCCAACTGAATGCAAAAAAGAAGGAGATTGATTGATAAACG ATTGGAACCTGTTGTGAAAATCTAGGAACTCGTCTTTTGATTTATTTCTTATCAACAGAAGCTGTACCAA CTCAAGCGGCTTGACATTACTTGGCATATTACTCTCCTATTTGCTATGGCCTAAGATTTTATATTATATG GAGTATCAGTCGTACTGAGACTTGACTGTGGCAAAGTATCACCATCTTCACGCAAAATT<text:soft-page-break/>GATTCTTCAGA AGCTTCTTGAGCTAATTTAGAAAACACTTGTTCTCCTAATTGCAATTTCTTACCCCTATGAAATAACTGA ATTTTACTTAATACAGAATCTTTAACCTTTATCATCTCTTCACTACTCATTTCTTTTACTCGCTTTAATA TCTTCCCTAATATTTCTTCTTTACATACCTCTTGTCTACTTGGATCCACATTTAAATTTGCTATTGTATC TGTAACTGAATAGTCTACAAAAATAGGGGAAATAGATTGCTCCCCGCGGTCTTGAGTTCTTAATTTTATT ATACGTTCCCAAACATTCATCATACATTTTTTTGTTTCTTCAGACAGATCTGGATTCTTCAGTACTTGAT CTGATAATGAAGTTAAAAAAGTTTTGTAACGTTCACATTCAATCTGACTACACAATCGGCTTAATTCCAT AAAAGAATCAAAGTAATACTGACCTACTAGCACATTCAACACTGCATAATAAGTATTTTCCTTATAATCT CTATCTAGTATTTTTTTCTTTTGCTCATCATCCATTTAAGACAGGCTAAACTTTTCTACTTCTTTGTAAC CCTTTACTGCAGATAAAGCTGCTCAATTAACAGATCATCTTTATCTTGACTAGAAATATTAGGATCTCTG TGTAATTTATTATAAAAGTATTCTCTTCTTCTTCTATACCCTCTTCCCAATTTTTACGTGAGTTTACTCG TATGGCTTCTTTCAAACCTTCAACTGTTGTATATTCGTTTAGTTTTCCCATCTGTATATTAATAAGGGTC GACCAAAAAGCTTTTATAGGGCTACTCTCTTTATGTTGATCCAAAAGTTCATCTTTTAGCTTATCATCCG AAACATCTTTTTCAAATGCACTATTTTTAAACTTTATAAATACTTGCTAAAATAATCTAGGTATCTCACC TTCTAAGCAGTATTTACATGCTAAGTAATATCTTTTAGAAATGTTAAATGGATTCTCTTTTCCATTTTTA TTTTTTTCTTCAGTTACCCTTTCACCAACAATTTCATTTTTTAATCTTACTCCATCCCAATAAGAATATA TCAGAAAAAAAAAATAGTATTTCCTCATCAAAATCTTCAATTAATTGAATATAAGCCCTCAACCATCTTT CTACTCTACGATGTTTTCTTGCTTTAACTTGATTATCATCGCCTTTAATAGCATCTTTTATTATATCAAG TATTTTATTGTAATTGTGATCCAAACCAAATTCCATACCCGCAACCAGATTTTGTATTTTAATATAAACT TAAGTCTAGTAAATCCAAGCCAATCTTTTTCTCCAAACCTTACCACTGCACAACAGGAAATTATATTTTC ATTCTAATAATTAATTGTAAAACACTTTTACTTGCGAAAAAAATAGACCTTGCTTTAACTAAAGAAATTC CTATTTTAGTGCCACAAAAATTTGAACTATTGACAGATTGCAAAAAGGGTCGTATATTTGTGAGAACAAG CCGCGTAAAAATAATTATATAAAAATAGAATATTTAAATTATTTTCATGAGCTTAGGCAAAATAGTTCGT ATGTAGATGTGGGTGAAGTGGGCTAATGTGGTTAGTTTTAGCGTATAATGAAACTACCATAAAAAAGTTC GTATGTATCGTTTGGTAGACCAACGCACCCCAAAACAAAAAGTTCTCACGGTTATTATTTTTAATTAAAA AGAAGCGTCCATATTATTAATTTAATGACAAAAAATATTGAAATATATACCTATTGAAATAATGTTATTA GTTATAAAAAGATATCTTTACTTTGTTGATTTTTTCAACTATCATGTGAATATAAGTTTTTA<text:soft-page-break/>AACTATCA TGGTCACTAACATTAGAGTTAACTTTTGAAACGGGATATTTACCATGTTGATTATTAATTTTGAGTAACC GATATTTCGGCGCTGTTGCAAGCACCATGATCACGGCGATACTGAAGCTGCGGGTATGTTGCTATTATTC ACGAGCAGATATATCTATCTACCCGCTTTCTTGTGCGTTTGGACCGTATTTTACCACTACCACTGTCACT TTTGTCACTTTGAACTCGATTGTACTGTCTACACACAAAACTCACTGTATCGGCTTTCGGTTGTGTTTTA AGATTAGATGGATTTTTACATAACTGTACCACTGGGTTCCATGCGGCTGATAGACGTCACGGATTATGAT TTAAAAATCCAGACTTTACTGAGTGACGTGAGTACTTATAAGAAAGTAGATTATAACCCGACGGCAAGAT TTAAACGCAGCACTCACCAAGTGGTTAAGGAATGTAGTCACGCAATCGGCTCAGATATGTCAAAATACCT ACTTCGCGCCAGAAACGTACAACCACCTAAGTTATACGGCTTACCAAAAGTCCACAAAAACAACATACCG CTAAGACCAAGAATAGTAAGCCAAATAGATTCACCTACGTATGAACTAGCGAAACACGTTGCCAGTGTGT TTCAGCCTTTAGTAGGTAAATCTACATCACATGTAAGAGACTCACGTCATTTTATAAAGATCATTCAATC GACCAAAATTGAACATGAAGAATCCATGGTCAGCTTCGACGTAGAGTCCTTATTTACTAGTGTGCCAGTG GCAGATTGCATGAAAGTTGTAAACAAAAAACTCGTCGACCATAACATCCCAAAAGAATATGCTTTGTTTC TTCAACACTGCCTTGCGACCAGCTACTTTATATACCGAGGCCAATATTACCTACAAATTGATGGCGTAGC AATGGGCAGCCCGGTTGCACCGGTAGTAGCGAATATTTGGATGGAGTATTTTGAGGAACTATACTCGAAT TCAGAAACCGAGATAATTTTTGTAAATAAAGAAATGTCATGATATGTCACTGTCATAATGACAAATCAGG GGTAGAGTACTTTTTTACCATGGATCAGTAAATAATAGTAATGGCGCGCTGTTTTGATTGCGTGATAAAT GACTGACAAAAACAAAATAAAAACTC</text:p>
      <text:p text:style-name="P5"/>
      <text:p text:style-name="P6">&gt; OZ389411.1 Amblyptilia punctidactyla <text:span text:style-name="T4">seq restreinte aux 3 seq </text:span><text:span text:style-name="T5">prot/</text:span><text:span text:style-name="T6">Avant</text:span><text:span text:style-name="T5"> modification</text:span></text:p>
      <text:p text:style-name="P5">ATGTGGAGAAGTGTACGTATGTGAGATAGACCTGCTTGTTGAACATAAGGTTGTTGGAGACTACCTGGCTGTTGACCAAAGGCAACCATAGAACTATGTCTTACATCTACCTCTACAAACTCATTACCAATTTTTATAAGGGAACCTTCATCTGTTGCACCTTTATTAAAAACAGCATATATCAGTTTCACTTTGCCAGCATCAGTAATTACCTTATACGCTTCACCTTCTTTATATCTTTTCAACTGGTCCTTAGCATCTTTTTCTTTTTTATCTAATTCTCCTTTCTTAGCAAATTTTAGCTCTATTCCAACTGGGGAGTATTCTTTTTTTTGATCAGTAGCATTTATAACCAACATAACATCCAAGTTTTCTCCACCACCTATTTGAAATTCAGTAATAACTTTTATATTATCTTCTCCGTAGCTACTAAATAAACCATGCAATACAGCTTGAAATGTAGCCTCATTGCTTATTAATAATTTGAAAGGATGTAGTATATGAGAAATTTCTTCAAATAGTTTTTTGTAATCATCATATTTACCAAATTTTATAGCTTTGCTCAAAGCTGCTTTAAATTTTTTATGGAAAATAAAAAATGGAGGTAATTTTACCTTGTAATTTTTTTTACCTCTTTTATATTTATCCAATGAGTCATACGTATTTACTGTAATCCCCTTATTCTTATTACTAGGTGTATCATCCAGGTGGCAATTTACCTCACTTATTTTTATATCCTTAATTTTCTTAACTCCGTCTATATTTTCAATGGGACTGGTTTTATTATCTTTCATCGCCTCTACTTCATGTATAACGAAATTACCCAAAGCAGCTTTTAAGCTTTTTTTATTATCTTCATAAATCTCAGTAATATTCAATACAAGTACTTTATTACCTCAAATTAATACGGTAGTCGTAACACAATCTAAAGCGTACTTATCTATAAAGGTTGGACGATGTCTCGAGGTTCATTCTGATGTACCTTGATTACAAATAAAAATACGTTTGCTTAATTTTTCATCTTAAATTCTATCAGG<text:soft-page-break/>AATAAGCATTAACTGTCCTATAATAAATCGACTTACGTAATGTATATTATCACTACCTCCATTGCTCGAAACAATTCCATAGTAAAGATACTCTAGCTGTGTTCTTATAACCTCAGCATTCGCTGCTTCAGTGCCAAGTAACTTTTCTATTACAGAATTACCTTCTCGACTAAGAAAATTTTCTACATAAATTTGAACATTTTCGTGATGAACCATGTCAAAATTTAATCCTACACAAATAGCTTCATTAGCTATAGTAATGATTCTTATAGAGTTAGAAAAAGAGCCCTTAACATAATCTTCTGCTTGCTTCAATGCTTTTATCACTGTACTTATCTCACCAGTACCTTCTTTAAGCTAAATAATAAAAGGAATAGAGCTTAGCGACTTATCAGAACCGCGCAGAAGTAAAATAATGTCTGCGTAACTTTTTCCAGCAAATAATTCGAGATAAAGTTTTAGGTGAAAACGATACTTAAAATTTATCAAAAACCCATGATGACTTGATTCTTTGCCGCTAAATAGCGTTTCTTTTTCATATTTCTTATAGACATTTGTAATATAATTAAACATTCTTCTAGCGTTCTTTTTTACTTCTTCGAAATCTTGATTACTCAATTTTGAAATTAAGCTCTCTAGGTCTTGTTGGTCACGATCTTTTTCTATTTCTGTAAAGCCTTTTTGTGAATAATCAGTATTTTTACTAAAAGCTGAATCAACCTTTCCGTACTTTACTTCTTTTCCTGTAATTGTTATTGCATGCTCTTCTTTTTCTAGTTTATCAAACTCTGCTCCCATTTTCCATTTCTGTGCTATTTTTTCTAACTCTCCTTGAGAGAACTTTAAATGCATGTTACCATCAACTTGATCAGACGCCGTTATACACTTAAGTCCCTCATTAGTTAATATAGCTATTTTTAAAGTTCTCTTATTATCAAAACGAAAATGAAGTTTTTTGATACCAATTTTAGTAGCAAGTTCTGTGTCTAATACAGTAGCAAACATACCAAAAAAGAAACTAGGGAAAAAGCCGGGCTTTCCAACTGAATGCAAAAAAGAAGGAGATTGATTGATAAACGATTGGAACCTGTTGTGAAAATCTAGGAACTCGTCTTTTGATTTATTTCTTATCAACAGAAGCTGTACCAACTCAAGCGGCTTGACATTACTTGGCAT</text:p>
      <text:p text:style-name="P5"/>
      <text:p text:style-name="P5"/>
      <text:p text:style-name="P7">&gt;OZ389411 <text:span text:style-name="T7">prot 1 2 3 rassemblées</text:span></text:p>
      <text:p text:style-name="P5">MPSNVKPLELVQLLLIRNKSKDEFLDFHNRFQSFINQSPSFLHSVGKPGFFPSFFFGMFATVLDTELATKIGIKKLHFRFDNKRTLKIAILTNEGLKCITASDQVDGNMHLKFSQGELEKIAQKWKMGAEFDKLEKEEHAITITGKEVKYGKVDSAFSKNTDYSQKGFTEIEKDRDQQDLESLISKLSNQDFEEVKKNARRMFNYITNVYKKYEKETLFSGKESSHHGFLINFKYRFHLKLYLELFAGKSYADIILLLRGSDKSLSSIPFIILKEGTGEISTVIKALKQAEDYVKGSFSNSIRIITIANEAICVGLNFDMVHHENVQIYVENFLSREGNSVIEKLLGTEAANAEVIRTQLEYLYYGIVSSNGGSDNIHYVSRFIIGQLMLIPDRIDEKLSKRIFICNQGTSETSRHRPTFIDKYALDCVTTTVLIGNKVLVLNITEIYEDNKKSLKAALGNFVIHEVEAMKDNKTSPIENIDGVKKIKDIKISEVNCHLDDTPSNKNKGITVNTYDSLDKYKRGKKNYKVKLPPFFIFHKKFKAALSKAIKFGKYDDYKKLFEEISHILHPFKLLISNEATFQAVLHGLFSSYGEDNIKVITEFQIGGGENLDVMLVINATDQKKEYSPVGIELKFAKKGELDKKEKDAKDQLKRYKEGEAYKVITDAGKVKLIYAVFNKGATDEGSLIKIGNEFVEVDVRHSSMVAFGQQPGSLQQPYVQQAGLSHIRTLLH</text:p>
      <text:p text:style-name="P5"/>
      <text:p text:style-name="P5">&gt;OZ389411.1 <text:span text:style-name="T8">prot 1</text:span></text:p>
      <text:p text:style-name="P5">MPSNVKPLELVQLLLIRNKSKDEFLDFHNRFQSFINQSPSFLHSVGKPGF</text:p>
      <text:p text:style-name="P5">FPSFFFGMFATVLDTELATKIGIKKLHFRFDNKRTLKIAILTNEGLKCIT</text:p>
      <text:p text:style-name="P5">ASDQVDGNMHLKFSQGELEKIAQKWKMGAEFDKLEKEEHAITITGKEVKY</text:p>
      <text:p text:style-name="P5">GKVDSAFSKNTDYSQKGFTEIEKDRDQQDLESLISKLSNQDFEEVKKNAR</text:p>
      <text:p text:style-name="P5">RMFNYITNVYKKYEKETLFSGKESSHHGFLINFKYRFHLKLYLELFAGKS</text:p>
      <text:p text:style-name="P5">YADIILLLRGSDKSLSSIPFII</text:p>
      <text:p text:style-name="P5"/>
      <text:p text:style-name="P8">&gt;OZ389411.1 <text:span text:style-name="T8">prot </text:span><text:span text:style-name="T9">2</text:span></text:p>
      <text:p text:style-name="P8">MVHHENVQIYVENFLSREGNSVIEKLLGTEAANAEVIRTQLEYLYYGIVS</text:p>
      <text:p text:style-name="P8">SNGGSDNIHYVSRFIIGQLMLIPDRI</text:p>
      <text:p text:style-name="P5"/>
      <text:p text:style-name="P5">&gt;OZ389411.1 <text:span text:style-name="T8">prot </text:span><text:span text:style-name="T9">3</text:span></text:p>
      <text:p text:style-name="P5">MKDNKTSPIENIDGVKKIKDIKISEVNCHLDDTPSNKNKGITVNTYDSLD</text:p>
      <text:p text:style-name="P5">KYKRGKKNYKVKLPPFFIFHKKFKAALSKAIKFGKYDDYKKLFEEISHIL</text:p>
      <text:p text:style-name="P5">HPFKLLISNEATFQAVLHGLFSSYGEDNIKVITEFQIGGGENLDVMLVIN</text:p>
      <text:p text:style-name="P5"><text:soft-page-break/>ATDQKKEYSPVGIELKFAKKGELDKKEKDAKDQLKRYKEGEAYKVITDAG</text:p>
      <text:p text:style-name="P5">KVKLIYAVFNKGATDEGSLIKIGNEFVEVDVRHSSMVAFGQQPGSLQQPY</text:p>
      <text:p text:style-name="P5">VQQAGLSHIRTLLHI</text:p>
      <text:p text:style-name="P9"/>
      <text:p text:style-name="P9">&gt;OZ389411.1 <text:span text:style-name="T5">seq réarangée sans codons stop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&gt; <text:span text:style-name="T10">EF611940.1 </text:span>VIRT-2052721:5'3' Frame 1, start_pos=95</text:p>
      <text:p text:style-name="P5">MEVLASNQRINIERGINEGILPYITRIYRSYLGSLQNDIQNRSQKFESHG</text:p>
      <text:p text:style-name="P5">FFLGLLANFIHLYTIDIDLDLSPGNSYVAFLICHQAER</text:p>
      <text:p text:style-name="P5"/>
      <text:p text:style-name="P5">&gt; EF611939.1 VIRT-2164278:5'3' Frame 2, start_pos=80</text:p>
      <text:p text:style-name="P5">MEVLASNQRINIERGINEGILPYITRIYRSYLGSLQNDIQNRSQKFESHG</text:p>
      <text:p text:style-name="P5">FFLGLLANFIHLYTIDIDLDLSPGNSYVAFLICHQAE</text:p>
      <text:p text:style-name="P5"/>
      <text:p text:style-name="P11">&gt;ref|NW_025319039.1|:483956-495073 Drosophila ananassae strain 14024-0371.13 chromosome 4 unlocalized genomic scaffold, ASM1763931v2 tig00000066, whole genome shotgun sequence<text:line-break/>TAAGTTCAAAAAAGGCCTTTGATCCAGATCATATCAAGAACTATAGGGCTAAAAGGTTAACTGAAGGTTT<text:line-break/>AGTACTTTAAAATCAAAAAATGCTTCTAATTCATCTTATGTAAAATGGCATCTTACACAAATTTATTGAA<text:line-break/>TGTTGTTGGTTAGTGGATATGTTGATAAGTAAATTTCTGCTGTTTTATATGTAACTAATTTACTTATCAA<text:line-break/>CATATCCACTAACTATAATCTGTATACTGCTACACAGTTGGAAGTATTTTTTGATTTTATTATGCAATTT<text:line-break/>GGAGAATTTTTATGACTTTTTTGTTGACTAACAAGACGGTATCTTTTCTTCTTTCGCTGTAGCAAGTTTT<text:line-break/>TCCTTAAGTTCATCATTTTCTGCTAGAAAATCTTTATTCTCTTTTTCAAGTTTATCTACTTTTTTCTCTA<text:line-break/>ACTCTTGAACACTGTTATTTAAGGATTCATTCATCTTTTCCAATCCCTTCAATTTTTGTTCAAGATACAT<text:line-break/>GCTTTTAGAATCACTTTGTGGTAATCTTGTACCAATATTTACGAGAATTTCTCCTACAAAATCCATAAAC<text:line-break/>TTTTTGAAATGTCTCTCATGAACTATCACTTCTTCACTTAGTGTAGTATTACCCAGCTTTTCCACAATTT<text:line-break/>CTTGGATTTTTTTTAAACTATTGGATAATAGCTCCATTCGTTCAACAATTTTAGTTACTTCACTTACGTT<text:line-break/>CAATTCATCACTCAGATCTGCATTACTAGTATAATTCTCACCAGTGGTAACTAGGTTAGATGGATTGGCA<text:line-break/>GGTTTAATCGGGGTACTCGTATCAACAGAAGCTCCAAATGGCATAAACAGTGCACTTCGGCTGCTCTTAA<text:line-break/>TCGATCTACCTAGTGAAGGTATATCACTATTATAAAGTGTTCTATCACCACTAGAGGCAACTTGCTCTTG<text:line-break/>TCTATAATTTGTAGAAGTTCCTGTTGGACTAGTACCATTTTTCTGATCTTCTCTACTGCTTTCATTCGTA<text:line-break/><text:soft-page-break/>AAGCGCTTCACTCCCATTACCCTCCTAACATTCTCTCCAAGTTCTTCTCTTTCGATTATAATACGAGATT<text:line-break/>CATTTTTTTCATAGTTAATTTTATCATATAATTGTTCACATTCTTTGTAGGACAATATTGGTTGTAGCGT<text:line-break/>CTTCTTCTTTACTTCTTCATCGTAGAAAGCTCTCAGCTTATCATTTGATAATATTGCTATAGCTTCTTTT<text:line-break/>ACATCAGGATGCAATTGAGAATGCCCATTTTTGCATGAATGAACACGGTTCAGTAGAAAAATCTTAACAG<text:line-break/>AGTGTTGCTTGTATTCCATAATTTCCTCTAATGTAATTCCCATAACTTTTTCTTGTGATTCTATGTATCC<text:line-break/>TAGAGCTTCTTCAAAGTCTTGTCTGTTAGAGGTGAGAGGTTGAGCTTTTTTTAACTTTTTGATCTCACTA<text:line-break/>TCTTTTGGATGCACACCATTAACTTCAATAACAGGGATAACACTTGCAGAGTCAATCGCATTTAACACAA<text:line-break/>TACTACAATCATCTTGATTTTTTAGGAAAGCTTTTAGCTGTTTTTTAAAGTTCAATAAATTACCTAATTT<text:line-break/>ATCTTCATTAGTTTTAGATTTTTTGATTTGATCATAAACGTTTCTGGCTGCTTGGTTATTCTCTTTATCA<text:line-break/>GTCCTTATTTTACTTTCTAACTTACCAAGGAGTTTGCTCAGTGGTTTTTTAAGTTTCTTATAATCGTTAA<text:line-break/>CAAGCAGTTCTCTTATCCGTCTTTCAAAATCTCCTTTTTCTTTGAATCTCAAAACAGTATATAGATCATC<text:line-break/>TTCAGCCCTCTGCTGATCGGATTTTGTATTTACAACCATAACCTTACCTAACACTAACAGATACTGCTGA<text:line-break/>ACAGAACTTAAGGGCGAAGTTAAAACACACTTAGTTAAAGTCATAAGCACTTCTCCAATTAATCTTACTA<text:line-break/>ATATTCTTCTGGAAAACAACATATCTACTGACCTTATTCTTGGGAATATAAATAGAAAAAGTGCATCACC<text:line-break/>TATAGTCTCCAGAAAACCTGGTGTTAGCTGTCAAATTAAGATTTCTAGAAAATACTCAATAATTCCAGAC<text:line-break/>AGATTTCTCTAGGCCTGACCAGAACGTTTGGGTATCAAATAGGTCTTTCTGGAGTAATTAGGTGTTGTAA<text:line-break/>CTTAGTTACAAATTTAGTACCATAGCGTTGTTTTCATGATATAGGGAGGTTTAAATGCCAATAGAAACAA<text:line-break/>AACGTCAGGCTGAAGTGCTTAAAAAGCTACAAGATGTGATAAAACATACAGATCGTGACATTGCGGCTGG<text:line-break/>AAGAAAGTTAGCTATTAAAAGGTGGGTCGAGACCTATATAGAGTATATCAAACTTTTTAAGGATGATAAG<text:line-break/>CTGGAATTCTTATATAATGTTTTTCGAGATGAAGGTTGTTGGTTAGGTACAAGGTTAAACAATACTGTTT<text:line-break/>TAGGTCAGAAATTGACTGAAGAGAAAATAGGAGAAATCGATAACCCACTACCAAGGTATGGTATGGCATC<text:line-break/>TAGGTACTGTATAACGGGCAAGATAGGTGATTTTTTCAACAAACAGTTTGTACTCTCTAGAGGTCAATTT<text:line-break/>ACTTCAGAAGAGGTAGATAGTCAAGGTAATCCGATCAGTGATCAATATGTAAGAAACATTCTGCTATCAT<text:line-break/>CCATGAAGAGAAATGGTCCTGTGTTTGATTTCTGGATCGATAGAGAATCTGGGGAATTAAAGAAGTATGA<text:line-break/>TGCAGTAGAAGGTTTTGACAGTGCTGTAAAACTTAAGTGGAGCGAAGGGGTAGAGTATTTTTATAATCAG<text:line-break/>TTAGAGGAAAAAGATAAGGAGAAGAAGCTTACAGAAGCTATTGTTGCTCTTTCTCGTCCTCAATCTGTTA<text:line-break/><text:soft-page-break/>AGAAAGACGCTCCTATTTTAGATTTTTGTGTAAGGAATATAGGCGATAAAGATACTCTTTTACAGAAATT<text:line-break/>ATTGCAGAAAGATAAGGGAGTATATTCCCTTCTTGCTGAATTAATAGAGTCATGTTTTTTTGATACGGTT<text:line-break/>CATGATTTGGTACAGTGCTGGTGTTATAAAGGCGTTTCAGCAGGAGGAGACTGTTCGGACAAGATATTCT<text:line-break/>CACAGCAAGACTATGAACTTTTTCTTTATTCACTTTCAAATGTGATGTTGAAAAATCCTGAGTTAAGTGT<text:line-break/>TCAAGCTAGATCCCTTATTATGGAGATTTGGAAATGTGAACGCTTTGCTGAATACAGAGAGACCTCTGTT<text:line-break/>AATACTTCTAATTATACAGTTCCTATAAAGAGTGTACTTGGGGGATTAATCATTAATTGGAAACGAGAAG<text:line-break/>ATGTTTGTAAGCCCGATAGGAAAATAGAGAAAGAAGAAATATTAGATATGATTTCATTTGCCAAAGGTTG<text:line-break/>CTTTCCTGAAAAGTTTGACCTTTTTAAAGAAGTCATGATAGAAAATCTTAGAATATGTGGTAGGGAAGGA<text:line-break/>AAGAGGAAAGGTGTAGATTACGGCAAGTTTGCAGAAGAGTTATTTCTTCAGTTAGAGAAAGTAACTTTAC<text:line-break/>CTTCTGTAGGTGATGGTCCTTGGAATAATTTGCGGTCTCAATCTAAGGTATCTTTGCCACTTGATGGTTC<text:line-break/>TGGTGATGGCCCACAGTCTGAGTTTGAAGCTCCTAGTGTGAGTGGTATTTCTGGTTCTCATAAGAAAAGA<text:line-break/>AGAATCTAGTCTACTCATTAATGTGAGTGGTTTTTCTGGTCTTAGCAAATAGAGAGGTGCTTTGTGTCTT<text:line-break/>TAATAAGAAGTTTAGTGGATGGAGATCTTGATGGTTTTAGACAAGAGTTTGAATCCTTTTTAGATCAATG<text:line-break/>TCCATTTTTCTTGTATCATGTAAGTACAGGACGTTTCCTTCCTGTATTCTTTTTCAGTATGTTTGCTACT<text:line-break/>GCTCATGATGCTAATATCTTAAAAGCAAATGAGAGAGTGTATTTTCGTTTTGATAATCATGGTATTGATA<text:line-break/>CAGGTGGTAGAAATAGAAATACAGGGAACCTAAAAGTCGCTGTTTATCGTGACGGACAGCAAGTTGTCAG<text:line-break/>ATGCTACAGTATTTCTGATCGTCTTAATAGTGATGGGTTAAGGTTCAGTACAAGGGAAAGAAATGCTCTA<text:line-break/>GTGCGAGAGATTAGAGGGCAAAATCCAAATTTAAGGGAAGAAGACCTAAATTTTGAGCAATACAAAGTAT<text:line-break/>GCATGCATGGAAAGGGCAAGAGTCAGGGAGAGGCGATTGCAACAGTATTCGAGGTGATTCGTGAAAAAGA<text:line-break/>TTCTCAAGGTAGAGATAGATTTGCTAAATATTCAGCGTCTGAGATTAGCCTTCTTAGGCATATAGAACGC<text:line-break/>AATAGGCTTAATGGGATTAATGCGCCTGCGCCACGCAGTTTGTTGACAGTTAAGGAAATAGGAAGTATAC<text:line-break/>GACTCAATCAAGATCAGAGAGTACAGCTTGGTCATTTGGTCAATTTTGTGCAAGTTGCACCGGGTCAGCA<text:line-break/>AGGGATTTTCAGTTTTATGGAAGTGCTAGCAAGTAACCAAAGAATAAATATAGAACGTGGAATAAATGAA<text:line-break/>GGAATTTTGCCATACATAACTCGAATCTATCGTAGTTACCTAGGCAGCCTACAAAATGACATTCAAAATC<text:line-break/>GCAGTCAAAAGTTTGAGAGTCACGGATTTTTCTTAGGTTTGTTGGCAAATTTTATTCATCTCTACACAAT<text:line-break/>AGATATTGACCTTGACTTGTCTCCTGGAAATTCATATGTTGCTTTTCTTATATGTCATCAGGCAGAGAGA<text:line-break/><text:soft-page-break/>GAAAACATTCCTATCGTTATTAATGTTACTAGATGGAGGACATCGTCTGATATTGCATTAAACCGCGCTA<text:line-break/>GAGCTGATGCTAAAAGATTACATGCTTCTTCATTTATATCTATTCACACTGAATCAAGAAATGCTGTTTG<text:line-break/>TATTGGATTAAATTTTAATCTGAATATAGATCCTTTTAGTATTGATACAGTAGAGTTTTTAGAGAATAGA<text:line-break/>TTTCCTTTGGTACAAAGATTATTTGAGTGTTTGGAGGATGAAGGAATTAGAGAAAATATTAGAGATTTCT<text:line-break/>TGCTTCAACATCTTCCTAACGAAATACCAAGAAATGCAGAGAATTATAACAGAATATTTGATTGCATAAC<text:line-break/>TGGTTTTGCTTTTGGGAATAGTATTTTAGAAGAGTTCAGATTAGTAAACGCAGTTCAACAACGTGTAAGA<text:line-break/>AAGTATATATTTAGATATGGTGATGAGAATCATGCTTTAACCATGGTCTTCCATACTCAAGGTTCTGATA<text:line-break/>TAGTTATACTTCATATTAGAGATAACAACGCTGTACAACAAGGAGCCATCAATTTACAAGATCTTAATGT<text:line-break/>TGACGGAAATAATGTTCATGTACGGGAAGTTTCATGCACACTTAATAATCAACTTGGCCTTAATATTCAT<text:line-break/>ACAGATAACCTTGGTTTATATCACAATTACCAAAATAATAATGCAAATAATTTTCTTGGTGGTAATCTTG<text:line-break/>TGCAAGTGCCTAATGCTGGAAATGTGCATAATGCTTTAAATCAAGTTATGAATGATGGCTGGCAAGATAG<text:line-break/>ATTTCAGCATCAAGAATTATTTAGAAACATTTCTGCAGTATTAATGCCAGAAGATACGCATGGCAATATG<text:line-break/>ATAATAGATGTAAATAGCAAAGATAAGTTTCGCTCTATACTACATGGTACATTTTATGCTAGTGATAATC<text:line-break/>CTTATAAAGTGCTTGCTATGTATAAAGTTGGTCAAACATATAGTTTAAAAAGGTGGCAGGAAGAAGAAGG<text:line-break/>AGAAAGGGTAATACTTACAAGAGTTACAGAACAGAGACTAGGTCTTCTATTATTAAGACAACCTACAGCA<text:line-break/>GATACTCACCCAATTGGATATGTATTAGGATTTGCTGATAATGCAGAAGAAGTAGAACAGGAGCAAGACG<text:line-break/>AGGCAAGGTACAAAATAACAGAATTGATGAGCAAACAAAGGGGATATTTGCCTATTACTTCTGGAAATGA<text:line-break/>GGTGGTTTTGTCTTATGCTGTATTTAATAGAGGTGCACAGAGAGCAGAAGACTTTATATCTCTTCCACAA<text:line-break/>CAAGCAGTGTATGTACATAGACTTGATCGTCGTGGTCATGACTCAAGACCAGAAGTATTAGTGGGACCTG<text:line-break/>AAAGTGTTATTGATGAAAATCCACCAGAAAATCTATTGTCAGATCAAACTCGTGAAAATTTCAGGCGCTT<text:line-break/>TTACATGGAAAAAAGACCAGGACAGAACTCGATTTTTTTGCTTGATATAGATGATAATCTGCACGTTCCA<text:line-break/>TTTAGTTACTTGCAAGGTACTAGAGCACAGGCAATAGAAACATTAAGGTCAAGAATAAGGGGAGGTGGTA<text:line-break/>CTTCTACAGCACAAGGAATATTACAACAAATAAACACTATCCTTCGTAGAAACAACGCTCGTGAAATAGA<text:line-break/>AGATGTGCATAATCTACTTGCACTAGACTTTGCAACAGAAAATCAAAATTTCCGTTATTGGCTACAAACT<text:line-break/>CATGACATGTTTTTCGCTGCACGACAATATACTTTCCATGATGATTGATCTAATCCAACTAATGATCGTC<text:line-break/>ATGATTTTGCAATAACTTCAGTAGGAGTCGATGGAAATCAAAATGATCCAACAGGTAGGGACTTATTAAG<text:line-break/><text:soft-page-break/>TAGTAACATAGATAACTTTAAACAAAAAGTAGATTCGGGTGAAAAAGATAGATTAACTGCTATTATTAAT<text:line-break/>GTAGGTAATCGTCATTGGGTTACATTAGTTATTGTCCACCAAAATGGAAATTATTATGGGTATTATGCTG<text:line-break/>ATTCACTTGGTCCAGATAGTCGTATTGACAATAATATTCGAGGAGCTTTAAGAGAATGTGATATTAGCGA<text:line-break/>TGATAATGTCCATGATGTTTCCGTTCATCAGCAAACAGATGGCCATAATTGTGGCATATGGGCATACGAA<text:line-break/>AATGCTAGGGATATTAACCAAGCTATTGATCAAGCTTTACAGGGAAATAGTAACTTTGGAGAGAAAGGTG<text:line-break/>AAGGTATTATAGGTTATATACGTGGTCTTCTTAGTGCAGGAATTGGAAATGACACTAGACAACCTCAAAG<text:line-break/>AAATGAACAATACTTTAGAAATCGGAGAAGAAATATTTCACAATTATTCCAAAATGATTCTCTATCTTCT<text:line-break/>CCTAGGGGTAGATTGATTCAAGGTCGTCCAGGAATTCAACATGAAATTGATCCATTACTATTACAATTTT<text:line-break/>TAGAACTCCAATATCCACAGCGTGGAGGTGGGGGAGCATTGCAATTAGGCGGAGAAAGAGTGATATCAAT<text:line-break/>TGATTTTGGTCCGCAATCTGTATTGGATGAAATTGATGGAGTGAATAGAGTTTATGATCATAGCAATGGT<text:line-break/>AGAGGCAGTAGGTAGAGGTTAATAGGTGAATGAAGTATTTCTTTACTCCATATTTACGCGTTGGTTGTAA<text:line-break/>TGGGTCTTTTAATTTATTTCTGCATATTTTTTTTGGGGGGTTGTTTATTAACAATAATATAGAAGATATT<text:line-break/>AATAAAGCTTTTGTCCGTAAAGCACATTCATGAGAGCGATATTTTCTTAAAATCAGCTAGCTTTAGATGC<text:line-break/>TGAAGTTGTGTACCGTTTAGAATAACTTCCTTAATTTTGGATATAAAATAATTTAAACGTAAGATCCACT<text:line-break/>GTAAAAGATAAGATTTAATTTGGAAGAAAAATTGATGTGATTAGAACTTGACCTTACATAGTGTAGGAAT<text:line-break/>ATTTTTTATAAAAAGAACAATATCCATTTGAAATGTAAAATTATCATAAATTTTTCTTTTTGTTCTCAAA<text:line-break/>TGAATTACTATTAATTTAGTATTATATATTGCTAATAACTTAAATAATCCAACCATTTCCAGCAACAAAA<text:line-break/>AACGCTACCCGTGAGAACATTTTTCTTTGGGATGGGATGGTCTACCATATGTACCATATGAACTTTTTAA<text:line-break/>TATAACAATTTAACTATACGCTAAAACTAGCTATATTAGCCCATTTCATCCATATCTACATACGAACTTT<text:line-break/>TTTGCCTAAGCTTATTGAAATAATTTAAATCTTCTATTTTTATAACCTTATTTTTACGCGGCTTGTTCTC<text:line-break/>ACAAATATACGACCTTTTTTGCAATCTTAGGAAGAGTCAATAATTCAATTCCTTATAACACTAGCTAGCA<text:line-break/>TGGTATCTTCACTAAAATATTTTTTTAAAAAGTTAGTTGACTTATAAATAATTCTCTACTAATACTAGCA<text:line-break/>TATGTTTGTTTATTCTGCTGAAGTGGCTCCGCAGGTTACTGTATAAGCTTCAGCAGTTTTTGTACTCCTT<text:line-break/>TAAAGCATCATATTCCTATATATTAAATATAGCTGGTGTTCTCAATTTTGTTGATCTATAGTAAAATTGG<text:line-break/>CTAAAACTTCCAGTAATAAACAACTTTTAACCTAGCAGTACTCACCATAAAAACTTAACAAAAATATGAG<text:line-break/>TAGTAAAAAGATTATGTTGAAATTAACTTGACACATACTACACATTCTATATAATATATTCTATATCTAG<text:line-break/><text:soft-page-break/>AGCTAGGAGGTAATATGGATACAGGGTCAGTAAAATATATTGCAGAACCTATCAGTGAACAAAGCAAACA<text:line-break/>CACTGATGAGCAAAAACTGAAGTGTGACCTAAGTGCTGGACAAGAGTTTTCAGAAATAGGTAGCCCAAAA<text:line-break/>ACAGAAGCAACTGGATTACCAGTAGATAGTTATTATGAATTCATTAAGCGAGATTTATTTTCGGCTGATA<text:line-break/>GAAGTTTGATAGATGATAAAAAATACTTAGAGGATTTAATAGATGAGTGGCTTATTCATGCACCTAACTT<text:line-break/>AGGACTGGAAGAGAGTCAAAAAAAGTTAAATCAAAAATTACTCAATAGTATTATAAAAGATTTTAATATG<text:line-break/>GGAAATTATGACTCATTTTCAAATCTTAAGCAGTTTTTAGAAAGTAACGAGAAAAATAAAGACCTGAAGT<text:line-break/>ACGTTCTTAATTTAAAAAGAGGGCATCTAGGAACAACAATATTGAACGTGTTTCTCGAATACGACGAAAT<text:line-break/>TATTCCTTCTCTTCTCAAAGCTGGTGCTGATCTAAATATGCAGGATAATAAAGGTAAAACACTTTTGCAT<text:line-break/>GATACTGCTATTTATTCTAGTGGATATGAAGATCTTGGGTATCTCTTAGATGCAAAAGCTGATCCAAATA<text:line-break/>TACAAGATGAAAAAGGTAACACACCTTTACACTATTATGCTGCTAAGTGTAGTGATCAAAGCAGAAAAAC<text:line-break/>TATGGATTTGCTCATAAGCAAAGGAGCTGATTTAAGCATAAAAAATAACGATGGAAAAACTCCACTGCAA<text:line-break/>GTTGCAATTGATAATGACAACATTATAGGATGTTTATTAACTAATAGTCAAAAAAAATTAAGAGAGCAAC<text:line-break/>TAGGTAAAATGCTTCTCGCTACAAGTTCTGATGAAGATTGGGATAATGCTTATGATCCAGAGGTTGAAAA<text:line-break/>TCTAAGAAAGTTTTTAAATCAATATGAAAATGACAACGACTTAAAGATAGTTTTAAATGTTAAGGATGAT<text:line-break/>AGTTCAGTACTTCTTGATTCGCCATCTCGTCAATTTCCTAATGTAAAAGCCTTGCTCTTAAAAGCAGGAG<text:line-break/>CAGCTGATTTTATAGGTAAAAAACAAGACAATTATGAAAAATGCGATAGTTTTTTATCAGAGATTTATCA<text:line-break/>AATAAATTACCTTGCTAAACGCAATGAGTTTTTAAGTAAGGTAGTAAAAGCTAAAAGCATGATTGAATTA<text:line-break/>CAAGAAGTTGTAAATGAGATTATAGCTTCTGGAATGAGATTAAATTTTGCTAAAGACAAAGATTATTACT<text:line-break/>TTGCAGATCACGTACTAGAAAAAATTGCTCAGATAGAAGGAAGCTATGGAATTGCCAGTGATATAGTATG<text:line-break/>TACATTAATATCAAGAGGAGCAAAGTTAAAAAGGTCAGAAAGTTTAAAAGTCATTGATACAATAGAATTA<text:line-break/>AAGTTCAAAGCTCATAAGGCTAATATGATCAGTGCTCATTTAGAGTATGTTAGTAATGCTGAGGAATTTT<text:line-break/>TTAGAATTGCAAAGGCTGCTACCAGCGGTCAACTATATGATGGAAAAATCGATAATAATGTATTTTACTT<text:line-break/>AGAATACTCAGAGGATAGTATAATAGATGTTGCAAGAATCACAAATAGAACAAGAAATCTGGAACTAATT<text:line-break/>CAGGAATCATATAGAAGGGATATAATAAAAATTGGCAAAAGTAAGATGGAAATTATAACCGAAAACGGCA<text:line-break/>TAAGGTATTACACAGATCTTACAGAAGGCAGCGATATAGTATTAACTTTCTATACTAGTTTGGGAAATAT<text:line-break/>AGACCTTAGACTGTATCCTGACATACAGGATAAAAGCAAGATTATAGTAGAAGTGAGTAATAGAGAAGAA<text:line-break/><text:soft-page-break/>ATATTAGAAAAATTCAAAGGTCGCGAAGAAGAGTTAGGCAATGATTGCGCGCTCGGTGGCTACTCGGTCT<text:line-break/>ACAATGCTATTGAACAGGGATATTTTGAAAGGTCTAGAAAATTAATGCGTCCTGAAGTAATAAGCGAGTC<text:line-break/>TAACAACAAATGGACAGAACGTGAAGAGTTAAGAAGGGATTCTATGGAGGAAATTGCTAGAAGGCATAAG<text:line-break/>TTATTACAAGATTTACGCAATATTGAGTCTAATATTGTACAAAAGGAGAAGAATTTTGACATAAAAACTT<text:line-break/>ACCTGATAGACATCTTTAAAACTTTATCTAGGTTCTATGAAGAAAAAGGGGATATTTCTAAAACAGACTT<text:line-break/>AGCTAAAGCAGCAGAAAAGGAAAGTAAAAAATTGGGGTTAGAAGGTAAATACAACTGGAGTAAGATTTTT<text:line-break/>GGTTTAGAGGAAGAAATTATTGAAAAGGTAGAAAAACAAGGTGATAAAGAGCAAAAATCAAACATACCTG<text:line-break/>ATGACTTCTATTTAGGGCACACAATCAATAATGGAAGCTGTTTTTTTGATTCATTCAGGCAAAGTCTAGA<text:line-break/>ACAACAGAAGGGAATCAAAGTTACTGTAGAGCAGTTAAGGAATGAGTGTAAGAGATTTGCGCAAGACAAT<text:line-break/>CCTCCAGAGTGGTTTATAAGTAAAATTGGTAATGACTTTGATGAGGTTGAAAGTGAGCTCGTAAATCGTG<text:line-break/>GAATTACGTGTAACCAATATATCAATAGCATTGGAAAGAATGAATTTTGGGGACGTTCCGATATCGAGGG<text:line-break/>CAGAGTACTTTGTGATAAGTATGGTGTGAAATTGCATGTTGCAGAAAGTAACCCATTGCACACTATTGAT<text:line-break/>AAGCAACAAGATCCGTTCTTGCATCAGTTAATAGATAGCTCAGGATCAAAAGCAGGTAAGATAGATTATA<text:line-break/>GTCACAATAGTGCCTTACATATGGTAAATGGAGGCCATGATCATTTTCAACCCCTACTTTATAGAAATAA</text:p>
      <text:p text:style-name="P11">GGCCTTGGCAAAACAAACGCAAGAACAAAAAGATTCCTTATGCTATTCAAGCTTGCCA</text:p>
      <text:p text:style-name="P5"/>
      <text:p text:style-name="P11">&gt; NW_025319039.1 <text:span text:style-name="T11">brut </text:span>VIRT-1814496:5'3' Frame 1, start_pos=1256</text:p>
      <text:p text:style-name="P5">MFATAHDANILKANERVYFRFDNHGIDTGGRNRNTGNLKVAVYRDGQQVV</text:p>
      <text:p text:style-name="P5">RCYSISDRLNSDGLRFSTRERNALVREIRGQNPNLREEDLNFEQYKVCMH</text:p>
      <text:p text:style-name="P5">GKGKSQGEAIATVFEVIREKDSQGRDRFAKYSASEISLLRHIERNRLNGI</text:p>
      <text:p text:style-name="P5">NAPAPRSLLTVKEIGSIRLNQDQRVQLGHLVNFVQVAPGQQGIFSFMEVL</text:p>
      <text:p text:style-name="P5">ASNQRINIERGINEGILPYITRIYRSYLGSLQNDIQNRSQKFESHGFFLG</text:p>
      <text:p text:style-name="P5">LLANFIHLYTIDIDLDLSPGNSYVAFLICHQAERENIPIVINVTRWRTSS</text:p>
      <text:p text:style-name="P5">DIALNRARADAKRLHASSFISIHTESRNAVCIGLNFNLNIDPFSIDTVEF</text:p>
      <text:p text:style-name="P5">LENRFPLVQRLFECLEDEGIRENIRDFLLQHLPNEIPRNAENYNRIFDCI</text:p>
      <text:p text:style-name="P5">TGFAFGNSILEEFRLVNAVQQRVRKYIFRYGDENHALTMVFHTQGSDIVI</text:p>
      <text:p text:style-name="P5">LHIRDNNAVQQGAINLQDLNVDGNNVHVREVSCTLNNQLGLNIHTDNLGL</text:p>
      <text:p text:style-name="P5">YHNYQNNNANNFLGGNLVQVPNAGNVHNALNQVMNDGWQDRFQHQELFRN</text:p>
      <text:p text:style-name="P5">ISAVLMPEDTHGNMIIDVNSKDKFRSILHGTFYASDNPYKVLAMYKVGQT</text:p>
      <text:p text:style-name="P5">YSLKRWQEEEGERVILTRVTEQRLGLLLLRQPTADTHPIGYVLGFADNAE</text:p>
      <text:p text:style-name="P5">EVEQEQDEARYKITELMSKQRGYLPITSGNEVVLSYAVFNRGAQRAEDFI</text:p>
      <text:p text:style-name="P5">SLPQQAVYVHRLDRRGHDSRPEVLVGPESVIDENPPENLLSDQTRENFRR</text:p>
      <text:p text:style-name="P5">FYMEKRPGQNSIFLLDIDDNLHVPFSYLQGTRAQAIETLRSRIRGGGTST</text:p>
      <text:p text:style-name="P5">AQGILQQINTILRRNNAREIEDVHNLLALDFATENQNFRYWLQTHDMFFA</text:p>
      <text:p text:style-name="P5">ARQYTFHDD</text:p>
      <text:p text:style-name="P5"/>
      <text:p text:style-name="P11">&gt; NW_025319039.1 <text:span text:style-name="T11">extended </text:span>VIRT-1814496:5'3' Frame 1, start_pos=1256</text:p>
      <text:p text:style-name="P11"><text:soft-page-break/>LIRSLVDGDLDGFRQEFESFLDQCPFFLYHVSTGRFLPVFFFSMFATAHDANILKANERVYFRFDNHGIDTGGRNRNTGNLKVAVYRDGQQVVRCYSISDRLNSDGLRFSTRERNALVREIRGQNPNLREEDLNFEQYKVCMHGKGKSQGEAIATVFEVIREKDSQGRDRFAKYSASEISLLRHIERNRLNGINAPAPRSLLTVKEIGSIRLNQDQRVQLGHLVNFVQVAPGQQGIFSFMEVLASNQRINIERGINEGILPYITRIYRSYLGSLQNDIQNRSQKFESHGFFLGLLANFIHLYTIDIDLDLSPGNSYVAFLICHQAERENIPIVINVTRWRTSSDIALNRARADAKRLHASSFISIHTESRNAVCIGLNFNLNIDPFSIDTVEFLENRFPLVQRLFECLEDEGIRENIRDFLLQHLPNEIPRNAENYNRIFDCITGFAFGNSILEEFRLVNAVQQRVRKYIFRYGDENHALTMVFHTQGSDIVILHIRDNNAVQQGAINLQDLNVDGNNVHVREVSCTLNNQLGLNIHTDNLGLYHNYQNNNANNFLGGNLVQVPNAGNVHNALNQVMNDGWQDRFQHQELFRNISAVLMPEDTHGNMIIDVNSKDKFRSILHGTFYASDNPYKVLAMYKVGQTYSLKRWQEEEGERVILTRVTEQRLGLLLLRQPTADTHPIGYVLGFADNAEEVEQEQDEARYKITELMSKQRGYLPITSGNEVVLSYAVFNRGAQRAEDFISLPQQAVYVHRLDRRGHDSRPEVLVGPESVIDENPPENLLSDQTRENFRRFYMEKRPGQNSIFLLDIDDNLHVPFSYLQGTRAQAIETLRSRIRGGGTSTAQGILQQINTILRRNNAREIEDVHNLLALDFATENQNFRYWLQTHDMFFAARQYTFHDD</text:p>
      <text:p text:style-name="P11"/>
      <text:p text:style-name="P11">&gt;ref|NW_025319047.1 <text:span text:style-name="T12">Interval 1 </text:span>:1245983-1256699 Drosophila ananassae strain 14024-0371.13 chromosome 4 unlocalized genomic scaffold, ASM1763931v2 tig00000241, whole genome shotgun sequence<text:line-break/>TAACTCATCCATACTACAGCTTGGCAAGCTTGAATAGCATAAGGAATCTTTTTGTTCTTGCGTTTGTTTT<text:line-break/>GCCAAGGCCTTATTTCTATAAAGTAGGGGTTGAAAATGATCATGGCCTCCATTTACCATATGTAAGGCAC<text:line-break/>TATTGTGACTATAATCTATCTTACCTGCTTTTGATCCTGAGCTATCTATTAACTGATGCAAGAACGGATC<text:line-break/>TTGTTGCTTATCAATAGTGTGCAATGGGTTACTTTCTGCAACATGCAATTTCACACCATACTTATCACAA<text:line-break/>AGTACTCTGCCCTCGATATCGGAACGTCCCCAAAATTCATTCTTTCCAATGCTATTGATATATTGGTTAC<text:line-break/>ACGTAATTCCACGATTTACGAGCTCACTTTCAACCTCATCAAAGTCATTACCAATTTTACTTATAAACCA<text:line-break/>CTCTGGAGGATTGTCTTGCGCAAATCTCTTACACTCATTCCTTAACTGCTCTACAGTAACTTTGATTCCC<text:line-break/>TTCTGTTGTTCTAGACTTTGCCTGAATGAATCAAAAAAACAGCTTCCATTATTGATTGTGTGCCCTAAAT<text:line-break/>AGAAGTCATCAGGTATGTTTGATTTTTGCTCTTTATCACCTTGTTTTTCTACCTTTTCAATAATTTCTTC<text:line-break/>CTCTAAACCAAAAATCTTACTCCAGTTGTATTTACCTTCTAACCCCAATTTTTTACTTTCCTTTTCTGCT<text:line-break/>GCTTTAGCTAAGTCTGTTTTAGAAATATCCCCTTTTTCTTCATAGAACCTAGATAAAGTTTTAAAGATGT<text:line-break/>CTATCAGGTAAGTTTTTATGTCAAAATTCTTCTCCTTTTGTACAATATTAGACTCAATATTGCGTAAATC<text:line-break/>TTGTAATAACTTATGCCTTCTAGCAATTTCCTCCATAGAATCCCTTCTTAACTCTTCACGTTCTGTCCAT<text:line-break/>TTGTTGTTAGACTCGCTTATTACTTCAGGACGCATTAATTTTCTAGACCTTTCAAAATATCCCTGTTCAA<text:line-break/>TAGCATTGTAGACCGAGTAGCCACCGAGCGCGCAATCATTGCCTAACTCTTCTTCGCGACCTTTGAATTT<text:line-break/>TTCTAATATTTCTTCTCTATTACTCACTTCTACTATAATCTTGCTTTTATCCTGTATGTCAGGATACAGT<text:line-break/>CTAAGGTCTATATTTCCCAAACTAGTATAGAAAGTTAATACTATATCGCTGCCTTCTGTAA<text:soft-page-break/>GATCTGTGT<text:line-break/>AATACCTTATGCCGTTTTCGGTTATAATTTCCATCTTACTTTTGCCAATTTTTATTATATCCCTTCTATA<text:line-break/>TGATTCCTGAATTAGTTCCAGATTTCTTGTTCTATTTGTGATTCTTGCAACATCTATTATACTATCCTCT<text:line-break/>GAGTATTCTAAGTAAAATACATTATTATCGATTTTTCCATCATATAGTTGACCGCTGGTAGCAGCCTTTG<text:line-break/>CAATTCTAAAAAATTCCTCAGCATTACTAACATACTCTAAATGAGCACTGATCATATTAGCCTTATGAGC<text:line-break/>TTTGAACTTTAATTCTATTGTATCAATGACTTTTAAACTTTCTGACCTTTTTAACTTTGCTCCTCTTGAT<text:line-break/>ATTAATGTACATACTATATCACTGGCAATTCCATAGCTTCCTTCTATCTGAGCAATTTTTTCTAGTACGT<text:line-break/>GATCTGCAAAGTAATAATCTTTGTCTTTAGCAAAATTTAATCTCATTCCAGAAGCTATAATCTCATTTAC<text:line-break/>AACTTCTTGTAATTCAATCATGCTTTTAGCTTTTACTACCTTACTTAAAAACTCATTGCGTTTAGCAAGG<text:line-break/>TAATTTATTTGATAAATCTCTGATAAAAAACTATCGCATTTTTCATAATTGTCTTGTTTTTTACCTATAA<text:line-break/>AATCAGCTGCTCCTGCTTTTAAGAGCAAGGCTTTTACATTAGGAAATTGACGAGATGGCGAATCAAGAAG<text:line-break/>TACTGAACTATCATCCTTAACATTTAAAACTATCTTTAAGTCGTTGTCATTTTCATATTGATTTAAAAAC<text:line-break/>TTTCTTAGATTTTCAACCTCTGGATCATAAGCATTATCCCAATCTTCATCAGAACTTGTAGCGAGAAGCA<text:line-break/>TTTTACCTAGTTGCTCTCTTAATTTTTTTTGACTATTAGTTAATAAACATCCTATAATGTTGTCATTATC<text:line-break/>AATTGCAACTTGCAGTGGAGTTTTTCCATCGTTATTTTTTATGCTTAAATCAGCTCCTTTGCTTATGAGC<text:line-break/>AAATCCATAGTTTTTCTGCTTTGATCACTACACTTAGCAGCATAATAGTGTAAAGGTGTGTTACCTTTTT<text:line-break/>CATCTTGTATATTTGGATCAGCTTTTGCATCTAAGAGATACCCAAGATCTTCATATCCACTAGAATAAAT<text:line-break/>AGCAGTATCATGCAAAAGTGTTTTACCTTTATTATCCTGCATATTTAGATCAGCACCAGCTTTGAGAAGA<text:line-break/>GAAGGAATAATTTCGTCGTATTCGAGAAACACGTTCAATATTGTTGTTCCTAGATGCCCTCTTTTTAAAT<text:line-break/>TAAGAACGTACTTCAGGTCTTTATTTTTCTCGTTACTTTCTAAAAACTGCTTAAGATTTGAAAATGAGTC<text:line-break/>ATAATTTCCCATATTAAAATCTTTTATAATACTATTGAGTAATTTTTGATTTAACTTTTTTTGACTCTCT<text:line-break/>TCCAGTCCTAAGTTAGGTGCATGAATAAGCCACTCATCTATTAAATCCTCTAAGTATTTTTTATCATCTA<text:line-break/>TCAAACTTCTATCAGCCGAAAATAAATCTCGCTTAATGAATTCATAATAACTATCTACTGGTAATCCAGT<text:line-break/>CGCTTCTGTTTTTGGGCTACCTATTTCTGAAAACTCTTGTCCAGCACTTAGGTCACACTTCAGTTTTTGC<text:line-break/>TCATCAGTGTGTTTGCTTTGTTCACTGATAGGTTCTGCAATATATTTTACTGACCCTGTATCCATATTAC<text:line-break/>CTCCTAGCTCTAGATATAGAATATATTATATAGAATGTGTAGTATGTGTCAAGTTAATTTCAACATAATC<text:line-break/>TTTTTACTACTCATATTTTTGTTAAGTTTTTATGGTGAGTACTGCTAGGTTAAAAGTTGTT<text:soft-page-break/>TATTACTGG<text:line-break/>AAGTTTTAGCCAATTTTACTATAGATCAACAAAATTGAGAACACCAGCTATATTTAATATATAGGAATAT<text:line-break/>GATGCTTTAAAGGAGTACAAAAACTGCTGAAGCTTATACAGTAACCTGCGGAGCCACTTCAGCAGAATAA<text:line-break/>ACAAACATATGCTAGTATTAGTAGAGAATTATTTATAAGTCAACTAACTTTTTAAAAAAATATTTTAGTG<text:line-break/>AAGATACCATGCTAGCTAGTGTTATAAGGAATTGAATTATTGACTCTTCCTAAGATTGCAAAAAAGGTCG<text:line-break/>TATATTTGTGAGAACAAGCCGCGTAAAAATAAGGTTATAAAAATAGAAGATTTAAATTATTTCAATAAGC<text:line-break/>TTAGGCAAAAAAGTTCGTATGTAGATATGGATGAAATGGGCTAATATAGCTAGTTTTAGCGTATAGTTAA<text:line-break/>ATTGTTATATTAAAAAGTTCGTATGGTACATATGGTAGACCATCCCATCCCAAAGAAAAATGTTCTCACG<text:line-break/>GGTAGCGTTTTTTGTTGCTGGAAATGGTTGGATTATTTAAGTTATTAGCAATATATAATACTAAATTAAT<text:line-break/>AGTAATTCATTTGAGAACAAAAAGAAAAATTTATGATAATTTTACATTTCAAATGGATATTGTTCTTTTT<text:line-break/>ATAAAAAATATTCCTACACTATGTAAGGTCAAGTTCTAATCACATCAATTTTTCTTCCAAATTAAATCTT<text:line-break/>ATCTTTTACAGTGGATCTTACGTTTAAATTATTTTATATCCAAAATTAAGGAAGTTATTCTAAACGGTAC<text:line-break/>ACAACTTCAGCATCTAAAGCTAGCTGATTTTAAGAAAATATCGCTCTCATGAATGTGCTTTACGGACAAA<text:line-break/>AGCTTTATTAATATCTTCTATATTATTGTTAATAAACAACCCCCCAAAAAAAATATGCAGAAATAAATTA<text:line-break/>AAAGACCCATTACAACCAACGCGTAAATATGGAGTAAAGAAATACTTCATTCACCTATTAACCTCTACCT<text:line-break/>ACTGCCTCTACCATTGCTATGATCATAAACTCTATTCACTCCATCAATTTCATCCAATACAGATTGCGGA<text:line-break/>CCAAAATCAATTGATATCACTCTTTCTCCGCCTAATTGCAATGCTCCCCCACCTCCACGCTGTGGATATT<text:line-break/>GGAGTTCTAAAAATTGTAATAGTAATGGATCAATTTCATGTTGAATTCCTGGACGACCTTGAATCAATCT<text:line-break/>ACCCCTAGGAGAAGATAGAGAATCATTTTGGAATAATTGTGAAATATTTCTTCTCCGATTTCTAAAGTAT<text:line-break/>TGTTCATTTCTTTGAGGTTGTCTAGTGTCATTTCCAATTCCTGCACTAAGAAGACCACGTATATAACCTA<text:line-break/>TAATACCTTCACCTTTCTCTCCAAAGTTACTATTTCCCTGTAAAGCTTGATCAATAGCTTGGTTAATATC<text:line-break/>CCTAGCATTTTCGTATGCCCATATGCCACAATTATGGCCATCTGTTTGCTGATGAACGGAAACATCATGG<text:line-break/>ACATTATCATCGCTAATATCACATTCTCTTAAAGCTCCTCGAATATTATTGTCAATACGACTATCTGGAC<text:line-break/>CAAGTGAATCAGCATAATACCCATAATAATTTCCATTTTGGTGGACAATAACTAATGTAACCCAATGACG<text:line-break/>ATTACCTACATTAATAATAGCAGTTAATCTATCTTTTTCACCCGAATCTACTTTTTGTTTAAAGTTATCT<text:line-break/>ATGTTACTACTTAATAAGTCCCTACCTGTTGGATCATTTTGATTTCCATCGACTCCTACTGAAGTTATTG<text:line-break/>CAAAATCATGACGATCATTAGTTGGATTAGATCAATCATCATGGAAAGTATATTGTCGTG<text:soft-page-break/>CAGCGAAAAA<text:line-break/>CATGTCATGAGTTTGTAGCCAATAACGGAAATTTTGATTTTCTGTTGCAAAGTCTAGTGCAAGTAGATTA<text:line-break/>TGCACATCTTCTATTTCACGAGCGTTGTTTCTACGAAGGATAGTGTTTATTTGTTGTAATATTCCTTGTG<text:line-break/>CTGTAGAAGTACCACCTCCCCTTATTCTTGACCTTAATGTTTCTATTGCCTGTGCTCTAGTACCTTGCAA<text:line-break/>GTAACTAAATGGAACGTGCAGATTATCATCTATATCAAGCAAAAAAATGGTCTTTTTTCCATGTAAAAGC<text:line-break/>GCCTGAAATTTTCACGAGTTTGATCTGACAATAGATTTTCTGGTGGATTTTCATCAATAACACTTTCAGG<text:line-break/>TCCCACTAATACTTCTGGTCTTGAGTCATGACCACGACGATCAAGTCTATGTACATACACTGCTTGTTGT<text:line-break/>GGAAGAGATATAAAGTCTTCTGCTCTCTGTGCACCTCTATTAAATACAGCATAAGACAAAACCACCTCAT<text:line-break/>TTCCAGAAGTAATAGGCAAATATCCCCTTTGTTTGCTCATCAATTCTGTTATTTTGTACCTTGCCTCGTC<text:line-break/>TTGCTCCTGTTCTACTTCTTCTGCATTATCAGCAAATCCTAATACATATCCAATTGGGTGAGTATCTGCT<text:line-break/>GTAGGTTGTCTTAATAATAGAAGACCTAGTCTCTGTTCTGTAACTCTTGTAAGTATTACCCTTTCTCCTT<text:line-break/>CTTCTTCCTGCCACCTTTTTAAACTATATGTTTGACCAACTTTATACATAGCAAGCACTTTATAAGGATT<text:line-break/>ATCACTAGCATAAAATGTACCATGTAGTATAGAGCGAAACTTATCTTTGCTATTTACATCTATTATCATA<text:line-break/>TTGCCATGCGTATCTTCTGGCATTAATACTGCAGAAATGTTTCTAAATAATTCTTGATGCTGAAATCTAT<text:line-break/>CTTGCCAGCCATCATTCATAACTTGATTTAAAGCATTATGCACATTTCCAGCATTAGGCACTTGCACAAG<text:line-break/>ATTACCACCAAGAAAATTATTTGCATTATTATTTTGGTAATTGTGATATAAACCAAGGTTATCTGTATGA<text:line-break/>ATATTAAGGCCAAGTTGATTATTAAGTGTGCATGAAACTTCCCGTACATGAACATTATTTCCGTCAACAT<text:line-break/>TAAGATCTTGTAAATTGATGGCTCCTTGTTGTACAGCGTTGTTATCTCTAATATGAAGTATAACTATATC<text:line-break/>AGAACCTTGAGTATGGAAGACCATGGTTAAAGCATGATTCTCATCACCATATCTAAATATATACTTTCTT<text:line-break/>ACACGTTGTTGAACTGCGTTTACTAATCTGAACTCTTCTAAAATACTATTCCCAAAAGCAAAACCAGTTA<text:line-break/>TGCAATCAAATATTCTGTTATAATTCTCTGCATTTCTTGGTATTTCGTTAGGAAGATGTTGAAGCAAGAA<text:line-break/>ATCTCTAATATTTTCTCTAATTCCTTCATCCTCCAAACACTCAAATAATCTTTGTACCAAAGGAAATCTA<text:line-break/>TTCTCTAAAAACTCTACTGTATCAATACTAAAAGGATCTATATTCAGATTAAAATTTAATCCAATACAAA<text:line-break/>CAGCATTTCTTGATTCAGTGTGAATAGATATAAATGAAGAAGCATGTAATCTTTTAGCATCAGCTCTAGC<text:line-break/>GCGGTTTAATGCAATATCAGACGATGTCCTCCATCTAGTAACATTAATAACGATAGGAATGTTTTCTCTC<text:line-break/>TCTGCCTGATGACATATAAGAAAAGCAACATATGAATTTCCAGGAGACAAGTCAAGGTCAATATCTATTG<text:line-break/>TGTAGAGATGAATAAAATTTGCCAACAAACCTAAGAAAAATCCGTGACTCTCAAACTTTT<text:soft-page-break/>GACTGCGATT<text:line-break/>TTGAATGTCATTTTGTAGGCTGCCTAGGTAACTACGATAGATTCGAGTTATGTATGGCAAAATTCCTTCA<text:line-break/>TTTATTCCACGTTCTATATTTATTCTTTGGTTACTTGCTAGCACTTCCATAAAACTGAAAATCCCTTGCT<text:line-break/>GACCCGGTGCAACTTGCACAAAATTGACCAAATGACCAAGCTGTACTCTCTGATCTTGATTGAGTCGTAT<text:line-break/>ACTTCCTATTTCCTTAACTGTCAACAAACTGCGTGGCGCAGGCGCATTAATCCCATTAAGCCTATTGCGT<text:line-break/>TCTATATGCCTAAGAAGGCTAATCTCAGACGCTGAATATTTAGCAAATCTATCTCTACCTTGAGAATCTT<text:line-break/>TTTCACGAATCACCTCGAATACTGTTGCAATCGCCTCTCCCTGACTCTTGCCCTTTCCATGCATGCATAC<text:line-break/>TTTGTATTGCTCAAAATTTAGGTCTTCTTCCCTTAAATTTGGATTTTGCCCTCTAATCTCTCGCACTAGA<text:line-break/>GCATTTCTTTCCCTTGTACTGAACCTTAACCCATCACTATTAAGACGATCAGAAATACTGTAGCATCTGA<text:line-break/>CAACTTGCTGTCCGTCACGATAAACAGCGACTTTTAGGTTCCCTGTATTTCTATTTCTACCACCTGTATC<text:line-break/>AATACCATGATTATCAAAACGAAAATACACTCTCTCATTTGCTTTTAAGATATTAGCATCATGAGCAGTA<text:line-break/>GCAAACATACTGAAAAAGAATACAGGAAGGAAACGTCCTGTACTTACATGATACAAGAAAAATGGACATT<text:line-break/>GATCTAAAAAGGATTCAAACTCTTGTCTAAAACCATCAAGATCTCCATCCACTAAACTTCTTATTAAAGA<text:line-break/>CACAAAGCACCTCTCTATTTGCTAAGACCAGAAAAACCACTCACATTAATGAGTAGACTAGATTCTTCTT<text:line-break/>TTCTTATGAGAACCAGAAATACCACTCACACTAGGAGCTTCAAACTCAGACTGTGGGCCATCACCAGAAC<text:line-break/>CATCAAGTGGCAAAGATACCTTAGATTGAGACCGCAAATTATTCCAAGGACCATCACCTACAGAAGGTAA<text:line-break/>AGTTACTTTCTCTAACTGAAGAAATAACTCTTCTGCAAACTTGCCGTAATCTACACCTTTCCTCTTTCCT<text:line-break/>TCCCTACCACATATTCTAAGATTTTCTATCATGACTTCTTTAAAAAGGTCAAACTTTTCAGGAAAGCAAC<text:line-break/>CTTTGGCAAATGAAATCATATCTAATATTTCTTCTTTCTCTATTTTCCTATCGGGCTTACAAACATCTTC<text:line-break/>TCGTTTCCAATTAATGATTAATCCCCCAAGTACACTCTTTATAGGAACTGTATAATTAGAAGTATTAACA<text:line-break/>GAGGTCTCTCTGTATTCAGCAAAGCGTTCACATTTCCAAATCTCCATAATAAGGGATCTAGCTTGAACAC<text:line-break/>TTAACTCAGGATTTTTCAACATCACATTTGAAAGTGAATAAAGAAAAAGTTCATAGTCTTGCTGTGAGAA<text:line-break/>TATCTTGTCCGAACAGTCTCCTCCTGCTGAAACGCCTTTATAACACCAGCACTGTACCAAATCATGAACC<text:line-break/>GTATCAAAAAAACATGACTCTATTAATTCAGCAAGAAGGGAATATACTCCCTTATCTTTCTGCAATAATT<text:line-break/>TCTGTAAAAGAGTATCTTTATCGCCTATATTCCTTACACAAAAATCTAAAATAGGAGCGTCTTTCTTAAC<text:line-break/>AGATTGAGGACGAGAAAGAGCAACAATAGCTTCTGTAAGCTTCTTCTCCTTATCTTTTTCCTCTAACTGA<text:line-break/>TTATAAAAATACTCTACCCCTTCGCTCCACTTAAGTTTTACAGCACTGTCAAAACCTTCT<text:soft-page-break/>ACTGCATCAT<text:line-break/>ACTTCTTTAATTCCCCAGATTCTCTATCGATCCAGAAATCAAACACAGGACCATTTCTCTTCATGGATGA<text:line-break/>TAGCAGAATGTTTCTTACATATTGATCACTGATCGGATTACCTTGACTATCTACCTCTTCTGAAGTAAAT<text:line-break/>TGACCTCTAGAGAGTACAAACTGTTTGTTGAAAAAATCACCTATCTTGCCCGTTATACAGTACCTAGATG<text:line-break/>CCATACCATACCTTGGTAGTGGGTTATCGATTTCTCCTATTTTCTCTTCAGTCAATTTCTGACCTAAAAC<text:line-break/>AGTATTATTTAACCTTGTACCTAACCAACAACCTTCATCTCGAAAAACATTATATAAGAATTCCAGCTTA<text:line-break/>TCATCCTTAAAAAGTTTGATATACTCTATATAGGTCTCGACCCACCTTTTAATAGCTAACTTTCTTCCAG<text:line-break/>CCGCAATGTCACGATCTGTATGTTTTATCACATCTTGTAGCTTTTTAAGCACTTCAGCCTGACGTTTTGT<text:line-break/>TTCTATTGGCATTTAAACCTCCCTATATCATGAAAACAACGCTATGGTACTAAATTTGTAACTAAGTTAC<text:line-break/>AACACCTAATTACTCCAGAAAGACCTATTTGATACCCAAACGTTCTGGTCAGGCCTAGAGAAATCTGTCT<text:line-break/>GGAATTATTGAGTATTTTCTAGAAATCTTAATTTGACAGCTAACACCAGGTTTTCTGGAGACTATAGGTG<text:line-break/>ATGCACTTTTTCTATTTATATTCCCAAGAATAAGGTCAGTAGATATGTTGTTTTCCAGAAGAATATTAGT<text:line-break/>AAGATTAATTGGAGAAGTGCTTATGACTTTAACTAAGTGTGTTTTAACTTCGCCCTTAAGTTCTGTTCAG<text:line-break/>CAGTATCTGTTAGTGTTAGGTAAGGTTATGGTTGTAAATACAAAATCCGATCAGCAGAGGGCTGAAGATG<text:line-break/>ATCTATATACTGTTTTGAGATTCAAAGAAAAAGGAGATTTTGAAAGACGGATAAGAGAACTGCTTGTTAA<text:line-break/>CGATTATAAGAAACTTAAAAAACCACTGAGCAAACTCCTTGGTAAGTTAGAAAGTAAAATAAGGACTGAT<text:line-break/>AAAGAGAATAACCAAGCAGCCAGAAACGTTTATGATCAAATCAAAAAATCTAAAACTAATGAAGATAAAT<text:line-break/>TAAGTAATTTATTGAACTTTAAAAAACAGCTAAAAGCTTTCCTAAAAAATCAAGATGATTGTAGTATTGT<text:line-break/>GTTAAATGCGATTGACTCTGCAAGTGTTATCCCTGTTATTGAAGTTAATGGTGTGCATCCAAAAGATAGT<text:line-break/>GAGATCAAAAAGTTAAAAAAAGCTCAACCTCTCACCTCTAACAGACAAGACTTTGAAGAAGCTCTAGGAT<text:line-break/>ACATAGAATCACAAGAAAAAGTTATGGGAATTACATTAGAGGAAATTATGGAATACAAGCAACACTCTGT<text:line-break/>TAAGATTTTTCTACTGAACCGTGTTCATTCATGCAAAAATGGGCATTCTCAATTGCATCCTGATGTAAAA<text:line-break/>GAAGCTATAGCAATATTATCAAATGATAAGCTGAGAGCTTTCTACGATGAAGAAGTAAAGAAGAAGACGC<text:line-break/>TACAACCAATATTGTCCTACAAAGAATGTGAACAATTATATGATAAAATTAACTATGAAAAAAATGAATC<text:line-break/>TCGTATTATAATCGAAAGAGAAGAACTTGGAGAGAATGTTAGGAGGGTAATGGGAGTGAAGCGCTTTACG<text:line-break/>AATGAAAGCAGTAGAGAAGATCAGAAAAATGGTACTAGTCCAACAGGAACTTCTACAAATTATAGACAAG<text:line-break/>AGCAAGTTGCCTCTAGTGGTGATAGAACACTTTATAATAGTGATATACCTTCACTAGGTA<text:soft-page-break/>GATCGATTAA<text:line-break/>GAGCAGCCGAAGTGCACTGTTTATGCCATTTGGAGCTTCTGTTGATACGAGTACCCCGATTAAACCTGCC<text:line-break/>AATCCATCTAACCTAGTTACCACTGGTGAGAATTATACTAGTAATGCAGATCTGAGTGATGAATTGAACG<text:line-break/>TAAGTGAAGTAACTAAAATTGTTGAACGAATGGAGCTATTATCCAATAGTTTAAAAAAAATCCAAGAAAT<text:line-break/>TGTGGAAAAGCTGGGTAATACTACACTAAGTGAAGAAGTGATAGTTCATGAGAGACATTTCAAAAAGTTT<text:line-break/>ATGGATTTTGTAGGAGAAATTCTCGTAAATATTGGTACAAGATTACCACAAAGTGATTCTAAAAGCATGT<text:line-break/>ATCTTGAACAAAAATTGAAGGGATTGGAAAAGATGAATGAATCCTTAAATAACAGTGTTCAAGAGTTAGA<text:line-break/>GAAAAAA</text:p>
      <text:p text:style-name="P11"/>
      <text:p text:style-name="P12">&gt; ef|NW_025319047.1 <text:span text:style-name="T12">Interval 1</text:span></text:p>
      <text:p text:style-name="P11">MFATAHDANILKANERVYFRFDNHGIDTGGRNRNTGNLKVAVYRDGQQVV</text:p>
      <text:p text:style-name="P11">RCYSISDRLNSDGLRFSTRERNALVREIRGQNPNLREEDLNFEQYKVCMH</text:p>
      <text:p text:style-name="P11">GKGKSQGEAIATVFEVIREKDSQGRDRFAKYSASEISLLRHIERNRLNGI</text:p>
      <text:p text:style-name="P11">NAPAPRSLLTVKEIGSIRLNQDQRVQLGHLVNFVQVAPGQQGIFSFMEVL</text:p>
      <text:p text:style-name="P11">ASNQRINIERGINEGILPYITRIYRSYLGSLQNDIQNRSQKFESHGFFLG</text:p>
      <text:p text:style-name="P11">LLANFIHLYTIDIDLDLSPGNSYVAFLICHQAERENIPIVINVTRWRTSS</text:p>
      <text:p text:style-name="P11">DIALNRARADAKRLHASSFISIHTESRNAVCIGLNFNLNIDPFSIDTVEF</text:p>
      <text:p text:style-name="P11">LENRFPLVQRLFECLEDEGIRENIRDFLLQHLPNEIPRNAENYNRIFDCI</text:p>
      <text:p text:style-name="P11">TGFAFGNSILEEFRLVNAVQQRVRKYIFRYGDENHALTMVFHTQGSDIVI</text:p>
      <text:p text:style-name="P11">LHIRDNNAVQQGAINLQDLNVDGNNVHVREVSCTLNNQLGLNIHTDNLGL</text:p>
      <text:p text:style-name="P11">YHNYQNNNANNFLGGNLVQVPNAGNVHNALNQVMNDGWQDRFQHQELFRN</text:p>
      <text:p text:style-name="P11">ISAVLMPEDTHGNMIIDVNSKDKFRSILHGTFYASDNPYKVLAMYKVGQT</text:p>
      <text:p text:style-name="P11">YSLKRWQEEEGERVILTRVTEQRLGLLLLRQPTADTHPIGYVLGFADNAE</text:p>
      <text:p text:style-name="P11">EVEQEQDEARYKITELMSKQRGYLPITSGNEVVLSYAVFNRGAQRAEDFI</text:p>
      <text:p text:style-name="P11">SLPQQAVYVHRLDRRGHDSRPEVLVGPESVIDENPPENLLSDQTRENFRR</text:p>
      <text:p text:style-name="P11">FYMEKRPFFCLI</text:p>
      <text:p text:style-name="P11"/>
      <text:p text:style-name="P11"/>
      <text:p text:style-name="P12">&gt;ref|NW_025319047.1 <text:span text:style-name="T12">Interval 1 extended</text:span></text:p>
      <text:p text:style-name="P11">LIRSLVDGDLDGFRQEFESFLDQCPFFLYHVSTGRFLPVFFFSMFATAHDANILKANERVYFRFDNHGIDTGGRNRNTGNLKVAVYRDGQQVVRCYSISDRLNSDGLRFSTRERNALVREIRGQNPNLREEDLNFEQYKVCMHGKGKSQGEAIATVFEVIREKDSQGRDRFAKYSASEISLLRHIERNRLNGINAPAPRSLLTVKEIGSIRLNQDQRVQLGHLVNFVQVAPGQQGIFSFMEVLASNQRINIERGINEGILPYITRIYRSYLGSLQNDIQNRSQKFESHGFFLGLLANFIHLYTIDIDLDLSPGNSYVAFLICHQAERENIPIVINVTRWRTSSDIALNRARADAKRLHASSFISIHTESRNAVCIGLNFNLNIDPFSIDTVEFLENRFPLVQRLFECLEDEGIRENIRDFLLQHLPNEIPRNAENYNRIFDCITGFAFGNSILEEFRLVNAVQQRVRKYIFRYGDENHALTMVFHTQGSDIVILHIRDNNAVQQGAINLQDLNVDGNNVHVREVSCTLNNQLGLNIHTDNLGLYHNYQNNNANNFLGGNLVQVPNAGNVHNALNQVMNDGWQDRFQHQELFRNISAVLMPEDTHGNMIIDVNSKDKFRSILHGTFYASDNPYKVLAMYKVGQTYSLKRWQEEEGERVILTRVTEQRLGLLLLRQPTADTHPIGYVLGFADNAEEVEQEQDEARYKITELMSKQRGYLPITSGNEVVLSYAVFNRGAQRAEDFISLPQQAVYVHRLDRRGHDSRPEVLVGPESVIDENPPENLLSDQTRENFRRFYMEKRPFFCLI</text:p>
      <text:p text:style-name="P11"/>
      <text:p text:style-name="P11">&gt;ref|NW_025319047.1 <text:span text:style-name="T13">interval 2 </text:span>|:1067001-1074767 Drosophila ananassae strain 14024-0371.13 chromosome 4 unlocalized genomic scaffold, ASM1763931v2 tig00000241, whole <text:soft-page-break/>genome shotgun sequence<text:line-break/>AAGATATCTACTATAAAAAAAATGATACAGGAGCGTAATCTTAAAACACAAATTTCAGTAGATGGTGGAA<text:line-break/>TTAACTTTTCTAACGCAGCTGATATAATAAAAGCAGGTGCTGATATTTTAGTTGCGGGATCGGCGATATT<text:line-break/>CAAGGCTGAAGATATTAAGAAGGCCGTAAACGATCTTAAAAATCTATTGTTGTGACCCTATATAGCTAAA<text:line-break/>GTGGCTTAGGTTTACCTACAATTTGAAAAACAACAAATTCGTCATTCCGCTACTCGTTAGCGGAATCTAT<text:line-break/>GCTGAGATACCGCGGCGGTATGACGTAGAAAAACCTTTCTTGGGTTGTATCCGTTCAGCTAAGCGGTGTG<text:line-break/>AGAGATGATAGATAAGAGGTTTTGGAAAGCCCATTTGTTTCCATGTCAAGTATAATGAAATTATCCGTTC<text:line-break/>AAGTTCCCCGCTTCGATTGGGTAAAATATGAATTTTTGCGATAAACGACATAATGCCGTATCTGCTGTTC<text:line-break/>AGCATGGTTGTTTGTCAGCGGAATGTTTTCTGGGTCATCTAAAAAATTCCACATTATTCTTTCAGATTTC<text:line-break/>AAAATATTTTTTGCAACTCGAGAAGCTCCAATTGCTTCAGGTAAACGGCTTCAAGTAATACCTTGTACGT<text:line-break/>TTTCGCAATTTTCTGGCACGTCTGGTAAATCTAAAAACATCTATCTCATTTTTTAGCAAGGCCTTTTTTA<text:line-break/>GTGCAAATAATTCAGTGGCTACGTTTCTTAAGTAACAGCCCAGAACTTTAACTTCAACTATGTGCTAATC<text:line-break/>TTTCAAAATCTCTTGATAAATGTGCCCAACAGATTTGCCTGTTCTTATCGGCAAAGTAGTTGTATGCTGC<text:line-break/>GTACCTGTCGTAAGCTATTGCGATTGCAGAACTTACTATTTTGTAAAACCTTCATTCCTCTTGACTCTGT<text:line-break/>CAATTTTATAAAACTTGCTGTATTACTGGCAAACATCCAGCACCAACCAAGTTTACCTTTGTTATAATGG<text:line-break/>CTCGTTTCATCGATATGCAGAACTTCACTTTTACTTACTTCTTGCTCGATTTGCTCATATGCTTCTTGGC<text:line-break/>CGAAAATAAATCTCGCTTAATGAATTCATAATAACTATCTACTGGTAATCCAGTTGCTTCTGTTTTTGGG<text:line-break/>CTACCTATTTCTGAAAACTCTTGTCCAGCACTTAGGTCACACTTCAGTTTTTGCTCATCAGTGTGTTTGC<text:line-break/>TTTGTTCACTGATAGGTTCTGCAATATATTTTACTGACCCTGTATCCATATTACCTCCTAGCTCTAGATA<text:line-break/>TAGAATATATTATATAGAATGTGTAGTATGTGTCAAGTTAATTTCAACATAATCTTTTTACTACTCATAT<text:line-break/>TTTTGTTAAGTTTTTATGGTGAGTACTGCTAGGTTAAAAGTTGTTTATTACTGGAAGTTTTAGCCAATTT<text:line-break/>TACTATAGATCAACAAAATTGAGAACACCAGCTATATTTAATATATAGGAATATGATGCTTTAAAGGAGT<text:line-break/>ACAAAAACTGCTGAAGCTTATACAGTAACCTGCGGAGCCACTTCAGCAGAATAAACAAACATATGCTAGT<text:line-break/>ATTAGTAGAGAATTATTTATAAGTCAACTAACTTTTTAAAAAAATATTTTAGTGAAGATACCATGCTAGC<text:line-break/>TAGTGTTATAAGGAATTGAATTATTGACTCTTCCTAAGATTGCAAAAAAGGTCGTATATTTGTGAGAACA<text:line-break/>AGCCGCGTAAAAATAAGGTTATAAAAATAGAAGATTTAAATTATTTCAATAAGCTTAGGCAAAAAAGTTC<text:line-break/>GTATGTAGATATGGATGAAATGGGCTAATATAGCTAGTTTTAGCGTATAGTTAAATTGTTAT<text:soft-page-break/>ATTAAAAA<text:line-break/>GTTCGTATGGTACATATGGTAGACCATCCCATCCCAAAGAAAAATGTTCTCACGGGTAGCGTTTTTTGTT<text:line-break/>GCTGGAAATGGTTGGATTATTTAAGTTATTAGCAATATATAATACTAAATTAATAGTAATTCATTTGAGA<text:line-break/>ACAAAAAGAAAAATTTATGATAATTTTACATTTCAAATGGATATTGTTCTTTTTATAAAAAATATTCCTA<text:line-break/>CACTATGTAAGGTCAAGTTCTAATCACATCAATTTTTCTTCCAAATTAAATCTTATCTTTTACAGTGGAT<text:line-break/>CTTACGTTTAAATTATTTTATATCCAAAATTAAGGAAGTTATTCTAAACGGTACACAACTTCAGCATCTA<text:line-break/>AAGCTAGCTGATTTTAAGAAAATATCGCTCTCATGAATGTGCTTTACGGACAAAAGCTTTATTAATATCT<text:line-break/>TCTATATTATTGTTAATAAACAACCCCCCAAAAAAAATATGCAGAAATAAATTAAAAGACCCATTACAAC<text:line-break/>CAACGCGTAAATATGGAGTAAAGAAATACTTCATTCACCTATTAACCTCTACCTACTGCCTCTACCATTG<text:line-break/>CTATGATCATAAACTCTATTCACTCCATCAATTTCATCCAATACAGATTGCGGACCAAAATCAATTGATA<text:line-break/>TCACTCTTTCTCCGCCTAATTGCAATGCTCCCCCACCTCCACGCTGTGGATATTGGAGTTCTAAAAATTG<text:line-break/>TAATAGTAATGGATCAATTTCATGTTGAATTCCTGGACGACCTTGAATCAATCTACCCCTAGGAGAAGAT<text:line-break/>AGAGAATCATTTTGGAATAATTGTGAAATATTTCTTCTCCGATTTCTAAAGTATTGTTCATTTCTTTGAG<text:line-break/>GTTGTCTAGTGTCATTTCCAATTCCTGCACTAAGAAGACCACGTATATAACCTATAATACCTTCACCTTT<text:line-break/>CTCTCCAAAGTTACTATTTCCCTGTAAAGCTTGATCAATAGCTTGGTTAATATCCCTAGCATTTTCGTAT<text:line-break/>GCCCATATGCCACAATTATGGCCATCTGTTTGCTGATGAACGGAAACATCATGGACATTATCATCGCTAA<text:line-break/>TATCACATTCTCTTAAAGCTCCTCGAATATTATTGTCAATACGACTATCTGGACCAAGTGAATCAGCATA<text:line-break/>ATACCCATAATAATTTCCATTTTGGTGGACAATAACTAATGTAACCCAATGACGATTACCTACATTAATA<text:line-break/>ATAGCAGTTAATCTATCTTTTTCACCCGAATCTACTTTTTGTTTAAAGTTATCTATGTTACTACTTAATA<text:line-break/>AGTCCCTACCTGTTGGATCATTTTGATTTCCATCGACTCCTACTGAAGTTATTGCAAAATCATGACGATC<text:line-break/>ATTAGTTGGATTAGATCAATCATCATGGAAAGTATATTGTCGTGCAGCGAAAAACATGTCATGAGTTTGT<text:line-break/>AGCCAATAACGGAAATTTTGATTTTCTGTTGCAAAGTCTAGTGCAAGTAGATTATGCACATCTTCTATTT<text:line-break/>CACGAGCGTTGTTTCTACGAAGGATAGTGTTTATTTGTTGTAATATTCCTTGTGCTGTAGAAGTACCACC<text:line-break/>TCCCCTTATTCTTGACCTTAATGTTTCTATTGCCTGTGCTCTAGTACCTTGCAAGTAACTAAATGGAACG<text:line-break/>TGCAGATTATCATCTATATCAAGCAAAAAAATCGAGTTCTGTCCTGGTCTTTTTTCCATGTAAAAGCGCC<text:line-break/>TGAAATTTTCACGAGTTTGATCTGACAATAGATTTTCTGGTGGATTTTCATCAATAACACTTTCAGGTCC<text:line-break/>CACTAATACTTCTGGTCTTGAGTCATGACCACGACGATCAAGTCTATGTACATACACTG<text:soft-page-break/>CTTGTTGTGGA<text:line-break/>AGAGATATAAAGTCTTCTGCTCTCTGTGCACCTCTATTAAATACAGCATAAGACAAAACCACCTCATTTC<text:line-break/>CAGAAGTAATAGGCAAATATCCCCTTTGTTTGCTCATCAATTCTGTTATTTTGTACCTTGCCTCGTCTTG<text:line-break/>CTCCTGTTCTACTTCTTCTGCATTATCAGCAAATCCTAATACATATCCAATTGGGTGAGTATCTGCTGTA<text:line-break/>GGTTGTCTTAATAATAGAAGACCTAGTCTCTGTTCTGTAACTCTTGTAAGTATTACCCTTTCTCCTTCTT<text:line-break/>CTTCCTGCCACCTTTTTAAACTATATGTTTGACCAACTTTATACATAGCAAGCACTTTATAAGGATTATC<text:line-break/>ACTAGCATAAAATGTACCATGTAGTATAGAGCGAAACTTATCTTTGCTATTTACATCTATTATCATATTG<text:line-break/>CCATGCGTATCTTCTGGCATTAATACTGCAGAAATGTTTCTAAATAATTCTTGATGCTGAAATCTATCTT<text:line-break/>GCCAGCCATCATTCATAACTTGATTTAAAGCATTATGCACATTTCCAGCATTAGGCACTTGCACAAGATT<text:line-break/>ACCACCAAGAAAATTATTTGCATTATTATTTTGGTAATTGTGATATAAACCAAGGTTATCTGTATGAATA<text:line-break/>TTAAGGCCAAGTTGATTATTAAGTGTGCATGAAACTTCCCGTACATGAACATTATTTCCGTCAACATTAA<text:line-break/>GATCTTGTAAATTGATGGCTCCTTGTTGTACAGCGTTGTTATCTCTAATATGAAGTATAACTATATCAGA<text:line-break/>ACCTTGAGTATGGAAGACCATGGTTAAAGCATGATTCTCATCACCATATCTAAATATATACTTTCTTACA<text:line-break/>CGTTGTTGAACTGCGTTTACTAATCTGAACTCTTCTAAAATACTATTCCCAAAAGCAAAACCAGTTATGC<text:line-break/>AATCAAATATTCTGTTATAATTCTCTGCATTTCTTGGTATTTCGTTAGGAAGATGTTGAAGCAAGAAATC<text:line-break/>TCTAATATTTTCTCTAATTCCTTCATCCTCCAAACACTCAAATAATCTTTGTACCAAAGGAAATCTATTC<text:line-break/>TCTAAAAACTCTACTGTATCAATACTAAAAGGATCTATATTCAGATTAAAATTTAATCCAATACAAACAG<text:line-break/>CATTTCTTGATTCAGTGTGAATAGATATAAATGAAGAAGCATGTAATCTTTTAGCATCAGCTCTAGCGCG<text:line-break/>GTTTAATGCAATATCAGACGATGTCCTCCATCTAGTAACATTAATAACGATAGGAATGTTTTCTCTCTCT<text:line-break/>GCCTGATGACATATAAGAAAAGCAACATATGAATTTCCAGGAGACAAGTCAAGGTCAATATCTATTGTGT<text:line-break/>AGAGATGAATAAAATTTGCCAACAAACCTAAGAAAAATCCGTGACTCTCAAACTTTTGACTGCGATTTTG<text:line-break/>AATGTCATTTTGTAGGCTGCCTAGGTAACTACGATAGATTCGAGTTATGTATGGCAAAATTCCTTCATTT<text:line-break/>ATTCCACGTTCTATATTTATTCTTTGGTTACTTGCTAGCACTTCCATAAAACTGAAAATCCCTTGCTGAC<text:line-break/>CCGGTGCAACTTGCACAAAATTGACCAAATGACCAAGCTGTACTCTCTGATCTTGATTGAGTCGTATACT<text:line-break/>TCCTATTTCCTTAACTGTCAACAAACTGCGTGGCGCAGGCGCATTAATCCCATTAAGCCTATTGCGTTCT<text:line-break/>ATATGCCTAAGAAGGCTAATCTCAGACGCTGAATATTTAGCAAATCTATCTCTACCTTGAGAATCTTTTT<text:line-break/>CACGAATCACCTCGAATACTGTTGCAATCGCCTCTCCCTGACTCTTGCCCTTTCCATG<text:soft-page-break/>CATGCATACTTT<text:line-break/>GTATTGCTCAAAATTTAGGTCTTCTTCCCTTAAATTTGGATTTTGCCCTCTAATCTCTCGCACTAGAGCA<text:line-break/>TTTCTTTCCCTTGTACTGAACCTTAACCCATCACTATTAAGACGATCAGAAATACTGTAGCATCTGACAA<text:line-break/>CTTGCTGTCCGTCACGATAAACAGCGACTTTTAGGTTCCCTGTATTTCTATTTCTACCACCTGTATCAAT<text:line-break/>ACCATGATTATCAAAACGAAAATACACTCTCTCATTTGCTTTTAAGATATTAGCATCATGAGCAGTAGCA<text:line-break/>AACATACTGAAAAAGAATACAGGAAGGAAACGTCCTGTACTTACATGATACAAGAAAAATGGACATTGAT<text:line-break/>CTAAAAAGGATTCAAACTCTTGTCTAAAACCATCAAGATCTCCATCCACTAAACTTCTTATTAAAGACAC<text:line-break/>AAAGCACCTCTCTATTTGCTAAGACCAGAAAAACCACTCACATTAATGAGTAGACTAGATTCTTCTTTTC<text:line-break/>TTATGAGAACCAGAAATACCACTCACACTAGGAGCTTCAAACTCAGACTGTGGGCCATCACCAGAACCAT<text:line-break/>CAAGTGGCAAAGATACCTTAGATTGAGACCGCAAATTATTCCAAGGACCATCACCTACAGAAGGTAAAGT<text:line-break/>TACTTTCTCTAACTGAAGAAATAACTCTTCTGCAAACTTGCCGTAATCTACACCTTTCCTCTTTCCTTCC<text:line-break/>CTACCACATATTCTAAGATTTTCTATCATGACTTCTTTAAAAAGGTCAAACTTTTCAGGAAAGCAACCTT<text:line-break/>TGGCAAATGAAATCATATCTAATATTTCTTCTTTCTCTATTTTCCTATCGGGCTTACAAACATCTTCTCG<text:line-break/>TTTCCAATTAATGATTAATCCCCCAAGTACACTCTTTATAGGAACTGTATAATTAGAAGTATTAACAGAG<text:line-break/>GTCTCTCTGTATTCAGCAAAGCGTTCACATTTCCAAATCTCCATAATAAGGGATCTAGCTTGAACACTTA<text:line-break/>ACTCAGGATTTTTCAACATCACATTTGAAAGTGAATAAAGAAAAAGTTCATAGTCTTGCTGTGAGAATAT<text:line-break/>CTTGTCCGAACAGTCTCCTCCTGCTGAAACGCCTTTATAACACCAGCACTGTACCAAATCATGAACCGTA<text:line-break/>TCAAAAAAACATGACTCTATTAATTCAGCAAGAAGGGAATATACTCCCTTATCTTTCTGCAATAATTTCT<text:line-break/>GTAAAAGAGTATCTTTATCGCCTATATTCCTTACACAAAAATCTAAAATAGGAGCGTCTTTCTTAACAGA<text:line-break/>TTGAGGACGAGAAAGAGCAACAATAGCTTCTGTAAGCTTCTTCTCCTTATCTTTTTCCTCTAACTGATTA<text:line-break/>TAAAAATACTCTACCCCTTCGCTCCACTTAAGTTTTACAGCACTGTCAAAACCTTCTACTGCATCATACT<text:line-break/>TCTTTAATTCCCCAGATTCTCTATCGATCCAGAAATCAAACACAGGACCATTTCTCTTCATGGATGATAG<text:line-break/>CAGAATGTTTCTTACATATTGATCACTGATCGGATTACCTTGACTATCTACCTCTTCTGAAGTAAATTGA<text:line-break/>CCTCTAGAGAGTACAAACTGTTTGTTGAAAAAATCACCTATCTTGCCCGTTATACAGTACCTAGATGCCA<text:line-break/>TACCATACCTTGGTAGTGGGTTATCGATTTCTCCTATTTTCTCTTCAGTCAATTTCTGACCTAAAACAGT<text:line-break/>ATTATTTAACCTTGTACCTAACCAACAACCTTCATCTCGAAAAACATTATATAAGAATTCCAGCTTATCA<text:line-break/>TCCTTAAAAAGTTTGATATACTCTATATAGGTCTCGACCCACCTTTTAATAGCTAACTTTC<text:soft-page-break/>TTCCAGCCG<text:line-break/>CAATGTCACGATCTGTATGTTTTATCACATCTTGTAGCTTTTTAAGCACTTCAGCCTGACGTTTTGTTTC<text:line-break/>TATTGGCATTTAAACCTCCCTATATCATGAAAACAACGCTATGGTACTAAATTTGTAACTAAGTTACAAC<text:line-break/>ACCTAATTACTCCAGAAAGACCTATTTGATACCCAAACGTTCTGGTCAGGCCTAGAGAAATCTGTCTGGA<text:line-break/>ATTATTGAGTATTTTCTAGAAATCTTAATTTGACAGCTAACACCAGGTTTTCTGGAGACTATAGGTGATG<text:line-break/>CACTTTTTCTATTTATATTCCCAAGAATAAGGTCAGTAGATATGTTGTTTTCCAGAAGAATATTAGTAAG<text:line-break/>ATTAATTGGAGAAGTGCTTATGACTTTAACTAAGTGTGTTTTAACTTCGCCCTTAAGTTCTGTTCAGCAG<text:line-break/>TATCTGTTAGTGTTAGGTAAGGTTATGGTTGTAAATACAAAATCCGATCAGCAGAGGGCTGAAGATG</text:p>
      <text:p text:style-name="P11"/>
      <text:p text:style-name="P13"/>
      <text:p text:style-name="P13">&gt; NW_025319047.1 <text:span text:style-name="T13">interval 2 brut</text:span></text:p>
      <text:p text:style-name="P13">&gt; VIRT-2315954:3'5' Frame 1, start_pos=674</text:p>
      <text:p text:style-name="P13">MFATAHDANILKANERVYFRFDNHGIDTGGRNRNTGNLKVAVYRDGQQVV</text:p>
      <text:p text:style-name="P13">RCYSISDRLNSDGLRFSTRERNALVREIRGQNPNLREEDLNFEQYKVCMH</text:p>
      <text:p text:style-name="P13">GKGKSQGEAIATVFEVIREKDSQGRDRFAKYSASEISLLRHIERNRLNGI</text:p>
      <text:p text:style-name="P13">NAPAPRSLLTVKEIGSIRLNQDQRVQLGHLVNFVQVAPGQQGIFSFMEVL</text:p>
      <text:p text:style-name="P13">ASNQRINIERGINEGILPYITRIYRSYLGSLQNDIQNRSQKFESHGFFLG</text:p>
      <text:p text:style-name="P13">LLANFIHLYTIDIDLDLSPGNSYVAFLICHQAERENIPIVINVTRWRTSS</text:p>
      <text:p text:style-name="P13">DIALNRARADAKRLHASSFISIHTESRNAVCIGLNFNLNIDPFSIDTVEF</text:p>
      <text:p text:style-name="P13">LENRFPLVQRLFECLEDEGIRENIRDFLLQHLPNEIPRNAENYNRIFDCI</text:p>
      <text:p text:style-name="P13">TGFAFGNSILEEFRLVNAVQQRVRKYIFRYGDENHALTMVFHTQGSDIVI</text:p>
      <text:p text:style-name="P13">LHIRDNNAVQQGAINLQDLNVDGNNVHVREVSCTLNNQLGLNIHTDNLGL</text:p>
      <text:p text:style-name="P13">YHNYQNNNANNFLGGNLVQVPNAGNVHNALNQVMNDGWQDRFQHQELFRN</text:p>
      <text:p text:style-name="P13">ISAVLMPEDTHGNMIIDVNSKDKFRSILHGTFYASDNPYKVLAMYKVGQT</text:p>
      <text:p text:style-name="P13">YSLKRWQEEEGERVILTRVTEQRLGLLLLRQPTADTHPIGYVLGFADNAE</text:p>
      <text:p text:style-name="P13">EVEQEQDEARYKITELMSKQRGYLPITSGNEVVLSYAVFNRGAQRAEDFI</text:p>
      <text:p text:style-name="P13">SLPQQAVYVHRLDRRGHDSRPEVLVGPESVIDENPPENLLSDQTRENFRR</text:p>
      <text:p text:style-name="P13">FYMEKRPGQNSIFLLDIDDNLHVPFSYLQGTRAQAIETLRSRIRGGGTST</text:p>
      <text:p text:style-name="P13">AQGILQQINTILRRNNAREIEDVHNLLALDFATENQNFRYWLQTHDMFFA</text:p>
      <text:p text:style-name="P13">ARQYTFHDD</text:p>
      <text:p text:style-name="P13"/>
      <text:p text:style-name="P11"/>
      <text:p text:style-name="P13">&gt; NW_025319047.1 <text:span text:style-name="T13">interval 2 extended</text:span></text:p>
      <text:p text:style-name="P11">LIRSLVDGDLDGFRQEFESFLDQCPFFLYHVSTGRFLPVFFFSMFATAHDANILKANERVYFRFDNHGIDTGGRNRNTGNLKVAVYRDGQQVVRCYSISDRLNSDGLRFSTRERNALVREIRGQNPNLREEDLNFEQYKVCMHGKGKSQGEAIATVFEVIREKDSQGRDRFAKYSASEISLLRHIERNRLNGINAPAPRSLLTVKEIGSIRLNQDQRVQLGHLVNFVQVAPGQQGIFSFMEVLASNQRINIERGINEGILPYITRIYRSYLGSLQNDIQNRSQKFESHGFFLGLLANFIHLYTIDIDLDLSPGNSYVAFLICHQAERENIPIVINVTRWRTSSDIALNRARADAKRLHASSFISIHTESRNAVCIGLNFNLNIDPFSIDTVEFLENRFPLVQRLFECLEDEGIRENIRDFLLQHLPNEIPRNAENYNRIFDCITGFAFGNSILEEFRLVNAVQQRVRKYIFRYGDENHALTMVFHTQGSDIVILHIRDNNAVQQGAINLQDLNVDGNNVHVREVSCTLNNQLGLNIHTDNLGLYHNYQNNNANNFLGGNLVQVPNAGNVHNALNQVMNDGWQDRFQHQELFRNISAVLMPEDTHGNMIIDVNSKDKFRSILHGTFYASDNPYKVLAMYKVGQTYSLKRWQEEEGERVILTRVTEQRLGLLLLRQPTADTHPIGYVLGFADNAEEVEQEQDEARYKITELMSKQRGYLPITSGNEVVLSYAVFNRG<text:soft-page-break/>AQRAEDFISLPQQAVYVHRLDRRGHDSRPEVLVGPESVIDENPPENLLSDQTRENFRRFYMEKRPGQNSIFLLDIDDNLHVPFSYLQGTRAQAIETLRSRIRGGGTSTAQGILQQINTILRRNNAREIEDVHNLLALDFATENQNFRYWLQTHDMFFAARQYTFHDD</text:p>
      <text:p text:style-name="P11"/>
      <text:p text:style-name="P11">&gt;ref|NW_025319047.1 <text:span text:style-name="T14">interval 3 </text:span>|:254963-263535 Drosophila ananassae strain 14024-0371.13 chromosome 4 unlocalized genomic scaffold, ASM1763931v2 tig00000241, whole genome shotgun sequence<text:line-break/>ATAGAAAGTTAATACTATATCGCTGCCTTCTGTAAGATCTGTGTAATACCTTATGCCGTTTTCGGTTATA<text:line-break/>ATTTCCATCTTACTTTTGCCAATTTTTATTATATCCCTTCTATATGATTCCTGAATTAGTTCCAGATTTC<text:line-break/>TTGTTCTATTTGTGATTCTTGCAACATCTATTATACTATCCTCTGAGTATTCTAAGTAAAATACATTATT<text:line-break/>ATCGATTTTTCCATCATATAGTTGACCGCTGGTAGCAGCCTTTGCAATTCTAAAAAATTCCTCAGCATTA<text:line-break/>CTAACATACTCTAAATGAGCACTGATCATATTAGCCTTATGAGCTTTGAACTTTAATTCTATTGTATCAA<text:line-break/>TGACTTTTAAACTTTCTGACCTTTTTAACTTTGCTCCTCTTGATATTAATGTACATACTATATCACTGGC<text:line-break/>AATTCCATAGCTTCCTTCTATCTGAGCAATTTTTTCTAGTACGTGATCTGCAAAGTAATAATCTTTGTCT<text:line-break/>TTAGCAAAATTTAATCTCATTCCAGAAGCTATAATCTCATTTACAACTTCTTGTAATTCAATCATGCTTT<text:line-break/>TAGCTTTTACTACCTTACTTAAAAACTCATTGCGTTTAGCAAGGTAATTTATTTGATAAATCTCTGATAA<text:line-break/>AAAACTATCGCATTTTTCATAATTGTCTTGTTTTTTACCTATAAAATCAGCTGCTCCTGCTTTTAAGAGC<text:line-break/>AAGGCTTTTACATTAGGAAATTGACGAGATGGCGAATCAAGAAGTACTGAACTATCATCCTTAACATTTA<text:line-break/>AAACTATCTTTAAGTCGTTGTCATTTTCATATTGATTTAAAAACTTTCTTAGATTTTCAACCTCTGGATC<text:line-break/>ATAAGCATTATCCCAATCTTCATCAGAACTTGTAGCGAGAAGCATTTTACCTAGTTGCTCTCTTAATTTT<text:line-break/>TTTTGACTATTAGTTAATAAACATCCTATAATGTTGTCATTATCAATTGCAACTTGCAGTGGAGTTTTTC<text:line-break/>CATCGTTATTTTTTATGCTTAAATCAGCTCCTTTGCTTATGAGCAAATCCATAGTTTTTCTGCTTTGATC<text:line-break/>ACTACACTTAGCAGCATAATAGTGTAAAGGTGTGTTACCTTTTTCATCTTGTATATTTGGATCAGCTTTT<text:line-break/>GCATCTAAGAGATACCCAAGATCTTCATATCCACTAGAATAAATAGCAGTATCATGCAAAAGTGTTTTAC<text:line-break/>CTTTATTATCCTGCATATTTAGATCAGCACCAGCTTTGAGAAGAGAAGGAATAATTTCGTCGTATTCGAG<text:line-break/>AAACACGTTCAATATTGTTGTTCCTAGATGCCCTCTTTTTAAATTAAGAACGTACTTCAGGTCTTTATTT<text:line-break/>TTCTCGTTACTTTCTAAAAACTGCTTAAGATTTATTAACTGCATATTAAAATCTTTTATAATACTATTGA<text:line-break/>GTAATTTTTGATTTAACTTTTTTTGACTCTCTTCCAGTCCTAAGTTAGGTGCATGAATAAGCCACTCATC<text:line-break/>TATTAAATCCTCTAAGTATTTTTTATCATCTATCAAACTTCTATCAGCCGAAAATAAATCTCGCTTAATG<text:line-break/>AATTCATAATAACTATCTACTGGTAATCCAGTTGCTTCTGTTTTTGGGCTACCTATTTCTG<text:soft-page-break/>AAAACTCTT<text:line-break/>GTCCAGCACTTAGGTCACACTTCAGTTTTTGCTCATCAGTGTGTTTGCTTTGTTCACTGATAGGTTCTGC<text:line-break/>AATATATTTTACTGACCCTGTATCCATATTACCTCCTAGCTCTAGATATAGAATATATTATATAGAATGT<text:line-break/>GTAGTATGTGTCAAGTTAATTTCAACATAATCTTTTTACTAATCATATTTTTGTTACTGCTGAAGCTTAT<text:line-break/>ACAGTAACCTGCGGAGCCACTTCAGCAGAATAAACAAACATATGCTAGTATTAGTAGAGAATTATTTATA<text:line-break/>AGTCAACTAACTTTTTAAAAAAATATTTTAGTGAAGATACCATGCTAGCTAGTGTTATAAGGAATTGAAT<text:line-break/>TATTGACTCTTCCTAAGATTGCAAAAAAGGTCGTATATTTGTGAGAACAGGCCGCGTAAAAATAAGGTTA<text:line-break/>TAAAAATAGAAGATTTAAATTATTTCAATAAGCTTAGGCAAAAAAGTTCGTATGTAGATATGGATGAAAT<text:line-break/>GGGCTAATATAGCTAGTTTTAGCGTATAGTTAAATTGTTATATTAAAAAGTTCGTATGGTACATATGGTA<text:line-break/>GACCATCCCATCCCAAAGAAAAATGTTCTCACGGGTAGCGTTTTTTGTTGCTGGAAATGGTTGGATTATT<text:line-break/>TAAGTTATTAGCAATATATAATACTAAATTAATAGTAATTCATTTGAGAACAAAAAGAAAAATTTATGAT<text:line-break/>AATTTTACATTTCAAATGGATATTGTTCTTTTTATAAAAAATATTCCTACACTATGTAAGGTCAAGTTCT<text:line-break/>AATCACATCAATTTTTCTTCCAAATTAAATCTTATCTTTTACAGTGGATCTTACGTTTAAATTATTTTAT<text:line-break/>ATCCAAAATTAAGGAAGTTATTCTAAACGGTACACAACTTCAGCATCTAAAGCTAGCTGATTTTAAGAAA<text:line-break/>ATATCGCTCTCATGAATGTGCTTTACGGACAAAAGCTTTATTAATATCTTCTATATTATTGTTAATAAAC<text:line-break/>AACCCCCCAAAAAAAATATGCAGAAATAAATTAAAAGACCCATTACAACCAACGCGTAAATATGGAGTAA<text:line-break/>AGAAATACTTCATTCACCTATTAACCTCTACCTACTGCCTCTACCATTGCTATGATCATAAACTCTATTC<text:line-break/>ACTCCATCAATTTCATCCAATACAGATTGCGGACCAAAATCAATTGATATCACTCTTTCTCCGCCTAATT<text:line-break/>GCAATGCTCCCCCACCTCCACGCTGTGGATATTGGAGTTCTAAAAATTGTAATAGTAATGGATCAATTTC<text:line-break/>ATGTTGAATTCCTGGACGACCTTGAATCAATCTACCCCTAGGAGAAGATAGAGAATCATTTTGGAATAAT<text:line-break/>TGTGAAATATTTCTTCTCCGATTTCTAAAGTATTGTTCATTTCTTTGAGGTTGTCTAGTGTCATTTCCAA<text:line-break/>TTCCTGCACTAAGAAGACCACGTATATAACCTATAATACCTTCACCTTTCTCTCCAAAGTTACTATTTCC<text:line-break/>CTGTAAAGCTTGATCAATAGCTTGGTTAATATCCCTAGCATTTTCGTATGCCCATATGCCACAATTATGG<text:line-break/>CCATCTGTTTGCTGATGAACGGAAACATCATGGACATTATCATCGCTAATATCACATTCTCTTAAAGCTC<text:line-break/>CTCGAATATTATTGTCAATACGACTATCTGGACCAAGTGAATCAGCATAATACCCATAATAATTTCCATT<text:line-break/>TTGGTGGACAATAACTAATGTAACCCAATGACGATTACCTACATTAATAATAGCAGTTAATCTATCTTTT<text:line-break/>TCACCCGAATCTACTTTTTGTTTAAAGTTATCTATGTTACTACTTAATAAGTCCCTACCTG<text:soft-page-break/>TTGGATCAT<text:line-break/>TTTGATTTCCATCGACTCCTACTGAAGTTATTGCAAAATCATGACGATCATTAGTTGGATTAGATCAATC<text:line-break/>ATCATGGAAAGTATATTGTCGTGCAGCGAAAAACATGTCATGAGTTTGTAGCCAATAACGGAAATTTTGA<text:line-break/>TTTTCTGTTGCAAAGTCTAGTGCAAGTAGATTATGCACATCTTCTATTTCACGAGCGTTGTTTCTACGAA<text:line-break/>GGATAGTGTTTATTTGTTGTAATATTCCTTGTGCTGTAGAAGTACCACCTCCCCTTATTCTTGACCTTAA<text:line-break/>TGTTTCTATTGCCTGTGCTCTAGTACCTTGCAAGTAACTAAATGGAACGTGCAGATTATCATCTATATCA<text:line-break/>AGCAAAAAAATCGAGTTCTGTCCTGGTCTTTTTTCCATGTAAAAGCGCCTGAAATTTTCACGAGTTTGAT<text:line-break/>CTGACAATAGATTTTCTGGTGGATTTTCATCAATAACACTTTCAGGTCCCACTAATACTTCTGGTCTTGA<text:line-break/>GTCATGACCACGACGATCAAGTCTATGTACATACACTGCTTGTTGTGGAAGAGATATAAAGTCTTCTGCT<text:line-break/>CTCTGTGCACCTCTATTAAATACAGCATAAGACAAAACCACCTCATTTCCAGAAGTAATAGGCAAATATC<text:line-break/>CCCTTTGTTTGCTCATCAATTCTGTTATTTTGTACCTTGCCTCGTCTTGCTCCTGTTCTACTTCTTCTGC<text:line-break/>ATTATCAGCAAATCCTAATACATATCCAATTGGGTGAGTATCTGCTGTAGGTTGTCTTAATAATAGAAGA<text:line-break/>CCTAGTCTCTGTTCTGTAACTCTTGTAAGTATTACCCTTTCTCCTTCTTCTTCCTGCCACCTTTTTAAAC<text:line-break/>TATATGTTTGACCAACTTTATACATAGCAAGCACTTTATAAGGATTATCACTAGCATAAAATGTACCATG<text:line-break/>TAGTATAGAGCGAAACTTATCTTTGCTATTTACATCTATTATCATATTGCCATGCGTATCTTCTGGCATT<text:line-break/>AATACTGCAGAAATGTTTCTAAATAATTCTTGATGCTGAAATCTATCTTGCCAGCCATCATTCATAACTT<text:line-break/>GATTTAAAGCATTATGCACATTTCCAGCATTAGGCACTTGCACAAGATTACCACCAAGAAAATTATTTGC<text:line-break/>ATTATTATTTTGGTAATTGTGATATAAACCAAGGTTATCTGTATGAATATTAAGGCCAAGTTGATTATTA<text:line-break/>AGTGTGCATGAAACTTCCCGTACATGAACATTATTTCCGTCAACATTAAGATCTTGTAAATTGATGGCTC<text:line-break/>CTTGTTGTACAGCGTTGTTATCTCTAATATGAAGTATAACTATATCAGAACCTTGAGTATGGAAGACCAT<text:line-break/>GGTTAAAGCATGATTCTCATCACCATATCTAAATATATACTTTCTTACACGTTGTTGAACTGCGTTTACT<text:line-break/>AATCTGAACTCTTCTAAAATACTATTCCCAAAAGCAAAACCAGTTATGCAATCAAATATTCTGTTATAAT<text:line-break/>TCTCTGCATTTCTTGGTATTTCGTTAGGAAGATGTTGAAGCAAGAAATCTCTAATATTTTCTCTAATTCC<text:line-break/>TTCATCCTCCAAACACTCAAATAATCTTTGTACCAAAGGAAATCTATTCTCTAAAAACTCTACTGTATCA<text:line-break/>ATACTAAAAGGATCTATATTCAGATTAAAATTTAATCCAATACAAACAGCATTTCTTGATTCAGTGTGAA<text:line-break/>TAGATATAAATGAAGAAGCATGTAATCTTTTAGCATCAGCTCTAGCGCGGTTTAATGCAATATCAGACGA<text:line-break/>TGTCCTCCATCTAGTAACATTAATAACGATAGGAATGTTTTCTCTCTCTGCCTGATGACA<text:soft-page-break/>TATAAGAAAA<text:line-break/>GCAACATATGAATTTCCAGGAGACAAGTCAAGGTCAATATCTATTGTGTAGAGATGAATAAAATTTGCCA<text:line-break/>ACAAACCTAAGAAAAATCCGTGACTCTCAAACTTTTGACTGCGATTTTGAATGTCATTTTGTAGGCTGCC<text:line-break/>TAGGTAACTACGATAGATTCGAGTTATGTATGGCAAAATTCCTTCATTTATTCCACGTTCTATATTTATT<text:line-break/>CTTTGGTTACTTGCTAGCACTTCCATAAAACTGAAAATCCCTTGCTGACCCGGTGCAACTTGCACAAAAT<text:line-break/>TGACCAAATGACCAAGCTGTACTCTCTGATCTTGATTGAGTCGTATACTTCCTATTTCCTTAACTGTCAA<text:line-break/>CAAACTGCGTGGCGCAGGCGCATTAATCCCATTAAGCCTATTGCGTTCTATATGCCTAAGAAGGCTAATC<text:line-break/>TCAGACGCTGAATATTTAGCAAATCTATCTCTACCTTGAGAATCTTTTTCACGAATCACCTCGAATACTG<text:line-break/>TTGCAATCGCCTCTCCCTGACTCTTGCCCTTTCCATGCATGCATACTTTGTATTGCTCAAAATTTAGGTC<text:line-break/>TTCTTCCCTTAAATTTGGATTTTGCCCTCTAATCTCTCGCACTAGAGCATTTCTTTCCCTTGTACTGAAC<text:line-break/>CTTAACCCATCACTATTAAGACGATCAGAAATACTGTAGCATCTGACAACTTGCTGTCCGTCACGATAAA<text:line-break/>CAGCGACTTTTAGGTTCCCTGTATTTCTATTTCTACCACCTGTATCAATACCATGATTATCAAAACGAAA<text:line-break/>ATACACTCTCTCATTTGCTTTTAAGATATTAGCATCATGAGCAGTAGCAAACATACTGAAAAAGAATACA<text:line-break/>GGAAGGAAACGTCCTGTACTTACATGATACAAGAAAAATGGACATTGATCTAAAAAGGATTCAAACTCTT<text:line-break/>GTCTAAAACCATCAAGATCTCCATCCACTAAACTTCTTATTAAAGACACAAAGCACCTCTCTATTTGCTA<text:line-break/>AGACCAGAAAAACCACTCACATTAATGAGTAGACTAGATTCTTCTTTTCTTATGAGAACCAGAAATACCA<text:line-break/>CTCACACTAGGAGCTTCAAACTCAGACTGTGGGCCATCACCAGAACCATCAAGTGGCAAAGATACCTTAG<text:line-break/>ATTGAGACCGCAAATTATTCCAAGGACCATCACCTACAGAAGGTAAAGTTACTTTCTCTAACTGAAGAAA<text:line-break/>TAACTCTTCTGCAAACTTGCCGTAATCTACACCTTTCCTCTTTCCTTCCCTACCACATATTCTAAGATTT<text:line-break/>TCTATCATGACTTCTTTAAAAAGGTCAAACTTTTCAGGAAAGCAACCTTTGGCAAATGAAATCATATCTA<text:line-break/>ATATTTCTTCTTTCTCTATTTTCCTATCGGGCTTACAAACATCTTCTCGTTTCCAATTAATGATTAATCC<text:line-break/>CCCAAGTACACTCTTTATAGGAACTGTATAATTAGAAGTATTAACAGAGGTCTCTCTGTATTCAGCAAAG<text:line-break/>CGTTCACATTTCCAAATCTCCATAATAAGGGATCTAGCTTGAACACTTAACTCAGGATTTTTCAACATCA<text:line-break/>CATTTGAAAGTGAATAAAGAAAAAGTTCATAGTCTTGCTGTGAGAATATCTTGTCCGAACAGTCTCCTCC<text:line-break/>TGCTGAAACGCCTTTATAACACCAGCACTGTACCAAATCATGAACCGTATCAAAAAAACATGACTCTATT<text:line-break/>AATTCAGCAAGAAGGGAATATACTCCCTTATCTTTCTGCAATAATTTCTGTAAAAGAGTATCTTTATCGC<text:line-break/>CTATATTCCTTACACAAAAATCTAAAATAGGAGCGTCTTTCTTAACAGATTGAGGACGAG<text:soft-page-break/>AAAGAGCAAC<text:line-break/>AATAGCTTCTGTAAGCTTCTTCTCCTTATCTTTTTCCTCTAACTGATTATAAAAATACTCTACCCCTTCG<text:line-break/>CTCCACTTAAGTTTTACAGCACTGTCAAAACCTTCTACTGCATCATACTTCTTTAATTCCCCAGATTCTC<text:line-break/>TATCGATCCAGAAATCAAACACAGGACCATTTCTCTTCATGGATGATAGCAGAATGTTTCTTACATATTG<text:line-break/>ATCACTGATCGGATTACCTTGACTATCTACCTCTTCTGAAGTAAATTGACCTCTAGAGAGTACAAACTGT<text:line-break/>TTGTTGAAAAAATCACCTATCTTGCCCGTTATACAGTACCTAGATGCCATACCATACCTTGGTAGTGGGT<text:line-break/>TATCGATTTCTCCTATTTTCTCTTCAGTCAATTTCTGACCTAAAACAGTATTATTTAACCTTGTACCTAA<text:line-break/>CCAACAACCTTCATCTCGAAAAACATTATATAAGAATTCCAGCTTATCATCCTTAAAAAGTTTGATATAC<text:line-break/>TCTATATAGGTCTCGACCCACCTTTTAATAGCTAACTTTCTTCCAGCCGCAATGTCACGATCTGTATGTT<text:line-break/>TTATCACATCTTGTAGCTTTTTAAGCACTTCAGCCTGACGTTTTGTTTCTATTGGCATTTAAACCTCCCT<text:line-break/>ATATCATGAAAACAACGCTATGGTACTAAATTTGTAACTAAGTTACAACACCTAATTACTCCAGAAAGAC<text:line-break/>CTATTTGATACCCAAACGTTCTGGTCAGGCCTAGAGAAATCTGTCTGGAATTATTGAGTATTTTCTAGAA<text:line-break/>ATCTTAATTTGACAGCTAACACCAGGTTTTCTGGAGACTATAGGTGATGCACTTTTTCTATTTATATTCC<text:line-break/>CAAGAATAAGGTCAGTAGATATGTTGTTTTCCAGAAGAATATTAGTAAGATTAATTGGAGAAGTGCTTAT<text:line-break/>GACTTTAACTAAGTGTGTTTTAACTTCGCCCTTAAGTTCTGTTCAGCAGTATCTGTTAGTGTTAGGTAAG<text:line-break/>GTTATGGTTGTAAATACAAAATCCGATCAGCAGAGGGCTGAAGATGATCTATATACTGTTTTGAGATTCA<text:line-break/>AAGAAAAAGGAGATTTTGAAAGACGGATAAGAGAACTGCTTGTTAACGATTATAAGAAACTTAAAAAACC<text:line-break/>ACTGAGCAAACTCCTTGGTAAGTTAGAAAGTAAAATAAGGACTGATAAAGAGAATAACCAAGCAGCCAGA<text:line-break/>AACGTTTATGATCAAATCAAAAAATCTAAAACTAATGAAGATAAATTAAGTAATTTATTGAACTTTAAAA<text:line-break/>AACAGCTAAAAGCTTTCCTAAAAAATCAAGATGATTGTAGTATTGTGTTAAATGCGATTGACTCTGCAAG<text:line-break/>TGTTATCCCTGTTATTGAAGTTAATGGTGTGCATCCAAAAGATAGTGAGATCAAAAAGTTAAAAAAAGCT<text:line-break/>CAACCTCTCACCTCTAACAGACAAGACTTTGAAGAAGCTCTAGGATACATAGAATCACAAGAAAAAGTTA<text:line-break/>TGGGAATTACATTAGAGGAAATTATGGAATACA</text:p>
      <text:p text:style-name="P14"/>
      <text:p text:style-name="P14">&gt; NW_025319047.1 <text:span text:style-name="T13">interval </text:span><text:span text:style-name="T15">3</text:span><text:span text:style-name="T13"> </text:span><text:span text:style-name="T15">brut</text:span></text:p>
      <text:p text:style-name="P11">MFATAHDANILKANERVYFRFDNHGIDTGGRNRNTGNLKVAVYRDGQQVV</text:p>
      <text:p text:style-name="P11">RCYSISDRLNSDGLRFSTRERNALVREIRGQNPNLREEDLNFEQYKVCMH</text:p>
      <text:p text:style-name="P11">GKGKSQGEAIATVFEVIREKDSQGRDRFAKYSASEISLLRHIERNRLNGI</text:p>
      <text:p text:style-name="P11">NAPAPRSLLTVKEIGSIRLNQDQRVQLGHLVNFVQVAPGQQGIFSFMEVL</text:p>
      <text:p text:style-name="P11">ASNQRINIERGINEGILPYITRIYRSYLGSLQNDIQNRSQKFESHGFFLG</text:p>
      <text:p text:style-name="P11">LLANFIHLYTIDIDLDLSPGNSYVAFLICHQAERENIPIVINVTRWRTSS</text:p>
      <text:p text:style-name="P11"><text:soft-page-break/>DIALNRARADAKRLHASSFISIHTESRNAVCIGLNFNLNIDPFSIDTVEF</text:p>
      <text:p text:style-name="P11">LENRFPLVQRLFECLEDEGIRENIRDFLLQHLPNEIPRNAENYNRIFDCI</text:p>
      <text:p text:style-name="P11">TGFAFGNSILEEFRLVNAVQQRVRKYIFRYGDENHALTMVFHTQGSDIVI</text:p>
      <text:p text:style-name="P11">LHIRDNNAVQQGAINLQDLNVDGNNVHVREVSCTLNNQLGLNIHTDNLGL</text:p>
      <text:p text:style-name="P11">YHNYQNNNANNFLGGNLVQVPNAGNVHNALNQVMNDGWQDRFQHQELFRN</text:p>
      <text:p text:style-name="P11">ISAVLMPEDTHGNMIIDVNSKDKFRSILHGTFYASDNPYKVLAMYKVGQT</text:p>
      <text:p text:style-name="P11">YSLKRWQEEEGERVILTRVTEQRLGLLLLRQPTADTHPIGYVLGFADNAE</text:p>
      <text:p text:style-name="P11">EVEQEQDEARYKITELMSKQRGYLPITSGNEVVLSYAVFNRGAQRAEDFI</text:p>
      <text:p text:style-name="P11">SLPQQAVYVHRLDRRGHDSRPEVLVGPESVIDENPPENLLSDQTRENFRR</text:p>
      <text:p text:style-name="P11">FYMEKRPGQNSIFLLDIDDNLHVPFSYLQGTRAQAIETLRSRIRGGGTST</text:p>
      <text:p text:style-name="P11">AQGILQQINTILRRNNAREIEDVHNLLALDFATENQNFRYWLQTHDMFFA</text:p>
      <text:p text:style-name="P11">ARQYTFHDD</text:p>
      <text:p text:style-name="P11"/>
      <text:p text:style-name="P14">&gt; NW_025319047.1 <text:span text:style-name="T13">interval </text:span><text:span text:style-name="T15">3</text:span><text:span text:style-name="T13"> extended</text:span></text:p>
      <text:p text:style-name="P11">LIRSLVDGDLDGFRQEFESFLDQCPFFLYHVSTGRFLPVFFFSMFATAHDANILKANERVYFRFDNHGIDTGGRNRNTGNLKVAVYRDGQQVVRCYSISDRLNSDGLRFSTRERNALVREIRGQNPNLREEDLNFEQYKVCMHGKGKSQGEAIATVFEVIREKDSQGRDRFAKYSASEISLLRHIERNRLNGINAPAPRSLLTVKEIGSIRLNQDQRVQLGHLVNFVQVAPGQQGIFSFMEVLASNQRINIERGINEGILPYITRIYRSYLGSLQNDIQNRSQKFESHGFFLGLLANFIHLYTIDIDLDLSPGNSYVAFLICHQAERENIPIVINVTRWRTSSDIALNRARADAKRLHASSFISIHTESRNAVCIGLNFNLNIDPFSIDTVEFLENRFPLVQRLFECLEDEGIRENIRDFLLQHLPNEIPRNAENYNRIFDCITGFAFGNSILEEFRLVNAVQQRVRKYIFRYGDENHALTMVFHTQGSDIVILHIRDNNAVQQGAINLQDLNVDGNNVHVREVSCTLNNQLGLNIHTDNLGLYHNYQNNNANNFLGGNLVQVPNAGNVHNALNQVMNDGWQDRFQHQELFRNISAVLMPEDTHGNMIIDVNSKDKFRSILHGTFYASDNPYKVLAMYKVGQTYSLKRWQEEEGERVILTRVTEQRLGLLLLRQPTADTHPIGYVLGFADNAEEVEQEQDEARYKITELMSKQRGYLPITSGNEVVLSYAVFNRGAQRAEDFISLPQQAVYVHRLDRRGHDSRPEVLVGPESVIDENPPENLLSDQTRENFRRFYMEKRPGQNSIFLLDIDDNLHVPFSYLQGTRAQAIETLRSRIRGGGTSTAQGILQQINTILRRNNAREIEDVHNLLALDFATENQNFRYWLQTHDMFFAARQYTFHDD</text:p>
      <text:p text:style-name="P11"/>
      <text:p text:style-name="P11">&gt;ref|NW_025319040.1|:364036-373604 Drosophila ananassae strain 14024-0371.13 chromosome 4 unlocalized genomic scaffold, ASM1763931v2 tig00000070, whole genome shotgun sequence<text:line-break/>CTTTTGTACAATATTAGACTCAATATTGCGTAAATCTTGTAATAACTTATGCCTTCTAGCAATTTCCTCC<text:line-break/>ATAGAATCCCTTCTTAACTCTTCACGTTCTGTCCATTTGTTGTTAGACTCGCTTATTACTTCAGGACGCA<text:line-break/>TTAATTTTCTAGACCTTTCAAAATATCCCTGTTCAATAGCATTGTAGACCGAGTAGCCACCGAGCGCGCA<text:line-break/>ATCATTGCCTAACTCTTCTTCGCGACCTTTGAATTTTTCTAATATTTCTTCTCTATTACTCACTTCTACT<text:line-break/>ATAATCTTGCTTTTATCCTGTATGTCAGGATACAGTCTAAGGTCTATATTTCCCAAACTAGTATAGAAAG<text:line-break/>TTAATACTATATCGCTGCCTTCTGTAAGATCTGTGTAATACCTTATGCCGTTTTCGGTTATAATTTCCAT<text:line-break/>CTTACTTTTGCCAATTTTTATTATATCCCTTCTATATGATTCCTGAATTAGTTCCAGATTTCTTGTTCTA<text:line-break/>TTTGTGATTCTTGCAACATCTATTATACTATCCTCTGAGTATTCTAAGTAAAATACATTATTATCGATTT<text:line-break/>TTCCATCATATAGTTGACCGCTGGTAGCAGCCTTTGCAATTCTAAAAAATTCCTCAGCATTACTAACATA<text:line-break/>CTCTAAATGAGCACTGATCATATTAGCCTTATGAGCTTTGAACTTTAATTCTATTGTATCA<text:soft-page-break/>ATGACTTTT<text:line-break/>AAACTTTCTGACCTTTTTAACTTTGCTCCTCTTGATATTAATGTACATACTATATCACTGGCAATTCCAT<text:line-break/>AGCTTCCTTCTATCTGAGCAATTTTTTCTAGTACGTGATCTGCAAAGTAATAATCTTTGTCTTTAGCAAA<text:line-break/>ATTTAATCTCATTCCAGAAGCTATAATCTCATTTACAACTTCTTGTAATTCAATCATGCTTTTAGCTTTT<text:line-break/>ACTACCTTACTTAAAAACTCATTGCGTTTAGCAAGGTAATTTATTTGATAAATCTCTGATAAAAAACTAT<text:line-break/>CGCATTTTTCATAATTGTCTTGTTTTTTACCTATAAAATCAGCTGCTCCTGCTTTTAAGAGCAAGGCTTT<text:line-break/>TACATTAGGAAATTGACGAGATGGCGAATCAAGAAGTACTGAACTATCATCCTTAACATTTAAAACTATC<text:line-break/>TTTAAGTCGTTGTCATTTTCATATTGATTTAAAAACTTTCTTAGATTTTCAACCTCTGGATCATAAGCAT<text:line-break/>TATCCCAATCTTCATCAGAACTTGTAGCGAGAAGCATTTTACCTAGTTGCTCTCTTAATTTTTTTTGACT<text:line-break/>ATTAGTTAATAAACATCCTATAATGTTGTCATTATCGATTGCAACTTGCAGTGGAGTTTTTCCATCGTTA<text:line-break/>TTTTTTATGCTTAAATCAGCTCCTTTGCTTATGAGCAAATCCATAGTTTTTCTGCTTTGATCACTACACT<text:line-break/>TAGCAGCATAATAGTGTAAAGGTGTGTTACCTTTTTCATCTTGTGTATTTGGATCAGCTTTTGCATCTAA<text:line-break/>GAGATACCCAAGATCTTCATATCCACTAGAATAAATAGCAGTATCATGCAAAAGTGTTTTACCTTTATTA<text:line-break/>TCCTGCATATTTAGATCAGCACCAGCTTTGAGAAGAGAAGGAATAATTTCGTCGTATTCGAGAAACACGT<text:line-break/>TCAATATTGTTGTTCCTAGATGCCCTCTTTTTAAATTAAGAACGTACTTCAGGTCTTTATTTTTCTCGTT<text:line-break/>ACTTTCTAAAAACTGCTTAAGATTTGAAAATGAGTCATAATTTCCCATATTAAAATCTTTTATAATACTA<text:line-break/>TTGAGTAATTTTTGATTTAACTTTTTTTGACTCTCTTCCAGTCCTAAGTTAGGTGCATGAATAAGCCACT<text:line-break/>CATCTATTAAATCCTCTAAGTATTTTTTATCATCTATCAAACTTCTATCAGCCGAAAATAAATCTCGCTT<text:line-break/>AATGAATTCATAATAACTATCTACTGGTAATCCAGTTGCTTCTGTTTTTGGGCTACCTATTTCTGAAAAC<text:line-break/>TCTTGTCCAGCACTTAGGTCACACTTCAGTTTTTGCTCATCAGTGTGTTTGCTTTGTTCACTGATAGGTT<text:line-break/>CTGCAATATATTTTACTGACCCTGTATCCATATTACCTCCTAGCTCTAGATATAGAATATATTATATAGA<text:line-break/>ATGTGTAGTATGTGTCAAGTTAATTTCAACATAATCTTTTTACTACTCATATTTTTGTTAAGTTTTTATG<text:line-break/>GTGAGTACTGCTAGGTTAAAAGTTGTTTATTACTGGAAGTTTTAGCCAATTTTACTATAGATCAACAAAA<text:line-break/>TTGAGAACACCAGCTATATTTAATATATAGGAATATGATGCTTTAAAGGAGTACAAAAACTGCTGAAGCT<text:line-break/>TATACAGTAACCTGCGGAGCCACTTCAGCAGAATAAACAAACATATGCTAGTATTAGTAGAGAATTATTT<text:line-break/>ATAAGTCAACTAACTTTTTAAAAAAATATTTTAGTGAAGATACCATGCTAGCTAGTGTTATAAGGAATTG<text:line-break/>AATTATTGACTCTTCCTAAGATTGCAAAAAAGGTCGTATATTTGTGAGAACAAGCCGCGT<text:soft-page-break/>AAAAATAAGG<text:line-break/>TTATAAAAATAGAAGATTTAAATTATTTCAATAAGCTTAGGCAAAAAAGTTCGTATGTAGATATGGATGA<text:line-break/>AATGGGCTAATATAGCTAGTTTTAGCGTATAGTTAAATTGTTATATTAAAAAGTTCGTATGGTACATATG<text:line-break/>GTAGACCATCCCATCCCAAAGAAAAATGTTCTCACGGGTAGCGTTTTTTGTTGCTGGAAATGGTTGGATT<text:line-break/>ATTTAAGTTATTAGCAATATATAATACTAAATTAATAGTAATTCATTTGAGAACAAAAAGAAAAATTTAT<text:line-break/>GATAATTTTACATTTCAAATGGATATTGTTCTTTTTATAAAAAATATTCCTACACTATGTAAGGTCAAGT<text:line-break/>TCTAATCACATCAATTTTTCTTCCAAATTAAATCTTATCTTTTACAGTGGATCTTACGTTTAAATTATTT<text:line-break/>TATATCCAAAATTAAGGAAGTTATTCTAAACGGTACACAACTTCAGCATCTAAAGCTAGCTGATTTTAAG<text:line-break/>AAAATATCGCTCTCATGAATGTGCTTTACGGACAAAAGCTTTATTAATATCTTCTATATTATTGTTAATA<text:line-break/>AACAACCCCCCAAAAAAAATATGCAGAAATAAATTAAAAGACCCATTACAACCAACGCGTAAATATGGAG<text:line-break/>TAAAGAAATACTTCATTCACCTATTAACCTCTACCTACTGCCTCTACCATTGCTATGATCATAAACTCTA<text:line-break/>TTCACTCCATCAATTTCATCCAATACAGATTGCGGACCAAAATCAATTGATATCACTCTTTCTCCGCCTA<text:line-break/>ATTGCAATGCTCCCCCACCTCCACGCTGTGGATATTGGAGTTCTAAAAATTGTAATAGTAATGGATCAAT<text:line-break/>TTCATGTTGAATTCCTGGACGACCTTGAATCAATCTACCCCTAGGAGAAGATAGAGAATCATTTTGGAAT<text:line-break/>AATTGTGAAATATTTCTTCTCCGATTTCTAAAGTATTGTTCATTTCTTTGAGGTTGTCTAGTGTCATTTC<text:line-break/>CAATTCCTGCACTAAGAAGACCACGTATATAACCTATAATACCTTCACCTTTCTCTCCAAAGTTACTATT<text:line-break/>TCCCTGTAAAGCTTGATCAATAGCTTGGTTAATATCCCTAGCATTTTCGTATGCCCATATGCCACAATTA<text:line-break/>TGGCCATCTGTTTGCTGATGAACGGAAACATCATGGACATTATCATCGCTAATATCACATTCTCTTAAAG<text:line-break/>CTCCTCGAATATTATTGTCAATACGACTATCTGGACCAAGTGAATCAGCATAATACCCATAATAATTTCC<text:line-break/>ATTTTGGTGGACAATAACTAATGTAACCCAATGACGATTACCTACATTAATAATAGCAGTTAATCTATCT<text:line-break/>TTTTCACCCGAATCTACTTTTTGTTTAAAGTTATCTATGTTACTACTTAATAAGTCCCTACCTGTTGGAT<text:line-break/>CATTTTGATTTCCATCGACTCCTACTGAAGTTATTGCAAAATCATGACGATCATTAGTTGGATTAGATCA<text:line-break/>ATCATCATGGAAAGTATATTGTCGTGCAGCGAAAAACATGTCATGAGTTTGTAGCCAATAACGGAAATTT<text:line-break/>TGATTTTCTGTTGCAAAGTCTAGTGCAAGTAGATTATGCACATCTTCTATTTCACGAGCGTTGTTTCTAC<text:line-break/>GAAGGATAGTGTTTATTTGTTGTAATATTCCTTGTGCTGTAGAAGTACCACCTCCCCTTATTCTTGACCT<text:line-break/>TAATGTTTCTATTGCCTGTGCTCTAGTACCTTGCAAGTAACTAAATGGAACGTGCAGATTATCATCTATA<text:line-break/>TCAAGCAAAAAAATCGAGTTCTGTCCTGGTCTTTTTTCCATGTAAAAGCGCCTGAAATT<text:soft-page-break/>TTCACGAGTTT<text:line-break/>GATCTGACAATAGATTTTCTGGTGGATTTTCATCAATAACACTTTCAGGTCCCACTAATACTTCTGGTCT<text:line-break/>TGAGTCATGACCACGACGATCAAGTCTATGTACATACACTGCTTGTTGTGGAAGAGATATAAAGTCTTCT<text:line-break/>GCTCTCTGTGCACCTCTATTAAATACAGCATAAGACAAAACCACCTCATTTCCAGAAGTAATAGGCAAAT<text:line-break/>ATCCCCTTTGTTTGCTCATCAATTCTGTTATTTTGTACCTTGCCTCGTCTTGCTCCTGTTCTACTTCTTC<text:line-break/>TGCATTATCAGCAAATCCTAATACATATCCAATTGGGTGAGTATCTGCTGTAGGTTGTCTTAATAATAGA<text:line-break/>AGACCTAGTCTCTGTTCTGTAACTCTTGTAAGTATTACCCTTTCTCCTTCTTCTTCCTGCCACCTTTTTA<text:line-break/>AACTATATGTTTGACCAACTTTATACATAGCAAGCACTTTATAAGGATTATCACTAGCATAAAATGTACC<text:line-break/>ATGTAGTATAGAGCGAAACTTATCTTTGCTATTTACATCTATTATCATATTGCCATGCGTATCTTCTGGC<text:line-break/>ATTAATACTGCAGAAATGTTTCTAAATAATTCTTGATGCTGAAATCTATCTTGCCAGCCATCATTCATAA<text:line-break/>CTTGATTTAAAGCATTATGCACATTTCCAGCATTAGGCACTTGCACAAGATTACCACCAAGAAAATTATT<text:line-break/>TGCATTATTATTTTGGTAATTGTGATATAAACCAAGGTTATCTGTATGAATATTAAGGCCAAGTTGATTA<text:line-break/>TTAAGTGTGCATGAAACTTCCCGTACATGAACATTATTTCCGTCAACATTAAGATCTTGTAAATTGATGG<text:line-break/>CTCCTTGTTGTACAGCGTTGTTATCTCTAATATGAAGTATAACTATATCAGAACCTTGAGTATGGAAGAC<text:line-break/>CATGGTTAAAGCATGATTCTCATCACCATATCTAAATATATACTTTCTTACACGTTGTTGAACTGCGTTT<text:line-break/>ACTAATCTGAACTCTTCTAAAATACTATTCCCAAAAGCAAAACCAGTTATGCAATCAAATATTCTGTTAT<text:line-break/>AATTCTCTGCATTTCTTGGTATTTCGTTAGGAAGATGTTGAAGCAAGAAATCTCTAATATTTTCTCTAAT<text:line-break/>TCCTTCATCCTCCAAACACTCAAATAATCTTTGTACCAAAGGAAATCTATTCTCTAAAAACTCTACTGTA<text:line-break/>TCAATACTAAAAGGATCTATATTCAGATTAAAATTTAATCCAATACAAACAGCATTTCTTGATTCAGTGT<text:line-break/>GAATAGATATAAATGAAGAAGCATGTAATCTTTTAGCATCAGCTCTAGCGCGGTTTAATGCAATATCAGA<text:line-break/>CGATGTCCTCCATCTAGTAACATTAATAACGATAGGAATGTTTTCTCTCTCTGCCTGATGACATATAAGA<text:line-break/>AAAGCAACATATGAATTTCCAGGAGACAAGTCAAGGTCAATATCTATTGTGTAGAGATGAATAAAATTTG<text:line-break/>CCAACAAACCTAAGAAAAATCCGTGACTCTCAAACTTTTGACTGCGATTTTGAATGTCATTTTGTAGGCT<text:line-break/>GCCTAGGTAACTACGATAGATTCGAGTTATGTATGGCAAAATTCCTTCATTTATTCCACGTTCTATATTT<text:line-break/>ATTCTTTGGTTACTTGCTAGCACTTCCATAAAACTGAAAATCCCTTGCTGACCCGGTGCAACTTGCACAA<text:line-break/>AATTGACCAAATGACCAAGCTGTACTCTCTGATCTTGATTGAGTCGTATACTTCCTATTTCCTTAACTGT<text:line-break/>CAACAAACTGCGTGGCGCAGGCGCATTAATCCCATTAAGCCTATTGCGTTCTATATGCC<text:soft-page-break/>TAAGAAGGCTA<text:line-break/>ATCTCAGACGCTGAATATTTAGCAAATCTATCTCTACCTTGAGAATCTTTTTCACGAATCACCTCGAATA<text:line-break/>CTGTTGCAATCGCCTCTCCCTGACTCTTGCCCTTTCCATGCATGCATACTTTGTATTGCTCAAAATTTAG<text:line-break/>GTCTTCTTCCCTTAAATTTGGATTTTGCCCTCTAATCTCTCGCACTAGAGCATTTCTTTCCCTTGTACTG<text:line-break/>AACCTTAACCCATCACTATTAAGACGATCAGAAATACTGTAGCATCTGACAACTTGCTGTCCGTCACGAT<text:line-break/>AAACAGCGACTTTTAGGTTCCCTGTATTTCTATTTCTACCACCTGTATCAATACCATGATTATCAAAACG<text:line-break/>AAAATACACTCTCTCATTTGCTTTTAAGATATTAGCATCATGAGCAGTAGCAAACATACTGAAAAAGAAT<text:line-break/>ACAGGAAGGAAACGTCCTGTACTTACATGATACAAGAAAAATGGACATTGATCTAAAAAGGATTCAAACT<text:line-break/>CTTGTCTAAAACCATCAAGATCTCCATCCACTAAACTTCTTATTAAAGACACAAAGCACCTCTCTATTTG<text:line-break/>CTAAGACCAGAAAAACCACTCACATTAATGAGTAGACTAGATTCTTCTTTTCTTATGAGAACCAGAAATA<text:line-break/>CCACTCACACTAGGAGCTTCAAACTCAGACTGTGGGCCATCACCAGAACCATCAAGTGGCAAAGATACCT<text:line-break/>TAGATTGAGACCGCAAATTATTCCAAGGACCATCACCTACAGAAGGTAAAGTTACTTTCTCTAACTGAAG<text:line-break/>AAATAACTCTTCTGCAAACTTGCCGTAATCTACACCTTTCCTCTTTCCTTCCCTACCACATATTCTAAGA<text:line-break/>TTTTCTATCATGACTTCTTTAAAAAGGTCAAACTTTTCAGGAAAGCAACCTTTGGCAAATGAAATCATAT<text:line-break/>CTAATATTTCTTCTTTCTCTATTTTCCTATCGGGCTTACAAACATCTTCTCGTTTCCAATTAATGATTAA<text:line-break/>TCCCCCAAGTACACTCTTTATAGGAACTGTATAATTAGAAGTATTAACAGAGGTCTCTCTGTATTCAGCA<text:line-break/>AAGCGTTCACATTTCCAAATCTCCATAATAAGGGATCTAGCTTGAACACTTAACTCAGGATTTTTCAACA<text:line-break/>TCACATTTGAAAGTGAATAAAGAAAAAGTTCATAGTCTTGCTGTGAGAATATCTTGTCCGAACAGTCTCC<text:line-break/>TCCTGCTGAAACGCCTTTATAACACCAGCACTGTACCAAATCATGAACCGTATCAAAAAAACATGACTCT<text:line-break/>ATTAATTCAGCAAGAAGGGAATATACTCCCTTATCTTTCTGCAATAATTTCTGTAAAAGAGTATCTTTAT<text:line-break/>CGCCTATATTCCTTACACAAAAATCTAAAATAGGAGCGTCTTTCTTAACAGATTGAGGACGAGAAAGAGC<text:line-break/>AACAATAGCTTCTGTAAGCTTCTTCTCCTTATCTTTTTCCTCTAACTGATTATAAAAATACTCTACCCCT<text:line-break/>TCGCTCCACTTAAGTTTTACAGCACTGTCAAAACCTTCTACTGCATCATACTTCTTTAATTCCCCAGATT<text:line-break/>CTCTATCGATCCAGAAATCAAACACAGGACCATTTCTCTTCATGGATGATAGCAGAATGTTTCTTACATA<text:line-break/>TTGATCACTGATCGGATTACCTTGACTATCTACCTCTTCTGAAGTAAATTGACCTCTAGAGAGTACAAAC<text:line-break/>TGTTTGTTGAAAAAATCACCTATCTTGCCCGTTATACAGTACCTAGATGCCATACCATACCTTGGTAGTG<text:line-break/>GGTTATCGATTTCTCCTATTTTCTCTTCAGTCAATTTCTGACCTAAAACAGTATTATTTAA<text:soft-page-break/>CCTTGTACC<text:line-break/>TAACCAACAACCTTCATCTCGAAAAACATTATATAAGAATTCCAGCTTATCATCCTTAAAAAGTTTGATA<text:line-break/>TACTCTATATAGGTCTCGACCCACCTTTTAATAGCTAACTTTCTTCCAGCCGCAATGTCACGATCTGTAT<text:line-break/>GTTTTATCACATCTTGTAGCTTTTTAAGCACTTCAGCCTGACGTTTTGTTTCTATTGGCATTTAAACCTC<text:line-break/>CCTATATCATGAAAACAACGCTATGGTACTAAATTTGTAACTAAGTTACAACACCTAATTACTCCAGAAA<text:line-break/>GACCTATTTGATACCCAAACGTTCTGGTCAGGCCTAGAGAAATCTGTCTGGAATTATTGAGTATTTTCTA<text:line-break/>GAAATCTTAATTTGACAGCTAACACCAGGTTTTCTGGAGACTATAGGTGATGCACTTTTTCTATTTATAT<text:line-break/>TCCCAAGAATAAGGTCAGTAGATATGTTGTTTTCCAGAAGAATATTAGTAAGATTAATTGGAGAAGTGCT<text:line-break/>TATGACTTTAACTAAGTGTGTTTTAACTTCGCCCTTAAGTTCTGTTCAGCAGTATCTGTTAGTGTTAGGT<text:line-break/>AAGGTTATGGTTGTAAATACAAAATCCGATCAGCAGAGGGCTGAAGATGATCTATATACTGTTTTGAGAT<text:line-break/>TCAAAGAAAAAGGAGATTTTGAAAGACGGATAAGAGAACTGCTTGTTAACGATTATAAGAAACTTAAAAA<text:line-break/>ACCACTGAGCAAACTCCTTGGTAAGTTAGAAAGTAAAATAAGGACTGATAAAGAGAATAACCAAGCAGCC<text:line-break/>AGAAACGTTTATGATCAAATCAAAAAATCTAAAACTAATGAAGATAAATTAAGTAATTTATTGAACTTTA<text:line-break/>AAAAACAGCTAAAAGCTTTCCTAAAAAATCAAGATGATTGTAGTATTGTGTTAAATGCGATTGACTCTGC<text:line-break/>AAGTGTTATCCCTGTTATTGAAGTTAATGGTGTGCATCCAAAAGATAGTGAGATCAAAAAGTTAAAAAAA<text:line-break/>GCTCAACCTCTCACCTCTAACAGACAAGACTTTGAAGAAGCTCTAGGATACATAGAATCACAAGAAAAAG<text:line-break/>TTATGGGAATTACATTAGAGGAAATTATGGAATACAAGCAACACTCTGTTAAGATTTTTCTACTGAACCG<text:line-break/>TGTTCATTCATGCAAAAATGGGCATTCTCAATTGCATCCTGATGTAAAAGAAGCTATAGCAATATTATCA<text:line-break/>AATGATAAGCTGAGAGCTTTCTACGATGAAGAAGTAAAGAAGAAGACGCTACAACCAATATTGTCCTACA<text:line-break/>AAGAATGTGAACAATTATATGATAAAATTAACTATGAAAAAAATGAATCTCGTATTATAATCGAAAGAGA<text:line-break/>AGAACTTGGAGAGAATGTTAGGAGGGTAATGGGAGTGAAGCGCTTTACGAATGAAAGCAGTAGAGAAGAT<text:line-break/>CAGAAAAATGGTACTAGTCCAACAGGAACTTCTACAAATTATAGACAAGAGCAAGTTGCCTCTAGTGGTG<text:line-break/>ATAGAACACTTTATAATAGTGATATACCTTCACTAGGTAGATCGATTAAGAGCAGCCGAAGTGCACTGTT<text:line-break/>TATGCCATTTGGAGCTTCTGTTGATACGAGTACCCCGATTAAACCTGCC</text:p>
      <text:p text:style-name="P11"/>
      <text:p text:style-name="P11">&gt; NW_025319040.1 <text:span text:style-name="T16">brut</text:span></text:p>
      <text:p text:style-name="P11">MFATAHDANILKANERVYFRFDNHGIDTGGRNRNTGNLKVAVYRDGQQVV</text:p>
      <text:p text:style-name="P11">RCYSISDRLNSDGLRFSTRERNALVREIRGQNPNLREEDLNFEQYKVCMH</text:p>
      <text:p text:style-name="P11">GKGKSQGEAIATVFEVIREKDSQGRDRFAKYSASEISLLRHIERNRLNGI</text:p>
      <text:p text:style-name="P11">NAPAPRSLLTVKEIGSIRLNQDQRVQLGHLVNFVQVAPGQQGIFSFMEVL</text:p>
      <text:p text:style-name="P11"><text:soft-page-break/>ASNQRINIERGINEGILPYITRIYRSYLGSLQNDIQNRSQKFESHGFFLG</text:p>
      <text:p text:style-name="P11">LLANFIHLYTIDIDLDLSPGNSYVAFLICHQAERENIPIVINVTRWRTSS</text:p>
      <text:p text:style-name="P11">DIALNRARADAKRLHASSFISIHTESRNAVCIGLNFNLNIDPFSIDTVEF</text:p>
      <text:p text:style-name="P11">LENRFPLVQRLFECLEDEGIRENIRDFLLQHLPNEIPRNAENYNRIFDCI</text:p>
      <text:p text:style-name="P11">TGFAFGNSILEEFRLVNAVQQRVRKYIFRYGDENHALTMVFHTQGSDIVI</text:p>
      <text:p text:style-name="P11">LHIRDNNAVQQGAINLQDLNVDGNNVHVREVSCTLNNQLGLNIHTDNLGL</text:p>
      <text:p text:style-name="P11">YHNYQNNNANNFLGGNLVQVPNAGNVHNALNQVMNDGWQDRFQHQELFRN</text:p>
      <text:p text:style-name="P11">ISAVLMPEDTHGNMIIDVNSKDKFRSILHGTFYASDNPYKVLAMYKVGQT</text:p>
      <text:p text:style-name="P11">YSLKRWQEEEGERVILTRVTEQRLGLLLLRQPTADTHPIGYVLGFADNAE</text:p>
      <text:p text:style-name="P11">EVEQEQDEARYKITELMSKQRGYLPITSGNEVVLSYAVFNRGAQRAEDFI</text:p>
      <text:p text:style-name="P11">SLPQQAVYVHRLDRRGHDSRPEVLVGPESVIDENPPENLLSDQTRENFRR</text:p>
      <text:p text:style-name="P11">FYMEKRPGQNSIFLLDIDDNLHVPFSYLQGTRAQAIETLRSRIRGGGTST</text:p>
      <text:p text:style-name="P11">AQGILQQINTILRRNNAREIEDVHNLLALDFATENQNFRYWLQTHDMFFA</text:p>
      <text:p text:style-name="P11">ARQYTFHDD</text:p>
      <text:p text:style-name="P11"/>
      <text:p text:style-name="P15">&gt; <text:span text:style-name="T17">NW_025319040.1 extended</text:span></text:p>
      <text:p text:style-name="P15">LIRSLVDGDLDGFRQEFESFLDQCPFFLYHVSTGRFLPVFFFSMFATAHDANILKANERVYFRFDNHGIDTGGRNRNTGNLKVAVYRDGQQVVRCYSISDRLNSDGLRFSTRERNALVREIRGQNPNLREEDLNFEQYKVCMHGKGKSQGEAIATVFEVIREKDSQGRDRFAKYSASEISLLRHIERNRLNGINAPAPRSLLTVKEIGSIRLNQDQRVQLGHLVNFVQVAPGQQGIFSFMEVLASNQRINIERGINEGILPYITRIYRSYLGSLQNDIQNRSQKFESHGFFLGLLANFIHLYTIDIDLDLSPGNSYVAFLICHQAERENIPIVINVTRWRTSSDIALNRARADAKRLHASSFISIHTESRNAVCIGLNFNLNIDPFSIDTVEFLENRFPLVQRLFECLEDEGIRENIRDFLLQHLPNEIPRNAENYNRIFDCITGFAFGNSILEEFRLVNAVQQRVRKYIFRYGDENHALTMVFHTQGSDIVILHIRDNNAVQQGAINLQDLNVDGNNVHVREVSCTLNNQLGLNIHTDNLGLYHNYQNNNANNFLGGNLVQVPNAGNVHNALNQVMNDGWQDRFQHQELFRNISAVLMPEDTHGNMIIDVNSKDKFRSILHGTFYASDNPYKVLAMYKVGQTYSLKRWQEEEGERVILTRVTEQRLGLLLLRQPTADTHPIGYVLGFADNAEEVEQEQDEARYKITELMSKQRGYLPITSGNEVVLSYAVFNRGAQRAEDFISLPQQAVYVHRLDRRGHDSRPEVLVGPESVIDENPPENLLSDQTRENFRRFYMEKRPGQNSIFLLDIDDNLHVPFSYLQGTRAQAIETLRSRIRGGGTSTAQGILQQINTILRRNNAREIEDVHNLLALDFATENQNFRYWLQTHDMFFAARQYTFHDD</text:p>
      <text:p text:style-name="P15"/>
      <text:p text:style-name="P15">&gt;ref|NW_025319042.1|:1062931-1070841 Drosophila ananassae strain 14024-0371.13 chromosome 4 unlocalized genomic scaffold, ASM1763931v2 tig00000073, whole genome shotgun sequence<text:line-break/>TTTTCTGAGGTGCTACTCTTAACAATTTTTATCAACTCCTCATTAAGATTGGCTTGACTCATAATATCAT<text:line-break/>TATAGTCAGAAGAATGAGAGCTCCTATGTTTAAAAATATAGCTTACCTCTTGATTTTTAGCTAATTCATA<text:line-break/>TGGCTCTTTACCCTCATTATTTTTGATATCACTTCTTGCTTGTTTATCTAGAAGTAGCGATACAAGTTTT<text:line-break/>TTGTTATTTCTGGAAACAGCAATATGCAAAGGTGTATCACCTTTATTGTTTTTAGCGTTAACATCTGCCT<text:line-break/>TCCATTCTTGCAGTAATTTTCTAACTATTTCTTTTTTATCCCTTTCAACAGCATAGTGTAAAGGTGTATT<text:line-break/>ATCTTTATTATTTTTATCAATGATGTTAAGCTTTACTCCTGCTTTTAAAAGATCTTGTACTTTCTGCAGG<text:line-break/>TTGCCATTTCTTATAGCAGAAAATAGCTCTGTATTTTTCTCTCTTTCACCATCACTATCAAACCTACGAT<text:line-break/>AACGTTTAAGTTCAGAAGATTTATAAGCTTGTCCTATACGTTGTACTTTCTCTAATATTTTGGAAGCTTC<text:line-break/>TGAATTATTTTTTTCTTTTTCTAAGTAATCTATTGAACGCTCCACTTTGAGCATAAATTCC<text:soft-page-break/>ACTGCCTAT<text:line-break/>TTTATATAGAAACCTATATTAGATTTGATTATATGCTAATGAATAACATTAGCAATGCAAGTAGTTTTTA<text:line-break/>TGCATACCTCTTTAGGTTTTACAGAATAGGCAGTTAGAGTAGAAAAACAAGTTTCAAAATAATATAAGAC<text:line-break/>CTGCTGTAAAGTAAATCAGATTTTTTTTGAAAATAACTACCGTAAAAAACAGCAGCTTTCCTTTTGCAAC<text:line-break/>AGGTCTATAGAAGTTGTAATTATAACAAGTAACAAATTTAACTCTATTTTTAGAGAATCTATTTGGATTC<text:line-break/>ACTCTATTTCTAGGTGTCTTTCAAACTGTGTAACTAACTGCTTTACGTTTACATGTGTAATTAAGAGAGC<text:line-break/>TTTCACAAGGCTCATGATCAAACTGCTACTTTGCAGGATTTTCTAGAGATCTTTTATTTCTCATAAAGGA<text:line-break/>TGACTGAGCTTGGGAAGCAACTTTTAATGGATTTTTCTTTATACCAACATCTGATTGTGCTGCTATAATG<text:line-break/>GCACTACTTTTAGCGGGTTGCATACCTACACATTCTCTTGCTTGGTTTTGCTCAAAATTTTCCACTGTTG<text:line-break/>CTTTTACTTTACTTTTCATCTTGCGATTAACCACTATAACAGGCACCTCCACTTTTGGCACTACTTGTCT<text:line-break/>ATAATCTTGATTCTCAGCTCTTAATGGTACTATCGATTTACTTTTAACTGATTTTTTAAGAACCGCTCCC<text:line-break/>ACTATTTTTGGTTTTGCGCTTATTTTTTGATTGTTATAGCCTAGATTTTTAGACTGTGATGATAACGTAA<text:line-break/>GTATATCTTTTATCGCTTGTGATTCTTGTTTAACTTCTTGAACGGTAAAGGATGTTTTCTTTTGTATTTC<text:line-break/>TTATAATTCCAATAGAATTTTTGTATTTGTTCGAACATAGAAAATATTTTGCATGGAGTTTTTTCTATCT<text:line-break/>TTGGTGATTTTAGTGTTGCTATTTAATTCTAACTTTTGCATAGTACTCTCAATATTTTTATATAGGAGGT<text:line-break/>ACAATGCCAAAAAAGATGGAGCGTCATGCTGCAGTGCTTAGTAAGTTAAAGAGTGTTATTCAACATACAG<text:line-break/>ATTCCAAGGTCATGGCTGAAAGGCGTTCAGCTATTGAAAGATGGGTAAAAACTTACATTAGGCAGGTAGA<text:line-break/>ATATCTTAAAGATGATAAGCTACAATTCTTATACAACATATTTCGCGATGAAAGTTGTTGGTCAGGTACG<text:line-break/>AGATTGAACAATACAATCTTAGGACAGAGGTTTACTGAAGAAAAAATAGGCGAAATAAAGAACCCTCTTC<text:line-break/>CTATATATGATATGGCATGTCGATACTGCGTGATAGATAAAATTCCTTTGCTCTTTCAGAAGCAGTTTGA<text:line-break/>ATCTTACAAAAGTAGCTTCTCTTCTGAAGAGATAGATGATGATGGTAAGCCTGCAACTAGCAATAACAAA<text:line-break/>TATGTAAAGAGTGAGTTGTTGGGTTATATGAAGAGTCAAGACCCTGTATTTAGCTTTTGGGTTGATAAAA<text:line-break/>AATCTGGAGAATTTAAGAAGCATGTCAGCGCAACAGAAGGATTTAAGAAAGCTATAGAACTTAAGTGGAG<text:line-break/>CGAAGGAGTAGAATATTTTTATAGCCTTCTAAATGAAAAAGAAAGAGAAAGGAAAATTACTGATGCAGTT<text:line-break/>ACTATATTATCCTCTGTTCAATGTGACCATAATGGTGCTGTTACTTTAGACTTTTGTCTTAGTAAAATGA<text:line-break/>GCGATCAAGCAAAAAACAAGCTGTTTAAAGATTCTGAGCTATCAAAAATAGATAAAGGAGTGTACTCTCT<text:line-break/>CTTTAGCGCGTTGATACATCAAGGTTTTTTTGATACGATGCAAGCTATACTTCCGATGTT<text:soft-page-break/>TAAAGATAAA<text:line-break/>ATACTGGAGGATAAGATACTTTCACCTAGGAGTTATACTCTTCTTCTCTCCTCACTTTCGGACATGATGC<text:line-break/>TCGAAAATTCTGAGTCAACTATTCAAGCTAGGGAAGCTATAATGAACCTTATAAAGTGTGGTAATTTCAA<text:line-break/>TAATCATGAGGGGCGTGAGGAAAAAGCTGCGGTATTTTTTTCTAATGGAAGGGTTCCGATTAAGCGTGCG<text:line-break/>CTTGCAGGATTGATTGTCGATTGGCAACTTGGTTGTACAAAAAAGGAAGAGGTGTTAAAGGTACTACAGT<text:line-break/>TTGCCAAAGAGTTTTGTGCAGTTGAAAGTTTTATGTATTTTAAAAAATCTGTTGTTGATAACCTAAAAAT<text:line-break/>GGTTGGTAGGGATGGTATGAGAAAAAATATAGACTATGGTAAATTAGCAGAAAAGTTGTTTGCTGAATTA<text:line-break/>GATACGGTATCCGTGCCTAACGGAAGAGGTGATTTTGGTGGAGCTGGTGACCCACAGTCTACACTAGGAA<text:line-break/>GCACTGAAGTTAGTAGTTTTTCTGGTCGCAATAAGTAGGAGTATTTTATGCATGGGTTAGTTAGAAGTTT<text:line-break/>AATAAATGGAAATTGTGGAGAATTCACGGAAAAGTTTGAATATTTCTTGGATTCATGTCCATCTTTTCTG<text:line-break/>CATTCAGTTGGCAAAGATCACTTTTTTCCTGCGTTCTTTTTTGGCATGTTTGCTACTGCACATGATTCTG<text:line-break/>GTGTTGCAAACAATGATGAAAGAATCTTCTTTCGTTTTGATAATGATCCAGGTAGTCCTGGAAGGGGAAA<text:line-break/>TCTAAAGGTTGCAATTCTAACAACTGATGGAAATAACAGAAGAGTTGTAAGGTGCTATACTATTGCTGAC<text:line-break/>AGAGAGAATAGCTACGGTTCTAGGTTTAGCCAGCAGGAAAGGGAGCAGCTGGAAGGTATCCTGCGAGATG<text:line-break/>AAGAGCTTGAATGGCAAGAGTATAAAACATTTATATGGGCGGATAATCAAGGTGAAGATGAAGAAGAGGA<text:line-break/>AGCAGTAAGATGTAGGATATTTCAGGCAGGACAAGGGCCGTTTACTGGAAATCATGCATCTTATTTAACT<text:line-break/>CGTAGACATAGTTTTCAAGAGATTACCAGAACACCTGGGCTGCAAAATAATTATTTACCGGATTTGATGA<text:line-break/>ATCAGCTAGAAAGTGATGATGCAGATGATGTACACGACACTACTGAGGAAGTGTTTCAGCATATTATTGG<text:line-break/>TGTCTACGATAGATATAGTCAGGCATTGGACTTCTATGGTAGAGAGTCTGACTATCATGGTTTTGTTTCC<text:line-break/>GGTGTTTTGATGCATTTTAGATATCGCAATGTAGCCAATATTTACCTTGAGCTGTTTGTAGGTGGTGGAT<text:line-break/>ATGCAGATATTACTTCTATTGTACGTGGTACACAGAGGTTAATTAATTCTGTTCCCTGTGTAACTGAACT<text:line-break/>TAAGGCAGGCAGAAGAGCAGATAGGAATGCTGGCCGTGCATTAGAGCAGGCTGGAAATTATGTTAATGGA<text:line-break/>TGTCCCGTTTCATCCATATCTATTCCAACATTATCACCAAGAGCTGTCTCCGCTGGAGTGAATTTCGATT<text:line-break/>TTGGTAACCCAGGACGTTTACAGCTTGGTGTGAGGGCTTTTTTAGCAAAAGGTTCTTCTTTAATGGAAAG<text:line-break/>ATTATTTGAACCTGTAGAGGATGAGGAGATTGGAGAAAATGTTAGGGATTATCTACTCCATCCAGCCTTT<text:line-break/>GGTGTACCTGCTGTACCAGGTATTAGGAATAGGGGTGGTGTTAACGCTAGAGATAGAAGAATATTTCTCT<text:line-break/>ATACAAGTGGATTTGCTTTCGCAAGTATTGCATTTGCAAAAGGAACTGTGCCAATAGAA<text:soft-page-break/>GGAAATCGTGC<text:line-break/>AATAGTAGATAAGCACTTGTTTCACTATGACGGTAATGCAAAAATGTTAGATGAGCAAAGATACAATACA<text:line-break/>CAAGTAAATATTGGAGATCGTGCTTTGACTATGGTTTTGCATGTATCACGAGGTAGAGACCAGAAGGAGG<text:line-break/>AGGTGATCGTATTTCATGTTCGCCACGTATTGGCTAATCAACTTTTTCCGGACAATGGATTGGATCTATC<text:line-break/>GCGTTGGCCGAATGCTATGGTACATGAAGTGGTGTGTAATTTGACCATAAATAGAAGGACAAGAGGAGTA<text:line-break/>AATGATAATCTTGGTTTAACTGTTAATGTAGAAACATTTGACTCGCCTGCTGACTACCTGCTTGATAGAG<text:line-break/>GTAATCAGCCTTTTCAAGGTGAGCTTTTACGAATAGGTGGCGTTAGTAATGTGCATCGCGCTGCAAATGT<text:line-break/>AATGATGAATACTGGCTGGGAAAATGAAGATCCAGACAGTCATGAACGGTTTTACCAAGCAATTTCCAAC<text:line-break/>GTGCTAAATCCACCCCAGCCAAATAATGCAGGACTCCAATCATTAGCATGGGTAGTGAACAGAGATAATG<text:line-break/>CTAGAGAAGCTGGGTTTCATGCTGCATTGCATGGATTATTTTACACTTGCGATAATCCTGCTAGGGTAGT<text:line-break/>TAGTGAATTTCAGGTTGGAGGAGGAGGAAAGTTAGACTTAGTATTGTCACGAGCTATAGGAAGGATGGGA<text:line-break/>GGTACTTATCCGATTGGAACAGAGCTAAAGTTTGCTGCCACTGAAGCAGACGTACAAAATAGAGAAGAAG<text:line-break/>AAGCAGATGAACAGGTGGAGGGTTATCTGCAGAGTAGAGGGTTTGATCGCATTACTGATGGAGATAAAAT<text:line-break/>GGTTTTCTCGTATGCCGTATTTAATGATCAAGCGCCAGCACCAGCACAAAATGTCCCAAATACCCTTATA<text:line-break/>GCAGTTAGTAATGTTCTACGCATAAAAGATAACTTAGGAATTGACACTGTGGACGACTTTCCTTATAGAT<text:line-break/>AAAAGGGATTATTGAGAGTTTAATTGTCTGTCATAAATAGCAGACGCCGTCTTGTCAGTCAACAAAAAAT<text:line-break/>TTATAAAAATTGTCTCATTGCCTAGGCTGTATTGTAAAACTAAAAAATACTTCCAACTCACATCCTGTAT<text:line-break/>AGCGGATACAGATTATAGTTATGTTGATAAGTAAATTTCTGCTGTCTTGTATATATAAAACTAATTTACT<text:line-break/>TATCAACATACCAATTACATTCAATGAATTTGTGTAAGATGCCATTTTACATAAGATAGAATGGAAGCAT<text:line-break/>TTTTTGATTTTAAAGTACTAAACCTTCAGTTAACCTCCTGGCCCTGTAGTTTTTGATATGGTCAGGATCA<text:line-break/>AAAGCCTTTTTTGATCTTAAAATACCAAAACAATATGAAGTAACTTACGCATTGCAGACCCAACTATGGC<text:line-break/>CATATTATGCTTACCCTTTTCCTTTAATCTCTGGCAAAAGCTCATAATAATAGGATTGTGATTCTTAGCT<text:line-break/>ACTATGGCAGGAAAGAAAAGTGCCTTACGTAATGGTTGTGAACCGGATTTACTTAATCTGGGTTTGGCAT<text:line-break/>ATACAGATGAACCTGATGTTATATTTCTCGGTATAACTCCTGCATATGCTGCCAATTGTCTGGCATTTCT<text:line-break/>AAAAACTTCTATGTCAGGAACCTCAGCTAAAATAGCTACTGCTGATTCCTCTCCTATTCCTGGAATAGTC<text:line-break/>AGTAGAAGTTGAAAATTTTCCAACAACTCTTTGTGTTGCTTTAATAGTTCACGTACGGAGTTTTTTATTG<text:line-break/>TTTCTATTTTTTGAGCTATATTCATTGCAAGGTCTTCCCAAGCATTTGCAACTTCTTTGG<text:soft-page-break/>GCAGTCTCTC<text:line-break/>TTTTTTTTCTAAGTGGTTATTTACTAATATCAATTCATCTTTTAACGCAACCGAGCAACGATAAAGATGT<text:line-break/>TTTAATTTTTTCAGTTCAGGAGAAGGTGGTGTCCAACGAGTAGGTTCCTGTCTTTGGCAACAATCAGCAA<text:line-break/>TAATTTCTGCATCAGTCTGATCATTTTTTTGCCGTGTAAGCTTACTTCTTGCGTAGGATTTTATGCAATA<text:line-break/>AGGATTTACAACACTAACAAAATGTCCAGTATTGTGTAGAAATTCAGCCAAAGCTTCACTATAACAACCG<text:line-break/>GTAGCTTCCATGCAGGCTTTTACTTGTTCTACATTATGTTTTTGTAGAAAGCTCAGTAAACCTTGAAACC<text:line-break/>CATGATCATCGTTCTTAAAGCTCCTTTTCCTAGTTTCACGTTTTCCTTTTTTACTTATAAATGAGAGAAA<text:line-break/>AACATCAAAGCGATCTTTTGATACATCTATGCCAAGAAAGTTGTTGATCATATATAACCCCATACGTTAC<text:line-break/>CATTAAAAATGAAAAGTAAGGCTAACCTTGTTAATACAGAATTAGAACCATTTAGGTCTTTCTAAGACGC<text:line-break/>CGTCCAGCCTATACTTTTGAGAGGGAGCTCTTATCTGCAAAACAGATTTTATATCTAAGGTTTATATCAG<text:line-break/>AGTTCCTCCCTTCTCCAACTAATGCTTAAGCTTAAAACATTAGATGCTTTTTTCAAGATACAAGGTTTAT<text:line-break/>AGTTAGAATTGGTTGATAGTGTTATATTGACTACTTCATTTTGTAACCAGATCGGCTTTATTGAGTAGTG<text:line-break/>GATTACAGATGGGCAGGCAAAAAAATCCGTGTAGTAAGTTCAAAATCAATGTCGGAGAATTTTATAGAAG<text:line-break/>TGTCAAGTTGAAGTTGATGTGGAAGGAAAGAGACTATAAATTCTGCTATGTTGATTGCTTAACACTCTGA<text:line-break/>ATCAAGGTTGCAAGTTTACTATCCTATCAGGCATCTTTATTAGGTTAAAAGAAAGTTTATGTAAACACCT<text:line-break/>GAACTTACTACAAAAACTCAAAAATTGCAAAATAATAAAAATATTATATTAAAATCAGCTTGACTCATAT<text:line-break/>TATATATTGTACATAATATATCAAGCTAGGAGGAAAATATGGTTATTGCTGAAGCTATCAACGGGCAAAG<text:line-break/>TAAACAAGCGAGCAAAAAGCTAGAAGAGAAATTAAGTCCTGGACAAGAGTGGTCAGAAACAGACAAACTA<text:line-break/>TTGGATGAAGAGTACGAGTTAATTAAAAAATATTTATGGGTTCCATCTGAATTAAATGGAGGTAGATCTC<text:line-break/>TAGTTGATGGTCAATGTTCATTTGAGGAGCTGGTGTGTATATGGCTTGCTCATACAACAAATTTGAACGA<text:line-break/>GAATCAAAAAAAGTTAAATAAAGAATTACTAAAAACTCTTAAGGGTATAGGTTCTTATCTTCATGAGTAC<text:line-break/>GATACTAAAAAACTTGAAAATTTTTTAAAAAATAACAAGGACGATCAAGATTTAAAAGTTGTTCTTAACC<text:line-break/>TTAAAAGGGGAGAGTCAGGATTAACGTTATTGCATGCTGCTTCAAGACTCAATGATGATCAGAGCGGTCC<text:line-break/>TACTTTAGTCAATTTACTTCTACAAGCAGGGGCTGATCCTAATATAGAAAGCAATGAAGGGAAAACACCT<text:line-break/>TTACATTATGCTGCTGATAGTAACTATAGGTATCTCACTATAAATCTACTCTTGGAGGGAAAAGCTGATC<text:line-break/>CTAACATACGGGACAATAAACGAAAAACCCCATTACAAACTGCTATTGATAATAATAACTGCCACATTTT<text:line-break/>AGAATGCTTCTTAACTGACAATCAGAAAAAGTTGAGTAAAGAGCTGTATGATATACTTTT<text:soft-page-break/>AGGTATACTC<text:line-break/>T</text:p>
      <text:p text:style-name="P15"/>
      <text:p text:style-name="P16">&gt; NW_025319042.1</text:p>
      <text:p text:style-name="P15">MHGLVRSLINGNCGEFTEKFEYFLDSCPSFLHSVGKDHFFPAFFFGMFAT</text:p>
      <text:p text:style-name="P15">AHDSGVANNDERIFFRFDNDPGSPGRGNLKVAILTTDGNNRRVVRCYTIA</text:p>
      <text:p text:style-name="P15">DRENSYGSRFSQQEREQLEGILRDEELEWQEYKTFIWADNQGEDEEEEAV</text:p>
      <text:p text:style-name="P15">RCRIFQAGQGPFTGNHASYLTRRHSFQEITRTPGLQNNYLPDLMNQLESD</text:p>
      <text:p text:style-name="P15">DADDVHDTTEEVFQHIIGVYDRYSQALDFYGRESDYHGFVSGVLMHFRYR</text:p>
      <text:p text:style-name="P15">NVANIYLELFVGGGYADITSIVRGTQRLINSVPCVTELKAGRRADRNAGR</text:p>
      <text:p text:style-name="P15">ALEQAGNYVNGCPVSSISIPTLSPRAVSAGVNFDFGNPGRLQLGVRAFLA</text:p>
      <text:p text:style-name="P15">KGSSLMERLFEPVEDEEIGENVRDYLLHPAFGVPAVPGIRNRGGVNARDR</text:p>
      <text:p text:style-name="P15">RIFLYTSGFAFASIAFAKGTVPIEGNRAIVDKHLFHYDGNAKMLDEQRYN</text:p>
      <text:p text:style-name="P15">TQVNIGDRALTMVLHVSRGRDQKEEVIVFHVRHVLANQLFPDNGLDLSRW</text:p>
      <text:p text:style-name="P15">PNAMVHEVVCNLTINRRTRGVNDNLGLTVNVETFDSPADYLLDRGNQPFQ</text:p>
      <text:p text:style-name="P15">GELLRIGGVSNVHRAANVMMNTGWENEDPDSHERFYQAISNVLNPPQPNN</text:p>
      <text:p text:style-name="P15">AGLQSLAWVVNRDNAREAGFHAALHGLFYTCDNPARVVSEFQVGGGGKLD</text:p>
      <text:p text:style-name="P15">LVLSRAIGRMGGTYPIGTELKFAATEADVQNREEEADEQVEGYLQSRGFD</text:p>
      <text:p text:style-name="P15">RITDGDKMVFSYAVFNDQAPAPAQNVPNTLIAVSNVLRIKDNLGIDTVDD</text:p>
      <text:p text:style-name="P15">FPYR</text:p>
      <text:p text:style-name="P15"/>
      <text:p text:style-name="P15">&gt;ref|NW_025319046.1|:511041-519455 Drosophila ananassae strain 14024-0371.13 chromosome 4 unlocalized genomic scaffold, ASM1763931v2 tig00000240, whole genome shotgun sequence<text:line-break/>TTTAGAAGAACCAATTTCTGGCTTGTTTTCTCCAGTATTTGCCCTTTTTAGAAGTGAAGCTCTGCCTAAT<text:line-break/>TCTTGAATAATACCTTCGTTATTAAGACTTTTAGCAATATCTAGTGGCATTTTACCTTTACTATTCTTGA<text:line-break/>TTTGTATTGCTCCATTTTTGACAAGCAGCTTAACTACTTTAGGTTCCTGTTTGCGAACAGCCGCATGTAA<text:line-break/>CGGTGTATTTAACTCATAATTAGCGTCCTGAAAATTAATGTTCGCTCCTTTCTTCAAAAGATCTTCAATG<text:line-break/>TCGTTTGATTTTTATTTTTCTGAGGTGCTACTCTTAACAATTTTTATCAACTCCTCATTAAGATTGGCTT<text:line-break/>GACTCATAATATCATTATAGTCAGAAGAATGAGAGCTCCTATGTTTAAAAATATAGCTTACCTCTTGATT<text:line-break/>TTTAGCTAATTCATATGGCTCTTTACCCTCATTATTTTTGATATCACTTCTTGCTTGTTTATCTAGAAGT<text:line-break/>AGCGATACAAGTTTTTTGTTATTTCTGGAAACAGCAATATGCAAAGGTGTATCACCTTTATTGTTTTTAG<text:line-break/>CGTTAACATCTGCCTTCCATTCTTGCAGTAATTTTCTAACTATTTCTTTTTTATCCCTTTCAACAGCATA<text:line-break/>GTGTAAAGGTGTATTATCTTTATTATTTTTATCAATGATGTTAAGCTTTACTCCTGCTTTTAAAAGATCT<text:line-break/>TGTACTTTCTGCAGGTTGCCATTTCTTATAGCAGAAAATAGCTCTGTATTTTTCTCTCTTTCACCATCAC<text:line-break/>TATCAAACCTACGATAACGTTTAAGTTCAGAAGATTTATAAGCTTGTCCTATACGTTGTACTTTCTCTAA<text:line-break/>TATTTTGGAAGCTTCTGAATTATTTTTTTCTTTTTCTAAGTAATCTATTGAACGCTCCACTTTGAGCATA<text:line-break/>AATTCCACTGCCTATTTTATATAGAAACCTATATTAGATTTGATTATATGCTAATGAATAACATTAGCAA<text:line-break/><text:soft-page-break/>TGCAAGTAGTTTTTATGCATACCTCTTTAGGTTTTACAGAATAGGCAGTTAGAGTAGAAAAACAAGTTTC<text:line-break/>AAAATAATATAAGACCTGCTGTAAAGTAAATCAGATTTTTTTTGAAAATAACTACCGTAAAAAACAGCAG<text:line-break/>CTTTCCTTTTGCAACAGGTCTATAGAAGTTGTAATTATAACAAGTAACAAATTTAACTCTATTTTTAGAG<text:line-break/>AATCTATTTGGATTCACTCTATTTCTAGGTGTCTTTCAAACTGTGTAACTAACTGCTTTACGTTTACATG<text:line-break/>TGTAATTAAGAGAGCTTTCACAAGGCTCATGATCAAACTGCTACTTTGCAGGATTTTCTAGAGATCTTTT<text:line-break/>ATTTCTCATAAAGGATGACTGAGCTTGGGAAGCAACTTTTAATGGATTTTTCTTTATACCAACATCTGAT<text:line-break/>TGTGCTGCTATAATGGCACTACTTTTAGCGGGTTGCATACCTACACATTCTCTTGCTTGGTTTTGCTCAA<text:line-break/>AATTTTCCACTGTTGCTTTTACTTTACTTTTCATCTTGCGATTAACCACTATAACAGGCACCTCCACTTT<text:line-break/>TGGCACTACTTGTCTATAATCTTGATTCTCAGCTCTTAATGGTACTATCGATTTACTTTTAACTGATTTT<text:line-break/>TTAAGAACCGCTCCCACTATTTTTGGTTTTGCGCTTATTTTTTGATTGTTATAGCCTAGATTTTTAGACT<text:line-break/>GTGATGATAACGTAAGTATATCTTTTATCGCTTGTGATTCTTGTTTAACTTCTTGAACGGTAAAGGATGT<text:line-break/>TTTCTTTTGTATTTCTTATAATTCCAATAGAATTTTTGTATTTGTTCGAACATAGAAAATATTTTGCATG<text:line-break/>GAGTTTTTTCTATCTTTGGTGATTTTAGTGTTGCTATTTAATTCTAACTTTTGCATAGTACTCTCAATAT<text:line-break/>TTTTATATAGGAGGTACAATGCCAAAAAAGATGGAGCGTCATGCTGCAGTGCTTAGTAAGTTAAAGAGTG<text:line-break/>TTATTCAACATACAGATTCCAAGGTCATGGCTGAAAGGCGTTCAGCTATTGAAAGATGGGTAAAAACTTA<text:line-break/>CATTAGGCAGGTAGAATATCTTAAAGATGATAAGCTACAATTCTTATACAACATATTTCGCGATGAAAGT<text:line-break/>TGTTGGTCAGGTACGAGATTGAACAATACAATCTTAGGACAGAGGTTTACTGAAGAAAAAATAGGCGAAA<text:line-break/>TAAAGAACCCTCTTCCTATATATGATATGGCATGTCGATACTGCGTGATAGATAAAATTCCTTTGCTCTT<text:line-break/>TCAGAAGCAGTTTGAATCTTACAAAAGTAGCTTCTCTTCTGAAGAGATAGATGATGATGGTAAGCCTGCA<text:line-break/>ACTAGCAATAACAAATATGTAAAGAGTGAGTTGTTGGGTTATATGAAGAGTCAAGACCCTGTATTTAGCT<text:line-break/>TTTGGGTTGATAAAAAATCTGGAGAATTTAAGAAGCATGTCAGCGCAACAGAAGGATTTAAGAAAGCTAT<text:line-break/>AGAACTTAAGTGGAGCGAAGGAGTAGAATATTTTTATAGCCTTCTAAATGAAAAAGAAAGAGAAAGGAAA<text:line-break/>ATTACTGATGCAGTTACTATATTATCCTCTGTTCAATGTGACCATAATGGTGCTGTTACTTTAGACTTTT<text:line-break/>GTCTTAGTAAAATGAGCGATCAAGCAAAAAACAAGCTGTTTAAAGATTCTGAGCTATCAAAAAAAGATAA<text:line-break/>AGGAGTGTACTCTCTCTTTAGCGCGTTGATACATCAAGGTTTTTTTGATACGATGCAAGCTATACTTCCG<text:line-break/>ATGTTTAAAGATAAAATACTGGAGGATAAGATACTTTCACCTAGGAGTTATACTCTTCTTCTCTCCTCAC<text:line-break/><text:soft-page-break/>TTTCGGACATGATGCTCGAAAATTCTGAGTCAACTATTCAAGCTAGGGAAGCTATAATGAACCTTATAAA<text:line-break/>GTGTGGTAATTTCAATAATCATGAGGGGCGTGAGGAAAAAGCTGCGGTATTTTTTTCTAATGGAAGGGTT<text:line-break/>CCGATTAAGCGTGCGCTTGCAGGATTGATTGTCGATTGGCAACTTGGTTGTACAAAAAAGGAAGAGGTGT<text:line-break/>TAAAGGTACTACAGTTTGCCAAAGAGTTTTGTGCAGTTGAAAGTTTTATGTATTTTAAAAAATCTGTTGT<text:line-break/>TGATAACCTAAAAATGGTTGGTAGGGATGGTATGAGAAAAAATATAGACTATGGTAAATTAGCAGAAAAG<text:line-break/>TTGTTTGCTGAATTAGATACGGTATCCGTGCCTAACGGAAGAGGTGATTTTGGTGGAGCTGGTGACCCAC<text:line-break/>AGTCTACACTAGGAAGCACTGAAGTTAGTAGTTTTTCTGGTCGCAATAAGTAGGAGTATTTTATGCATGG<text:line-break/>GTTAGTTAGAAGTTTAATAAATGGAAATTGTGGAGAATTCACGGAAAAGTTTGAATATTTCTTGGATTCA<text:line-break/>TGTCCATCTTTTCTGCATTCAGTTGGCAAAGATCACTTTTTTCCTGCGTTCTTTTTTGGCATGTTTGCTA<text:line-break/>CTGCACATGATTCTGGTGTTGCAAACAATGATGAAAGAATCTTCTTTCGTTTTGATAATGATCCAGGTAG<text:line-break/>TCCTGGAAGGGGAAATCTAAAGGTTGCAATTCTAACAACTGATGGAAATAACAGAAGAGTTGTAAGGTGC<text:line-break/>TATACTATTGCTGACAGAGAGAATAGCTACGGTTCTAGGTTTAGCCAGCAGGAAAGGGAGCAGCTGGAAG<text:line-break/>GTATCCTGCGAGATGAAGAGCTTGAATGGCAAGAGTATAAAACATTTATATGGGCGGATAATCAAGGTGA<text:line-break/>AGATGAAGAAGAGGAAGCAGTAAGATGTAGGATATTTCAGGCAGGACAAGGGCCGTTTACTGGAAATCAT<text:line-break/>GCATCTTATTTAACTCGTAGACATAGTTTTCAAGAGATTACCAGAACACCTGGGCTGCAAAATAATTATT<text:line-break/>TACCGGATTTGATGAATCAGCTAGAAAGTGATGATGCAGATGATGTACACGACACTACTGAGGAAGTGTT<text:line-break/>TCAGCATATTATTGGTGTCTACGATAGATATAGTCAGGCATTGGACTTCTATGGTAGAGAGTCTGACTAT<text:line-break/>CATGGTTTTGTTTCCGGTGTTTTGATGCATTTTAGATATCGCAATGTAGCCAATATTTACCTTGAGCTGT<text:line-break/>TTGTAGGTGGTGGATATGCAGATATTACTTCTATTGTACGTGGTACACAGAGGTTAATTAATTCTGTTCC<text:line-break/>CTGTGTAACTGAACTTAAGGCAGGCAGAAGAGCAGATAGGAATGCTGGCCGTGCATTAGAGCAGGCTGGA<text:line-break/>AATTATGTTAATGGATGTCCCGTTTCATCCATATCTATTCCAACATTATCACCAAGAGCTGTCTCCGCTG<text:line-break/>GAGTGAATTTCGATTTTGGTAACCCAGGACGTTTACAGCTTGGTGTGAGGGCTTTTTTAGCAAAAGGTTC<text:line-break/>TTCTTTAATGGAAAGATTATTTGAACCTGTAGAGGATGAGGAGATTGGAGAAAATGTTAGGGATTATCTA<text:line-break/>CTCCATCCAGCCTTTGGTGTACCTGCTGTACCAGGTATTAGGAATAGGGGTGGTGTTAACGCTAGAGATA<text:line-break/>GAAGAATATTTCTCTATACAAGTGGATTTGCTTTCGCAAGTATTGCATTTGCAAAAGGAACTGTGCCAAT<text:line-break/>AGAAGGAAATCGTGCAATAGTAGATAAGCACTTGTTTCACTATGACGGTAATGCAAAAATGTTAGATGAG<text:line-break/><text:soft-page-break/>CAAAGATACAATACACAAGTAAATATTGGAGATCGTGCTTTGACTATGGTTTTGCATGTATCACGAGGTA<text:line-break/>GAGACCAGAAGGAGGAGGTGATCGTATTTCATGTTCGCCACGTATTGGCTAATCAACTTTTTCCGGACAA<text:line-break/>TGGATTGGATCTATCGCGTTGGCCGAATGCTATGGTACATGAAGTGGTGTGTAATTTGACCATAAATAGA<text:line-break/>AGGACAAGAGGAGTAAATGATAATCTTGGTTTAACTGTTAATGTAGAAACATTTGACTCGCCTGCTGACT<text:line-break/>ACCTGCTTGATAGAGGTAATCAGCCTTTTCAAGGTGAGCTTTTACGAATAGGTGGCGTTAGTAATGTGCA<text:line-break/>TCGCGCTGCAAATGTAATGATGAATACTGGCTGGGAAAATGAAGATCCAGACAGTCATGAACGGTTTTAC<text:line-break/>CAAGCAATTTCCAACGTGCTAAATCCACCCCAGCCAAATAATGCAGGACTCCAATCATTAGCATGGGTAG<text:line-break/>TGAACAGAGATAATGCTAGAGAAGCTGGGTTTCATGCTGCATTGCATGGATTATTTTACACTTGCGATAA<text:line-break/>TCCTGCTAGGGTAGTTAGTGAATTTCAGGTTGGAGGAGGAGGAAAGTTAGACTTAGTATTGTCACGAGCT<text:line-break/>ATAGGAAGGATGGGAGGTACTTATCCGATTGGAACAGAGCTAAAGTTTGCTGCCACTGAAGCAGACGTAC<text:line-break/>AAAATAGAGAAGAAGAAGCAGATGAACAGGTGGAGGGTTATCTGCAGAGTAGAGGGTTTGATCGCATTAC<text:line-break/>TGATGGAGATAAAATGGTTTTCTCGTATGCCGTATTTAATGATCAAGCGCCAGCACCAGCACAAAATGTC<text:line-break/>CCAAATACCCTTATAGCAGTTAGTAATGTTCTACGCATAAAAGATAACTTAGGAATTGACACTGTGGACG<text:line-break/>ACTTTCCTTATAGATAAAAGGGATTATTGAGAGTTTAATTGTCTGTCATAAATAGCAGACGCCGTCTTGT<text:line-break/>CAGTCAACAAAAAATTTATAAAAATTGTCTCATTGCCTAGGCTGTATTGTAAAACTAAAAAATACTTCCA<text:line-break/>ACTCACATCCTGTATAGCGGATACAGATTATAGTTATGTTGATAAGTAAATTTCTGCTGTCTTGTATATA<text:line-break/>TAAAACTAATTTACTTATCAACATACCAATTACATTCAATGAATTTGTGTAAGATGCCATTTTACATAAG<text:line-break/>ATAGAATGGAAGCATTTTTTGATTTTAAAGTACTAAACCTTCAGTTAACCTCCTGGCCCTGTAGTTTTTG<text:line-break/>ATATGGTCAGGATCAAAAGCCTTTTTTGATCTTAAAATACCAAAACAATATGAAGTAACTTACGCATTGC<text:line-break/>AGACCCAACTATGGCCATATTATGCTTACCCTTTTCCTTTAATCTCTGGCAAAAGCTCATAATAATAGGA<text:line-break/>TTGTGATTCTTAGCTACTATGGCAGGAAAGAAAAGTGCCTTACGTAATGGTTGTGAACCGGATTTACTTA<text:line-break/>ATCTGGGTTTGGCATATACAGATGAACCTGATGTTATATTTCTCGGTATAACTCCTGCATATGCTGCCAA<text:line-break/>TTGTCTGGCATTTCTAAAAACTTCTATGTCAGGAACCTCAGCTAAAATAGCTACTGCTGATTCCTCTCCT<text:line-break/>ATTCCTGGAATAGTCAGTAGAAGTTGAAAATTTTCCAACAACTCTTTGTGTTGCTTTAATAGTTCACGTA<text:line-break/>CGGAGTTTTTTATTGTTTCTATTTTTTGAGCTATATTCATTGCAAGGTCTTCCCAAGCATTTGCAACTTC<text:line-break/>TTTGGGCAGTCTCTCTTTTTTTTCTAAGTGGTTATTTACTAATATCAATTCATCTTTTAACGCAACCGAG<text:line-break/><text:soft-page-break/>CAACGATAAAGATGTTTTAATTTTTTCAGTTCAGGAGAAGGTGGTGTCCAACGAGTAGGTTCCTGTCTTT<text:line-break/>GGCAACAATCAGCAATAATTTCTGCATCAGTCTGATCATTTTTTTGCCGTGTAAGCTTACTTCTTGCGTA<text:line-break/>GGATTTTATGCAATAAGGATTTACAACACTAACAAAATGTCCAGTATTGTGTAGAAATTCAGCCAAAGCT<text:line-break/>TCACTATAACAACCGGTAGCTTCCATGCAGGCTTTTACTTGTTCTACATTATGTTTTTGTAGAAAGCTCA<text:line-break/>GTAAACCTTGAAACCCATGATCATCGTTCTTAAAGCTCCTTTTCCTAGTTTCACGTTTTCCTTTTTTACT<text:line-break/>TATAAATGAGAGAAAAACATCAAAGCGATCTTTTGATACATCTATGCCAAGAAAGTTGTTGATCATATAT<text:line-break/>AACCCCATACGTTACCATTAAAAATGAAAAGTAAGGCTAACCTTGTTAATACAGAATTAGAACCATTTAG<text:line-break/>GTCTTTCTAAGACGCCGTCCAGCCTATACTTTTGAGAGGGAGCTCTTATCTGCAAAACAGATTTTATATC<text:line-break/>TAAGGTTTATATCAGAGTTCCTCCCTTCTCCAACTAATGCTTAAGCTTAAAACATTAGATGCTTTTTTCA<text:line-break/>AGATACAAGGTTTATAGTTAGAATTGGTTGATAGTGTTATATTGACTACTTCATTTTGTAACCAGATCGG<text:line-break/>CTTTATTGAGTAGTGGATTACAGATGGGCAGGCAAAAAAATCCGTGTAGTAAGTTCAAAATCAATGTCGG<text:line-break/>AGAATTTTATAGAAGTGTCAAGTTGAAGTTGATGTGGAAGGAAAGAGACTATAAATTCTGCTATGTTGAT<text:line-break/>TGCTTAACACTCTGAATCAAGGTTGCAAGTTTACTATCCTATCAGGCATCTTTATTAGGTTAAAAGAAAG<text:line-break/>TTTATGTAAACACCTGAACTTACTACAAAAACTCAAAAATTGCAAAATAATAAAAATATTATATTAAAAT<text:line-break/>CAGCTTGACTCATATTATATATTGTACATAATATATCAAGCTAGGAGGAAAATATGGTTATTGCTGAAGC<text:line-break/>TATCAACGGGCAAAGTAAACAAGCGAGCAAAAAGCTAGAAGAGAAATTAAGTCCTGGACAAGAGTGGTCA<text:line-break/>GAAACAGACAAACTATTGGATGAAGAGTACGAGTTAATTAAAAAATATTTATGGGTTCCATCTGAATTAA<text:line-break/>ATGGAGGTAGATCTCTAGTTGATGGTCAATGTTCATTTGAGGAGCTGGTGTGTATATGGCTTGCTCATAC<text:line-break/>AACAAATTTGAACGAGAATCAAAAAAAGTTAAATAAAGAATTACTAAAAACTCTTAAGGGTATAGGTTCT<text:line-break/>TATCTTCATGAGTACGATACTAAAAAACTTGAAAATTTTTTAAAAAATAACAAGGACGATCAAGATTTAA<text:line-break/>AAGTTGTTCTTAACCTTAAAAGGGGAGAGTCAGGATTAACGTTATTGCATGCTGCTTCAAGACTCAATGA<text:line-break/>TGATCAGAGCGGTCCTACTTTAGTCAATTTACTTCTACAAGCAGGGGCTGATCCTAATATAGAAAGCAAT<text:line-break/>GAAGGGAAAACACCTTTACATTATGCTGCTGATAGTAACTATAGGTATCTCACTATAAATCTACTCTTGG<text:line-break/>AGGGAAAAGCTGATCCTAACATACGGGACAATAAACGAAAAACCCCATTACAAACTGCTATTGATAATAA<text:line-break/>TAACTGCCACATTTTAGAATGCTTCTTAACTGACAATCAGAAAAAGTTGAGTAAAGAGCTGTATGATATA<text:line-break/>CTTTTAGGTATACTCTCGCCTGAATATTATAAAAAACCTCATGTTATAGGTGAAGTTTTTAATCGTCAGG<text:line-break/><text:soft-page-break/>CTATTGAAAATTTAGGCAAGTTTCTGGATAAACATAAGAATAGTCAGGATCTCAAAATGATTTTCATTGT<text:line-break/>TCAGGATAGAGTAGGTATGTCAAAAGTACTTAGTTATGCTAGAGCTACTTGCAAAGAAGCAGTGGATTTA<text:line-break/>CTTCTAAAGGCAGGA</text:p>
      <text:p text:style-name="P15"/>
      <text:p text:style-name="P17">&gt; <text:s/>NW_025319046.1</text:p>
      <text:p text:style-name="P15">MHGLVRSLINGNCGEFTEKFEYFLDSCPSFLHSVGKDHFFPAFFFGMFAT</text:p>
      <text:p text:style-name="P15">AHDSGVANNDERIFFRFDNDPGSPGRGNLKVAILTTDGNNRRVVRCYTIA</text:p>
      <text:p text:style-name="P15">DRENSYGSRFSQQEREQLEGILRDEELEWQEYKTFIWADNQGEDEEEEAV</text:p>
      <text:p text:style-name="P15">RCRIFQAGQGPFTGNHASYLTRRHSFQEITRTPGLQNNYLPDLMNQLESD</text:p>
      <text:p text:style-name="P15">DADDVHDTTEEVFQHIIGVYDRYSQALDFYGRESDYHGFVSGVLMHFRYR</text:p>
      <text:p text:style-name="P15">NVANIYLELFVGGGYADITSIVRGTQRLINSVPCVTELKAGRRADRNAGR</text:p>
      <text:p text:style-name="P15">ALEQAGNYVNGCPVSSISIPTLSPRAVSAGVNFDFGNPGRLQLGVRAFLA</text:p>
      <text:p text:style-name="P15">KGSSLMERLFEPVEDEEIGENVRDYLLHPAFGVPAVPGIRNRGGVNARDR</text:p>
      <text:p text:style-name="P15">RIFLYTSGFAFASIAFAKGTVPIEGNRAIVDKHLFHYDGNAKMLDEQRYN</text:p>
      <text:p text:style-name="P15">TQVNIGDRALTMVLHVSRGRDQKEEVIVFHVRHVLANQLFPDNGLDLSRW</text:p>
      <text:p text:style-name="P15">PNAMVHEVVCNLTINRRTRGVNDNLGLTVNVETFDSPADYLLDRGNQPFQ</text:p>
      <text:p text:style-name="P15">GELLRIGGVSNVHRAANVMMNTGWENEDPDSHERFYQAISNVLNPPQPNN</text:p>
      <text:p text:style-name="P15">AGLQSLAWVVNRDNAREAGFHAALHGLFYTCDNPARVVSEFQVGGGGKLD</text:p>
      <text:p text:style-name="P15">LVLSRAIGRMGGTYPIGTELKFAATEADVQNREEEADEQVEGYLQSRGFD</text:p>
      <text:p text:style-name="P15">RITDGDKMVFSYAVFNDQAPAPAQNVPNTLIAVSNVLRIKDNLGIDTVDD</text:p>
      <text:p text:style-name="P15">FPYR</text:p>
      <text:p text:style-name="P15"/>
      <text:p text:style-name="P15">&gt;emb|OZ375456.1|:6639731-6674967 Acleris hastiana genome assembly, chromosome: 1<text:line-break/>ATTGCGGCCGTTTGTGCTACCAAAAACTTATGAATATTGGTAAAACGAACTTTCCATACAAATATTTTGG<text:line-break/>GACACATTAGAATATTATTTAATTATTGCATAGTTCGATGTTCCCTACCACCCTGCCACTTTTTTTTCTA<text:line-break/>AATCTGGAGTTGTCACTAAAAGTGGCATTTTTTTGAGAAACGCTCTTGTACATATCAAGAACTAATTGAC<text:line-break/>AATTGTATTGCTATAAAAAATACATAAAACCTTTTCTTTTTAATATTTAATAAGGAACGTTTTCGTCCTT<text:line-break/>GACACTTTTTTCGTATCTATTAATAGTTGTCCCAAGAAAGTTAAAAAACCGTTAACGGGGACACATTTCT<text:line-break/>CGGTGGAGGGGGGGCGGTGAAGCGTCAAGGGGAAGAAGTGTAAACTTTAAATACCACACCCAAATGTATC<text:line-break/>ATGGCACACAAGTTTTAAAACTTTATTTATTTGTCAAAAAACATAGTAGGTATCACTGAACTAAATGTCC<text:line-break/>ATACCGGATTTTTGGTGTCATTACCGTTTTCCATATTACTACGGATTCTATGCGAGATTCGAAAAAGTAC<text:line-break/>ATGTTAACAATATGTTTTCTCTCGGTAGATTCAGTGGGCTGAAGACGTAAAAGTAAACAAAATATATAAT<text:line-break/>TTTGATTTTTTGACGTCATTACCGCACTTCAGGTGTCCACTCCGTTCATACTTCAAACAAGTGTAAATAT<text:line-break/>CTCGGTGACCAAGAACTGTTCTGGTGTACAAATACATATTAAGCAATGTTTTGACATCCTTTTTCGATAT<text:line-break/>AAAGCGGTATTGGACACTTACCTCAACTTTTTTTTTCGTTCCTAAAAGAGTTGAAAATTTAGGAATCACC<text:line-break/>CTATGGTATTGGTATTGCTTTTAACTCTGCCGCCAATTAAATAAGAGCTATCGTAAAGTTGACAATACTA<text:line-break/>TAATACGTCAAAAGCAACATTGTTTCACTGTGTTGAAGAGAGGCCATGTAGCAAAGAAT<text:soft-page-break/>TATAGTTGTAC<text:line-break/>TTAACAGTGTGTGTAGCTCCGTCGACACTGTCTAATTGATTTGAAACCTAAGATTGTCGACGGGGTTCCG<text:line-break/>CGCAAGCTCCTACTGCTGGGTGGTTACTGCAGAACTAAAAACTTAAATCTGCCTGTCGTCATTTTTTTAT<text:line-break/>AACATCACCAGGGGGATTTCACCGTTCTAATAATGACAGGTGACAGGTTACATATCAGTGTACTATCAGC<text:line-break/>CTAATGGAACCCTGACCCACCATAGAACGGTGTCACAGTGACATTATAAAACAATTTGTTTGACACTTCT<text:line-break/>TATGACTTGAATCATAACGTCTCTGTGACACAGTTCTATGGTGGGTCAAGGTTCCAATGGTCTGATAGTA<text:line-break/>CATGGCGCAGCTGATATGAATCACACTTATGTGAAGCTTGTTAATTTTGCCGTCTATACCCACCGAATTG<text:line-break/>TCACCGGTCACCTATCACTGTCAATATTGTGAAATACGAGGCTGGACGTTATGATCTCTTGGACATAGAC<text:line-break/>TCGTACTATCAGCCCATTGGAAGCCTGACCCACCATAGAACTTTGTCACAGTGAGTTTATGATTCAAGCT<text:line-break/>GTAAGAAGTGTCAAACAAATTGCTTCATAATGTCATTGTGACACCGTTCTATGGTGGGTCAGGGTTCCAA<text:line-break/>TGGGCTGATAGTACATATTGACCAACGGTTTTTATATCTGGACTGACTTCTTTGACATTCTGACACTTGT<text:line-break/>ACATATTGACTAACAGTTTTTAGGGTTCCGTACCCAAAGGGTAAAACGGGACCCTATTACTAAGACTTCG<text:line-break/>CTGTCCGTCTGTCACCAGGCTGTATCTCATGAACCGTCATAGCTAGACAGTTGAAATTTTCACAGATATA<text:line-break/>TTTCTGTTGCTGCTAAAACAACAAATACTAAAAACCGAATAAAGTTAATATTTAAGGGGGCTCATACAAC<text:line-break/>GGAACCCTTCGTGCGCGAGTCCGACTCGCACTTGGCCGGTTTTTTATATAACATCTGCCCCCTATTTCAC<text:line-break/>CGTCTTAACAATGGCATATGACAGGTGACATTTCAATGTACATGGCACAGCTTATGTGAAGCACAGTGAT<text:line-break/>GTAACAGCGTGTTGACTTTGCGATGTATATCGAATTGTCACCTGTCAAATGTCATTGTCAAGACGGTGCA<text:line-break/>ATAGGGGGCTGGGCGTTATGACTTCTTGGCAGAGGTCGGACTTCTCGTAGCACTTTTCGAGCTGTCACAG<text:line-break/>GGACTTCTCGATTATCGACTTCCGATGTATCGATACAGTATATTATAACACACGGTATATTAAAGAAGAT<text:line-break/>TAAAAGTATAGGTAAACAACGCGCGGTCTTATCGCTAAAGAGTGATCTCTTACAGATATTTTTTGAGTAG<text:line-break/>TTGAAAATGTGAAATAGAGATTTAAAATGAAAACAATGAAAAGTTAATAGTTAACAATTTCACGTTTTAT<text:line-break/>CAGTTTATTATTTTATCCTTAAGATATCAATTTCATGTTCAAAGTCTGTTTTATTGATAAAAAGTGTTTG<text:line-break/>TTTCTCCTTAAAAGAAATAGATAATCATTATCTGTAAGACATCGCTCTTTAGCGATAAGACCGCCTGTTG<text:line-break/>TTTACCTCAATTATTAAACTTTTTTAGTATGTTGTGGGTTATAATGTATCGATAATATGTGTATATCGGA<text:line-break/>AGTCGATAAACGAGAAGTCCCTATGACAGCTCGAAAAGTGCTACGAGAAGTCCGACCTCTGCTTCTTGGA<text:line-break/>CATTCTGACACTTGTATATGTATTGACCAAGGGTCTTATAACATCACGCGACACGTGCGCACCCGCTCCG<text:line-break/>TGCACCCGTGCAACTTAGCAGAAAAATAAAATAACACGGAAATGCTTACTTAATTTATTT<text:soft-page-break/>GTCCTTGAAA<text:line-break/>TAAGTTTGACATATATAACCATTAAGTAACGCTAAACAATAAGGTTTTTGAGGGCAAACGGCAACAATCC<text:line-break/>CTGCTACAATTCAACCATTTGATTATAATCTCTCACAAAATGCTAAGTAGGTATATAGTGCTAAAATATA<text:line-break/>GTAAAAAATAAGCGGGGCAGTTGGAGAGAAATAATCATCTTTTTCCAATTTTTACGTCCTTTTGTTGGTC<text:line-break/>TTTTGTCTTGTACTGTACCATCTTATACAATGTTTCGGAAAAAAGTAAAAACGCACATAGGCGTTCAACT<text:line-break/>TCAACGGCTGGAGGGTATCGTCTTGGGTCGTCCCAGTCGTTTTTAGGGTTCCGTACCCAAAGGGTAAAAC<text:line-break/>GGGACCCTATTACTTCGCTGTCCGTCTGTCTGTCTTTCACCAGGCTGTATCTCATGAACCGTGATAGCTA<text:line-break/>GACAGTTGAAATTTTCACAGAAGATGTGTTTCTGTTGCCGCTATAACAACAAATACTAAAAACCGAATTA<text:line-break/>AGTTAATATTTAAGCGGGGCTCCCATACAACAAACGTGATTTTTATAGATAATGGTACGGAACCCTTCGT<text:line-break/>GCGCGAGTTCGACTCGCACTTGGCCGGTTTTTTGTCAAGTTCTTAACAAGTCACATTCTGCTTTCGTCAC<text:line-break/>CCATTCTTCATTCGTCACTTTCGCTGGTAGTCTTTGTCGTCTTTGGCCATATTTGTTTGTCTTGTTCTTA<text:line-break/>TTCAGGTTAATTTGATGTTCGTCACTTGACAAAAAACGAATGGGAAGACCCAAGAAGATTCCGGCTAGAA<text:line-break/>GTAAGTCGAAAAACGCTTATACCAATCGTCGGCAGTGTATGCGTTTCTGCGTACAACAACATCACTTTTT<text:line-break/>GGCAAACTATGTATGTGCTTTTGTTCGAAGCATGTAGGCAACTACCTTATTTTCGGAAGTTTTAGGCCCT<text:line-break/>TAAAAACTGTTTCCTTAACCTACTTGGGTTTGTATAAAACAGATTTTCGTTTAAACAACCATATTAGTAG<text:line-break/>TTAATTATTAAATCTAATAGACAATTTAACTCTGTCCTTTTTCAAATTCGTGTATGAAGAATTAATCATC<text:line-break/>ATGAATGGTCTCTTAACACGTTCTCTGTCCGGTTGCCCCCAATGTGGGATCATGAAGCTTTTTTTCAGGA<text:line-break/>GTCCGTGGTTCCACTATGGGGCCAAATGCCTATACTGAAAGCTCAAGTTTGACTTGTGACATTGTCAGAT<text:line-break/>CGTTTTCTATGGGGACAGGGAATGTTGTAATTGCGAACGTTAGTCTTTAACCTAACATAACTAGGTGACA<text:line-break/>CCCATTTATTATCATCCAAAATATCAGTTACTAGAGAACGCCCGCAACTTCGTACGCGTAAAATTAGTTC<text:line-break/>CCCGTTAATTTCCCCTATTTCTTCTCGTTGGGGGTCAACTTTCGGAAAATCCTTTCTTAGTGTACCCCTA<text:line-break/>GACCTCATAAGGAACCTACGTGCCAAATTTGGAATCTCCAGACCCAGCGATTTGGGCTGTGCGTTGATAT<text:line-break/>ATAAGTCAGTGAGTCAGGTTTTATATCAGTTATTACTTATTCTATAGTGATTGTAGAATTATCGCCTTTA<text:line-break/>TTAACTTGAAAGTTCATGTTGCCAATGATAGGGCAATTTCTCTAATATGTAGGTACTTTATCACTGTCAG<text:line-break/>CTGCAATGGGCAAATCCGTTGTTGTTGGTATGGTAAGAAATTTTTAAAATGGCCCTTTCTGTTAAACACA<text:line-break/>TCTCTGGTAATCGGATCACTTCATAAAATTCATACTATAAACTTGTCACAATGCAACCTATTATAAATGG<text:line-break/>GTTCTAGGTCATTTGTTTGACCCTCTAAGGCGAAGTGTAGCAGCCAGGTAGAGAATGA<text:soft-page-break/>CAAAGGCTTCTT<text:line-break/>CATTCCTAAACTTATAAAACTTACATCTTTTAGTCTAGACACAATCAAATTGTCCTAAATCTTGAAACAT<text:line-break/>TTAAAAGGACTCCAGGAAGGACATTTTATACCAAAAGATAAGCAGCTTTTTGCTATTTTGCATTTGACAA<text:line-break/>ATGGGACCACTAGAGTTTAAAATTTTACTTGACTAGTTTAATAGTAGACTACATTTTGATTGATAGATGT<text:line-break/>TATGATACTAACCCATTACATTAACTCTTAAACGCAACTGTAAAAAGTTCCGATTCGCCTTTGAAACTTT<text:line-break/>CAGTTCACTTCACTTTTTATCAGTACCAAATACACCAGTGCAGTCAAGTTATCCCATATCTCAAAGATAC<text:line-break/>ATTATCCTTCTTGACTTTGTAACTTCCTTATCACTTCACATGAGCGAAATTTAAATAAATACGTGTCATA<text:line-break/>CAGTCATTTCATATTTTGTGCGTGGAATATCTTTCGCATTTAATGTCTGGTTCATATGTTGCAATGTTTG<text:line-break/>ATTTAACACCTGTGTCAGCCAGTTGCGGAGGCCTGCATAAGTAGAGCGCGCGCGGCATGGAAAAGCGATG<text:line-break/>GCTGAGGAGCCACTCGAGATTGGCCAGTACGCTCCGCTGGAGGCAGATGGCACAAGTACCGCCTTAGCGC<text:line-break/>CAAATCCCGACGAGCACTGAGAGCTCTAGTGATCTCACAACCAGATCCAAATAGCACAGCCCGCTGACGT<text:line-break/>TTACGTTTCCCAACCGCAACCTATAAAACAAAAGTAATTGTGGATTATTTTTTTGCATCACCTATAAAAC<text:line-break/>CCTTTCAACAGAATTAGTTAGGCCAAATACCTGAATAGCTGCAACAGGATGCAAAGAATTTACGTCTGGT<text:line-break/>GTAGGTGGTTTATCATTATCTTCATCAAGCTTCCCATTCTGTATTTCACCGACATGTTCAGAGCTTGGTT<text:line-break/>CGCTTTTAACAGGTTGTTCATATTGCAAACTTGCTGCATTTTTATCAAGTATTTCTTGCACGGTATCTTT<text:line-break/>ACCGGCCATATGTAGAGAAAGACCAAGGCGCGCTAGAACTCGTTCCGGTTTTCAACGATCCCGAGCGCCT<text:line-break/>CCGGTGGGCGCGGTTTGCTCTCGCCGATTCACATCTGCCACCAGACTGGCCCAGTCCACACCAAGAGCAT<text:line-break/>CTCCTAATCCAGCTGAAAATCAACATATATGTATAAAATTGTAAATTTTGAAATTTTCTCCCGTTTTCCT<text:line-break/>GTTGGCCTTGCAAATACATACTATATATCACTTAAAATCGGAGACCTATATTAATTACCAAATTAAGGTA<text:line-break/>ATGTGCAAAAATTGTATAACTTTGTCAAAATTATAACAAACCTCTGGTTCGCTCCTCTTCAAGTTCACCA<text:line-break/>TCAGATATTTCTTCAAAATCTAAATCTGTAACATCTTCCTCATTCTTGGCACCGTGGGATTCCTTTTCAT<text:line-break/>CCCCAACTCCACTGGTATCCTTAACAGAAAGTTCAGTTAATTACTTGTCTTAAATGTTGTCATACTATTG<text:line-break/>AAATCTGCAATTAAAACCACAATGTCATTTTACCTGTGTTGATTATTTTTCAGATCCTTCAGTTTTAGGA<text:line-break/>ATAATTTCTTCAGGTTGAGCCACTTGGCTATCTTCATCCATCGATGGATCTACCATCTAGAAAACAAAAA<text:line-break/>TATTTAATGACAGCATTGATGTCGATATCGATATCTCGCTTTCAGGCGTGTCAGAAAGTCGTAAGGGAGT<text:line-break/>GAGCGCGTACAAAGAATTCCTAAAGTAACTATGTTTATTGTGGTTAAAATATTCATTTTGGATTGTTTCG<text:line-break/>AAATAATCTATTTTTCATCACACTTGCTCGTAAATGGTGTTATTCCATGCCTGTATACAGA<text:soft-page-break/>AGGACAATG<text:line-break/>GCCTAAATTGTTCCCGCGGGAATTATGGCGAGTTTGTCATCCCTAGGGAGTAATGACTTTCTTTTTAAAA<text:line-break/>TTTGCAACTCTTTCGCACATCATTTCTGACTAAGGAGGTTTAATTTTCAGCCAAAACTTAAATCGGTTTC<text:line-break/>TAATTTCATCTTTAAAATTTAAATTTAGGCTGAAAATTTAACCTCCTTAGTCAGAAATGATGTCCGAAAG<text:line-break/>AGTTGCAAATTTTAAAAAGAAAGTCATTACTCCCTAGGGATTACAAACTCGCCATAACTCCCGCGGGAAC<text:line-break/>AATTTAGGCCATTGTCCTTCTGTATACAGGCATGGAATAACACCATTTATGAGCAAGTGTGATGAAAATG<text:line-break/>AATTTGATTTGATTTAAAATGAGAAAAATGTACAAAAAATATTTTTTTAAGGTAGCCTCCAATGACCTTC<text:line-break/>TATACATATGGACAAATCACGCCATACAACAAAAATGCCCAAACATGGCACTGCATCTTATTTCACCCTA<text:line-break/>TTATGCTTCGACTTTCTCTATCTATACATTGCCGTTCAGACACCAGTCCTTTAAAATGTCGTCTGTCATT<text:line-break/>AATCAGTAATGTATATCAATTACTCAGTCGAAGCTTCATTTGTTAGTTTTATAAGTTAGCTGGAACAAAG<text:line-break/>TACTAGTGGAGTAGATTAACGGCTGTAAATTTTAGGGTTCCGAACCTCAACACGGAACCCATAAGGGGGT<text:line-break/>TTTATATGGGTGAGCTTATAAAAGCTCACTAATTGTTTGTCCGTCTGTCTGTGTATTTTTTGATGTTTTA<text:line-break/>TTTTATTTTTCAAATGTACCTAAAGACTGGTCCTCAAAAAAAGTAGCAGCACTAAATATGGTTTTTTTTA<text:line-break/>TTTTATTTTGTGATATTTTTAAGCAGAGCATTTGTTATAGTAATCTGTCGATACTAATTAATGAAATAAT<text:line-break/>AAACAATAATGGTAAAAAATAATAGGTGATATCTTGGTTTCGCCTTTTGATATTACATCTCAGCTAAAAC<text:line-break/>TTTTTGAACAGGGTCTTCTGAGAGTATTTATGAGATGTTTGTTATCAACATAGTTGTTTCTTTAAGGTTG<text:line-break/>GTGGGCCATTTAATACCTCATTAAATTGTCTTTTGCTCAATAGTTAACTTCTTATATTAGACTTGACTTT<text:line-break/>GAGGTAGTTATATGGAATTGTAAAATTTGTGTATTGGCCATTTTTACCGAAATTCGTCTCCCATAGAAAA<text:line-break/>ACCTCTGTCAGAGGTTAGATTGGAGAGACTTCCATACTACCCAAGGTAAAATCCAGTTTTTGGTATAACT<text:line-break/>TATTCGTAAGATGATATTCCTAAAAGCATAATACCAGTTGTGAAAATGGAAATTAAATTGTGGCATTGTC<text:line-break/>GAAAACAGCGAGCGAAGATTGTCAAACCGTATTGTTCAAAAAGTTATTAGTACCTATATGCAATAACTAT<text:line-break/>TGAGAAAAATCAAAGAATGGCATACATTTCAATATTATTGTATTTTATTTGATAGAATGATATCTACAAT<text:line-break/>AAATAAACTGCTTCATAATTATAATACTTTCGGCATATTGTCAGATAATTCGTTGCAAATTTTTTACTGA<text:line-break/>ACCACTTCTTATTGATGACAATGCGCCACTTTTGATGACATTTTCTAAGCTCTTTCTTGAAATAAGTTGT<text:line-break/>TTTTGGTGAGTTCAATACAGATTCTAACCCTGACAATGATGATGTAGATATATGAACTGGACTATTGATT<text:line-break/>GGTGTTTTTGATAATAGTGGTTGTTCTGATACCGGAGCAGTCAACTCCTCAAACCGATAATAATTATTAT<text:line-break/>AGTGTTGAGATACCTACAGATGCAGATAAGAGCATATAAATAATTTGAATTTCCATATATA<text:soft-page-break/>GACTTACAA<text:line-break/>GTACATGTGATGGTTTCAGTTGCTCAGATGTTTCTGCAACTTCTAGACTTCTTTTCCTTGATAAACTCGG<text:line-break/>TCCAGACTCATCCTCAAACTTAAATATTGAATAATTGAATATAATTGTACAGCTAATAATTAAATAAAAA<text:line-break/>CCCTAAAAAGAGCTACTCTATTGTTTTGTTTTCTGACTACTGTTCTTGTCACGTCGCACTGCCATGGATA<text:line-break/>CTTGACAATAGTTGTCAATCATTTATGATATAAATGATATTTATTGAAAATAAAATGGTTTTAATAAATT<text:line-break/>CTATTCACTTTTTCGGGTGTTATCTTTTATAAATAAAATTACGTTACCGGTGGTAAGTCACGCCATCTTT<text:line-break/>TTTTACAGCCGTTAAGGTATTATTTCGGCACTTTTTTATGACACACTTCGGCATTCTATCGGCTTCGCGA<text:line-break/>CCAACAGACGACTAAGGTAAGAGGTGTGCTTGAACCGTCATTAAGCACAGGTGTGCCGTGCTGCGTATTG<text:line-break/>CGAGCTGATGGGAAGTCCTTATGTATAGAAGGTCATTGGTAGCCTCATTAAAAAAAAAGGTCTACGTTGA<text:line-break/>ATCTGGGATACGTAGAGGCCATTCTATATCCCCCTTTTCGAAATAACTTTTCACTCTAGCAGTATTATAT<text:line-break/>GGGGTAACAGGTCTTGTTGGTACTAATGTCTAAATGTATAATGGTTCAAAATGTCTCATTATCAAAATGT<text:line-break/>ACAACGGTCGAAAAGTACCTAAATGCAAACATGTTATAATGAACAAAAGACAAAACAATTAAATGTCACA<text:line-break/>AAAACTTAAGAACCTAATTGTATGAGAGACAAAACGTACAAAAAGATAAATGGTCAAGATTCCAAAATAT<text:line-break/>TCAATGGGTTCGAAAATCCCTTTGTCAAATTGTACAAAAGTCAAAAAGTATATTAATGTCAACATGTTTG<text:line-break/>TAAGAAAAAACGACAAAATGGTAATGGGTAATGTTGGTACAAGTGCCGGAATGTTCAATGGGTTAAAATG<text:line-break/>TACAAATTTCAAAAAGTATGTAAATGTAAACATGATATTTCGAACAAATGACATAATGTATTGATGTCAT<text:line-break/>GAAACCGAGGTGTCTAAAAAGTGCCGTTGACAATATGTGCTAATGTCAAGCTGGGTAATTTTAAATAAAT<text:line-break/>AAACAACATAATGAATTTTATCGTGAAAGCATTTTGGGTAGAGCACATTTAATTAATCGCGTTTTGTACA<text:line-break/>TTTTGGCCACAGAGTATTCTGTACTGAAAACTTCCAGTCAAATTGACACTTGAGCCCTAATGAATTCTAT<text:line-break/>CGAGAAAACATTTCAAGTAGAGCACATTTAGTCAATTGCGTCTTGTACATTTTGGCCATAGAGTGTTCTG<text:line-break/>CCCTGAAAACTTTCAGACAAACTGACACTTTAGCCGTAATTAATTCTATCGAGAAAACATTTCGACTAGA<text:line-break/>GCACATTAAGTCAATCTCGTTTTGTACATTTTGGCCACAGAGTATTCTGTCCTGAAAACTTTCAGACAAA<text:line-break/>TTGACAACTAAGCCGTAATGAATTCTATGCAGTAAACATTTTGACTAAAAGAAATGTTGTCCATAGCATA<text:line-break/>TTTTGGCTTTAAAATATTCAGACAAAATGACCTGGTGGCACAAACATTTTGTACTTTTTGACAAAATCAC<text:line-break/>ATCTCAACCATTTATGCATTTTGGCATTTGTACCAATAGGACCTGTTACCTTATATGGCATGTAACACCA<text:line-break/>TCTTGTTCCTCTCGATATTTCCGTCGTGTAGTAATCAGTTTTATTGTTTTGCGTACTGTTTTAGTAATAC<text:line-break/>GCGCGGACACCTAATGCATACTGCGCTCCCGTGTGCGGCTCCATTACAGGAAGCGTC<text:soft-page-break/>GCTCCCGACAAAT<text:line-break/>TAAAAACTCAGAACGCCTGCATTTTAGCCCACCTGTATATTGTCTTAGGGCTTGTTTAGCGATGGACAAC<text:line-break/>ACGGTTTTAAATAAACTAGACGTTCTGAAAATACTTACGTCTTCTCTGTTTAGAATATCGTCAGGATCAT<text:line-break/>CACTAATCTCACTGAGGTCATCGGGTATAGGCTTGTCGTCGACCTCCGCGTCTGGGCGCGGCGGCCCCGC<text:line-break/>GGCCGCAGGCGGCGCCGCCGGCGCGGACTCCTTCGCACCAGCCTCAGACTCGTTTCGCTGCGGGCGCCGT<text:line-break/>TTGTTGCCATCTCTCATATCCAATCTCATACCACGGTAGTCATCTAGAAACAAACCATTTCCTTATTAAA<text:line-break/>ATTAGTCCAACAATCACATTATTAATTCACTCGAAGTTTCGATATGATTGTTATTTTATCTTCTGCGTCT<text:line-break/>CTAACCTTACCATGCATACGGCCACGATGTGGCCCAGATGGGTGACCTCTGTGATGCCAGCCTTCCATAT<text:line-break/>CCGTTTCTTTGTCACCCCACTCGTTCATCTGCAATAATTAAATAAATCTATACATAATGCATTTTAGTAC<text:line-break/>AAAGGACAAGGAAATGTGTCAAGTAAATGTTTGAAGCAATACGAAACATACCAAAATGCGGATAAGGACA<text:line-break/>GCCAAGGAAAATATGGGAGAGGATAAAACAGGTATTCTGATAGTTTCGGTTATAGTAATCAATTGGTTGG<text:line-break/>TACTGGTACAGGGTTTGGTAGTAAATGCTCACCTAGGAACAGAAATCATTTGTTACCCTTATTATAATCT<text:line-break/>TATATTTAAAGAACGTTAAAATGAGACTCATTGTAATACCTGGGGTTCATGTAAAGGCCAGTGCCGGTCT<text:line-break/>CGGCCCCACTCTCCTGCAGCGCGATAATCTTCGTTATCCCAATCTTTATGAGGCTGCAGGTAATTGCGAT<text:line-break/>CTCTGTCTATGGACCCCGAGCGTCCTTCCCAGGAGCGATCGCGGTGCGGACGGCGATCATCGTAACCTAG<text:line-break/>ACAAAAATTGGGCATTAAGCATCGTCGTAATTATTCAGACTTCAATCAACATTTAATTTTTTTAGACTAG<text:line-break/>TAAGAATGAATAGATTCATAACGTCACGGGACGCACTCTGCAGTAAAAAAATTGACGTGACGTAATTTAC<text:line-break/>CTTTAAATTAGCGTCGAACGGTAAATACCTACCACTCCCAAGTAAGCAAAATAGAAGTACATTTGCCCTG<text:line-break/>CTATGCCTTTTCTAAGTCACTTACGCGGGCGCGAATGTATTAACTGGCTCTTCCTATTCCGATCACTGTT<text:line-break/>AAAGGAATGCATAAACACTAATCACACGCTTGTTAGTCATACAGCCACACTCAGAGATGTCAATTTAATT<text:line-break/>TAATGATTGATTAAAGTTGCTGCTGTCGCTTTCTTTGCTACAGCAATAGAATAAGAAAACACGTCACTAA<text:line-break/>ACAAGCATTACATTTAATTGACGTCTCTGAGTGCGGCAGATACTCATAAATATATTAAGCAGGACTGGTT<text:line-break/>AATTGCAATGTTTAAACAATTTGGATAAAAAAATTATGGTATGAATCACACGTCATATTCTTACCCATGT<text:line-break/>CAACACCACGATGATCACCCATCCGTTCAGCGTACATCCTATCTTCATCCTCAGGGTACCCTCTAGATGG<text:line-break/>GCCAGGTATATCATATCCAGCATCATAATGCCTATCCCTGCTGTAACCTGGCGACCTGTCGTCTTCTCTC<text:line-break/>GGTTCATCATAGCGATCATCCATTCTTTCATATTGGTCTATGCCATGGCCTCGATCGTAATTGCGTTCCA<text:line-break/>TTCCGATTTCGTAATCGCCCGGTTCTCTATCTAAACTACCGATTCTATCCCTCTTGCTAG<text:soft-page-break/>ATCGATCCCG<text:line-break/>TTCTAACCTATCCTGCTTGCGGCCTCCTCTTTCAGAATGAGTGTCTTGACGATCTTTAGAGTTTGTTGAA<text:line-break/>TTCTTGTCTGTTTCAAGAGCCCTGTTAATCTGTCTGTCTGTCTGTGTGTGTCTGTGTCTGTGTGTGTGTG<text:line-break/>TTGTTCTTGTGTGTTTTGTGGCAGCTAATCTCTCTTCGGGTCTAGGTAACAGTCTCTCCATAGGTTTGTT<text:line-break/>TGGTTTTTCGAGACCTTTATCAGGCCCTCTGCTACCGAGCCCTCTATCACGGCCTCTACGCTTGCTGTCA<text:line-break/>TCGCGTTTGTTGCCCTCTTTATTTCTTTCACGCCCTCTGTCTTTTCTATCATGTCTATCTTTATCGTCAT<text:line-break/>GTTTTTCCTTTCGCCTCTCTAATGATCTATCTTTATGGTCACGGACTCTGTCACGATCCCTACTAGCAGA<text:line-break/>TCGTTTCCTATGTCTTTCAGCACTACCTTCACGTTTAACTTGCTTCTTTGGAGAAACTGGTCGACTTCTC<text:line-break/>TCAGAACTTTCTTTACGCCTTGGGTCTTTAGGATGAGAGACATGTGGACGGGGTGATCTAGACCTACCTT<text:line-break/>TTCTAGGAGATCTGCTTCGACCTCTGGTACGATCCCTTTCCTTTTCCCGTTCTTTTTCTCTTTCTTTGTC<text:line-break/>TCTGTCTTTTTCTTTTCTATCTCTATCTTCAATTTCTAGGAAAAGTGAGAAAGAGGTCTCCAAATATTTT<text:line-break/>CTATCATTGGACACTTGGGTTAGGATCAAAGGACTAAATAATGGGAGCTATATAAACCGAGAGGGTGCGC<text:line-break/>CGTGGTACGCATTAAGAAATACTTAGCGGAGCTAAGCGGGGTTCAGAATAAATGGCCTCGAGGTGAACAA<text:line-break/>CTAACTTTAACCCGAAAGGGAAGGAGGACAAGAGCATGTATGTAAAGCGAGAGTTATCTGAAGATGTGTA<text:line-break/>AGGTAACGGCTTGCAACACCTGATCAATATGGTTAAAGCTAAACTGCTTGAATTCTAATCTTCAGGGGTG<text:line-break/>GGATTTCACATCCATGGGTATCACATTTAAAACCCCATGTCTACAGTAAGCACAAATTAAACTTTCGTTT<text:line-break/>GTGTGACATTCTGGCTGTAGAACGATAAGTAGTGAACTTATTTAAGAGGATGAATAGAAAACCTAAGTTA<text:line-break/>ATCTAGAACAGTTCTTAGTGACGGAACATGGGATGACCTAAGGAACGCGAGTTCTATGGTTACGGAGTCA<text:line-break/>TCGTAGTAGTCGTGAAAGTAACGAATCACCGGGGAGTGTGGGAAAGCCACATACAGGGCAAAGGGTGACA<text:line-break/>GATAATTGAATGTTGAAATTGGGAGGTACGCAAGATGCGGAAAGCTGAAACAATACTTAACATTATACGT<text:line-break/>GAACGTGGACAAAGAAATTTGCCGGTTAAAAACGTATATCGCCTACTCTATCAGCGTGATCTTTACCTTC<text:line-break/>GGGCGTATGGCAAACTTTGTCGTAATAAAGGTGCTATGACAGAAGGTGTGACAGTTGAAACAGTTGATGG<text:line-break/>TATGTCTTTGGAAAAGATCGATAAAATCATAGAGGGTTTACGCTATGAGCGATATCGGTGGACACCAGTA<text:line-break/>AAACGTATCTATGTTTTAAAGAAGAGTGGTAAACGCAGGCCGTTAGGGTTGCCAACATGGTCAAATAAGT<text:line-break/>TACTTCAAGAAGTAATTCGATTAATATTGGAAGCCTACTATGAGCCTAAATTTAGTGAATGTTCACATGG<text:line-break/>ATTTCGACCAAAGCGTGGATGCCACACTGCATTAAGAGCAGTAATGCAAAAAGGCAGAGGTACAAAATGG<text:line-break/>TTTATAGAGGGAGATCTCAGTGCATGTTATGACTCAATTGATCATACTATGTTGTTGAAA<text:soft-page-break/>ATACTGAGTG<text:line-break/>AAAGCTTCCAAGATAACCGTTTTATTCAGCTAATCAATCGACTGCTAAAAGCAGGATATATGGAAAATTG<text:line-break/>GAAGTACAATAAGAGTCATAGTGGGGTACCACAAGGTTCTATTATTGGTCCAATTCTGAGTAACATATTA<text:line-break/>CTCGATCGGTTAGATAAACATGTGGAGCATATACTAATACCAGCAAATAACCGAGGTAAGCGAAGAAGGA<text:line-break/>CAAATCCAAAATATTTAAGGTTAACCATGCAAGTATCGATGATGAGAAAACAAGGGAACTGGGATCAAGC<text:line-break/>AAAACAACTGCGTCAATTAGTGCAGGGTATGCCATCTAAGGATTCTTGCGATCTAAATTATCGACGTCTT<text:line-break/>TGGTATGTTAGGTATGCTGATGATTTTCTGGTAGGGTTTGCAGGACCAAAGAATGAAGCTGAACAAATTA<text:line-break/>AGAATGAGATTGCTGGGTTTCTCAATGAGGAGCTCAAACTTATGCTTAATGAAGATAAAACGTTTATTAC<text:line-break/>ACATGCGTGTGATAGCAAAGCCAATTTTTTGGGTTATGAAATACATGTTTTGCATGCAGATGATAAACAT<text:line-break/>GATCATCGGACACAACGATGTATTAACGGTAGTATTGGGTTACGTGTACCACATCATATAAAGCAGAAAA<text:line-break/>AGTGTTCTGAATATATGCGTTGTGGTAAACCGATACATTTACCTCAACGTACAATTGATACAGCTTACAG<text:line-break/>TATTGTTGCTCAGTATCAAACTGAATATCGAGGAATTGTACAATACTACAAAATGGCCTACAACCTTCAC<text:line-break/>ACACTAAGTTATCTGAAATATGTGATGGAAGTATCATTAGTAAAGACTTTAGCATCTAAATACAAAACAA<text:line-break/>CTTGCAGGAAAATTTATAGAAAATTTGGTGCGACGATCGAAAATGATGAAGGTGAAAAACGAAAAGTCAT<text:line-break/>CCAAATCAGAGTAGATCGTTTACCATCAAAGATACCATTAATTACACACTTTGGTGCTGTGTTGCTAAAA<text:line-break/>TGGAATAAATGGGTAAGCATAAGTGATAACCTTATACCAATATGGAATAAGCGTAGTGAAATAGAGCAAA<text:line-break/>GACTATTGGCACAAACTTGTGATCTTCATCGTCACTATAACGATACTTATCTTCTGGATTTCTACCACCT<text:line-break/>GTAATTCCATCATTCGTAAAAACTCTAAGGGCTACTTGTTTCTTTCCATCTTTTTTAAGAGAAAAACATA<text:line-break/>GCTTTACAACATTAGCTTTACCTTTTTTTCTACTATCTTGTACACCAACCTCAGTATGCTTAACATATAC<text:line-break/>CTTATCGATACCAAGCTTTTCTACTAGCCCACTTTCAGGAAGTATTAAAACTGAACCTAAAATACCATGA<text:line-break/>ATAAAAAACTCTGGATCAGACGTCGAGCCAATATCTGGAGTCTCACTAAAAAATAAACTAAACTTTTCAG<text:line-break/>CAAACCCTACGGGCTTTTCTTTATCCACCGCAAGAATTGGATTACCTTTATCGTTACCTAAGTTAATTGG<text:line-break/>TTCTGTAAGTAACAATTCTATTAATTCAGGCTTATGTTTAATGTGTTTTGTTTTAGCTGTTGCTTTTGGC<text:line-break/>ACTTTTCCACCTATTTTTTCATACTATGTGCTACTTCTTTAAATTCTATACTATGAAGCCTTTTAGCTGG<text:line-break/>ACTACTATCACTTTCTTCCATACTTCTCTTTTTGTTACCTTTGTGAATAAGGTCATCCAGCAACTGAAAA<text:line-break/>GCCTTATTCCACATATCCTTTTCTTTCTCTAACTTTTCTTCCGAGCGACGGCATATGATACGTTCCTTGA<text:line-break/>ACTTTTCTTTAAACTTAATTATTACTTCTTTGGACAATATACACTCCTGAATAAAGAATTTT<text:soft-page-break/>AGTAAATC<text:line-break/>CCATTTATTGTTATAAATTAAACTCTCACAGATATCCTTACCTTCACGGTAAAAAATGATTTTTTCTTTT<text:line-break/>TCAATAAGAGTTGCATCTTTTAAAATTAGCTTAACATTCTCTTTATCTTCAATCTTAAGTAACTTTGACA<text:line-break/>ATAGAGACCCACTAGAACATTCATCTATAACATACCTTTTATGAGCATCTGGGCTTTGCTGCCAAAATTT<text:line-break/>CCCAAAAAGCTTTTGATAGTCATAATCTTTGTGGCCCTCTATCACTTTATCGACCATTTCCCTCAAAAAA<text:line-break/>TAATTACAATCCTTTCCAGAAAGAAAATCCCACATACGACTCACCGTTTTCATAAAGAAACTTTGCCAAG<text:line-break/>GCCAATCTAACAAGCATTTTAACACTTCATAAGGGTAGCTTTTAAATACTTCTGTTTGTTGCTCTTCATT<text:line-break/>CATTTGTGAGAGTAAAAAACATAAAACATCAGCATAGTGTTCTTTAGGAAGGTCAGTACGATTGCGAGCA<text:line-break/>GAGTCACAACGTCTATCTGCTACATATCCTGCAGATCTTACTAACGACTCTTCTTTTTCCTTGGAAGTTA<text:line-break/>GTTTTTGCAAAAAATACTCAGTTGCCGCTTTATTACCACCAACTGCTGCATATTCAAATGCATATTGATA<text:line-break/>AGGAGAACACTTACTTTGCCATCTTCTTTCAATCATATTATCCAGCTTATTCACTTCTCCTTTTGTATAA<text:line-break/>TATGTCCAAAGAACCACTAATTCCTGCTGCCTAACTTTTCTTGGATCTTCTTCGCTATAAAAAGACTTTC<text:line-break/>TGCGATTTTCAGGCATCTTGCTCCATAGTTCCCGAATATCATCCTCTAAACAGTAAATACATGCCAGTCT<text:line-break/>ATAGCGTCTGGTAATATCTAAATTCTCATCTTTAATTAACACCACTGCTGTTTCCTTTTTATCTACTGTC<text:line-break/>CCTTGTGGTGTCCAACAAAGCTCATTTGGCAGATCTATACCAAGATAGGAGTTTTGATCATGATACTCCC<text:line-break/>TCCACTTTAATATCTCCAGGCCTATTGGTTTGATAAAGTTCAATACTTTCTTTTTTAGGGGTTCTGGTAA<text:line-break/>CAGGAGCTCTGGTATTTTTTCTATTACCTTATCTTCTACTACTTGCCACTCTTTCCGTCTTTCACTGAGA<text:line-break/>ATTAACGATCGAAAATAGAACCTTGCGGTCAAGGCCCTAATGTCGTCCTGGTTCCACAATGTGATAGCTA<text:line-break/>TCTTAACTAGAGTTATATGCTCAAGCGATGGCGTTAAAGTGTAATTCATTATTTGCCTCACTAAAATACT<text:line-break/>TATATATCATGATTTTCTATTTATTAAAGAAAAAAATTATACCAACCTTCGTTACTGAAAAGACAAATAG<text:line-break/>GACATGTTATAAATTCGCCTTAGTTTTTACTCTCAAATGAATTACTATTAATGTAATATTATATATCGCT<text:line-break/>AATGAATTAAATAATATAACCATCTCCATCACTAAAAACCAGCTAGTGAGAGAAGAGTTTGTTTTGGGAT<text:line-break/>GAATTGGTCTACCAACTGATACATACGAACTTTTCTACATAATAATTCTACTATACCGTAAAGAAAGCTA<text:line-break/>TATTAGCCTACTTCAGCTAAATTCACATATGAACTAATCTGCCTAACTTTGTTGTAGATGAACATGTGTT<text:line-break/>CCGTATTTGTACTGAAGGAGAACCAGGCAATAAATCATTCAGACTACATACATGGCAGATAGGTAGAGTA<text:line-break/>AAAGAAAAATTTAAGATAGCAGCATCTTCTCAATCTCAGGTTAATAACGAATTTAAAGAGATTAGTGTAG<text:line-break/>CTCAGTCTATAAACTTAGAAGATTCATTTAAAGAGCTTTCTAATGGAGATATAAAGGAAG<text:soft-page-break/>TAATAGGTAG<text:line-break/>TACGGAAAAAAATTTCAAAGAATTTGCTAGCGTATATCGAGATAATCAAGAAAAATTTTCGCTAAGCAAT<text:line-break/>TCAGAAGCAGCGTATCATGGGTTTCACTATGGAGCTTTAGCATTAAACTTTAAATATCGCTATGATCTTA<text:line-break/>ACTGTTACGCTGAACGTACCGCAGGTAATGGACGTGCAGATCTGATATTTATGTCACGTACGAGAAAAGG<text:line-break/>TACAAATGACAGGATGAACCCAAAACCTATTCCAGTAGTTGTTGAGTTTAAAGGAGAAGGTCATACTGCT<text:line-break/>GCTAATTGACTTTGGAAACCCCTAAACAGCCAATCTCGGTGTTTGTGAATGAAGGATTATCGTCATTTTC<text:line-break/>AGTGACTGTGTATGGACCATTTTTAGGCCGTGGAAATAACCTCAAAGTGACAACTGTACAAAATTATATT<text:line-break/>AAAAAAACGATTTAATTTCGTGTAAAAGTGTTGCCAGTTTAGACCTGTAAAATGGTTACTTGTAGCTTTT<text:line-break/>TAGGGTTCCGTACCCAAAGGGTAAAACGGGACCCTATTACTAAGACTTCGCTGTCCGTCTGTCCGTCTGT<text:line-break/>CCGTCTGTCCGTCTGTCTGTCTGTCTGTCACCAGGCTGTATCTCATGAACCGTGATAGCTAGATAGTTGA<text:line-break/>CATTTTCACAGAAGATGTATTTCCGTTGCCGCTATAACAACAAATACTAAAAACCGAATAAAGTTAATAT<text:line-break/>TTAAGGGGGGCTCCCATACAACAAACGTGATTTTTTATAGATAATGGTGCGGAACCCTTCGTGCGCGAGT<text:line-break/>CCGACTCGCACTTGGCCGGTTTTTATAAAATAACGTCGATAAATAACGTTTATACGACTAGAGGACGCCC<text:line-break/>GCGGCTTCGACGTGTAGAATAAGTTTCCCGCTACTCGCGCTATTTTAATCACTTAGGGGGTGAATTATGA<text:line-break/>AAAATCCTTTCTGTATATTAGAGAGATTGTATTGTAGTCACTGGCACTTCCTTATTATTCCTTCCTGGTC<text:line-break/>TTAGAAGAACCCCTTTTCATTTATTATACAGAAAGCAAAGTTTGTTTGCTACCTAGGTAGGTAATCGAAG<text:line-break/>TTAATAAAAAGATGTCATCTGTTATTATGGCCATTTATTTATTACTCCGTGTACTTAATATTGCCATGTA<text:line-break/>TGATTCTTCTTAGTTCCACATTTTTAGCATGCATATACACGTTTTTTTATAGTTAAATAAGTATTATACC<text:line-break/>GTATACTGGGGTTACTTTGGTTTGATTTGGGTCTTCTTCTCACTTCCTTACTTACTTCTTTGCAATTATC<text:line-break/>TTGAATTTCTAAAGTTACCAAATGAAATAAAGAAACACGTATCGGATCTTAATCTAATATTTGGAGAGTT<text:line-break/>CAAAATTTGGAAAAAGTTTTACTCTTTAAATGTAAAATTCCAACACCTAGTTTTGAATATTTATTATCAA<text:line-break/>GATATTGGTCACGTCAGTATTGAAAAGGTAATGGGACTTGATGATCTATCACCAAAATCTTTCGGTATTG<text:line-break/>TAACAGCTTTTACTGGCTCGGGAAAATAACTTCCGGATGACATCCGATTCCATAGTTTGTACAAATTATC<text:line-break/>TTTTAGATTCTCCTCAAACTTTGTTATCGAGACCTCATCTACACCTGCAGCACCTTTATTTTTCGATACT<text:line-break/>TGTTTATAAGCCCTACAAATAAGTTGCTTTGGTATATCAAAAGACTTTGTTTTATTCATTAACTCCTCCC<text:line-break/>TTTCGGTTGATACATAATTAAAACTAAATAACTCAGTCCCTTCGCTCCATTTCCATTACAGAAACTTCTT<text:line-break/>CACTACTACAAACTGATCCGCCCCTGTTTTCCGCATCGGTACTCTCATCCTCAGAGATC<text:soft-page-break/>TGCTCTTTGAA<text:line-break/>TTTCTTCCTTATCATCGAAACGACAGGTTCCCGTAGTTCCATGCAATAGCCTAAAATAGATTCACGCCAC<text:line-break/>TTTTATGCCGGACGCCACCTACCCAGTAAACAAGCTCCCGGTAGATTTATCCCAGATTAACGACTACCCC<text:line-break/>CTGGTTTTGACGTCGTCTCTACGCTTTCGACTTCATCAGTGGTTCACTTGCGTTCGTCTCTCTATTTCAC<text:line-break/>ACATGACACATAATTGTGCCTTTTCCATAACGCTCACTACCTTAGCTCTTTACCAAAGCAGCTTATGGCT<text:line-break/>GTTTGAAGCCTGCTCTTGCAAACCGGCTCCGAGGGGCCCTCCCTCATCTATTGCACAGCTTCAACACTTC<text:line-break/>CCGTGTTTCTACGGCGCACAATCATCACAGTAGAAAATTACACTAATAGACTTTTACGCGTTTTTATGCG<text:line-break/>GTATCTTACCATATTTTCTTTTCATGCACTGAAAGAGTTCGTTTGTTAAAGCTTTTTTGACATGTTGCTC<text:line-break/>TAATCCGTGTAATGCAACACAAGCTAGCAACGGTGAGATCGTCCCTCCTTTAATTGTACCACGTTTTGTG<text:line-break/>GATTGAAGCTTTCCATCTTCCATAATACCCGCTCCTAACCATCCTCTTATGATTTTCTTTAGCGTTGGTA<text:line-break/>TGGTGTTGAGTTTTTCAAGCAATGCATAGTCCCAAAATTGGGAGAAAAATCCTGGAGGTTCTGTCGCATC<text:line-break/>TATAAACCATAGAAAAGAAGATCATTAAAGTTGGGATTATAGGAGTTATAGAGCCATTAACATAGCAAAA<text:line-break/>TTCTCAAAAGTAGAAACATTGTCATTAGCTCCGATAATTTGTTTTTTCTGAATCATGCGAATATTTTCTA<text:line-break/>TACCTGTAATAGTAATCTTTGCGGAGTGCTGCAGACTTGTCTCTACTAACACACAAGAGGAAGTCTACAG<text:line-break/>TATTACCAATAGTGCTCTATATAAATAAACCCATTTACCGTTTAATTTAATGTAGGTCTCTCCAACTACT<text:line-break/>ACCAACCTGCTTCTTTCTTTTCCTTACTGCCTAATCTATCAGTGGTAATAAACCACTTTGTAACGTAGCA<text:line-break/>TGGTCAATTTTGCTCCCCTTATACTCATAATTTCTTCCAAATCTCGATAGCTCAAAGAGAATCGACATTT<text:line-break/>CATGTATACAGATAACATCGCTGAAAAGCTAAATCCTTTGAAATATGGCAATAATTTTTGATTGATACGA<text:line-break/>AACATCTTTGCTTTATTTTTAGACAATTATATCTTTCTTCTTTCTACTTCCCTACAAATGCGACAGAACC<text:line-break/>GAAAGAACTTGCTCTAGAAAGACAAAAAAAAGTGTTCAACATTGTATCGGGATTCCAGCGTCACGCACTG<text:line-break/>GAACAACAAGAAAAAACCGGCCAAGTGCGAGTCGGACTCGCGCACGAAGGGTTCCGTACTATTATCTATA<text:line-break/>AGATATCACGTTTGTTGTATGGGAGCCCCCCTTAAATATTAACTTTATTCGGTTTATAGTATTTGTTGTT<text:line-break/>ATAGCGGCAAGAGAAATACATCTTCTGTGAAAATTTCAACTGTCTAGATATCACGGTTCCTGAGATACAG<text:line-break/>CCTGGTGACAGACAGACAGACAGACGGACAGACGGACAGACGGACAGACGGACAGACGGACAGACGGACA<text:line-break/>GCGAAGTCTTAGTAATAGAGTCCCGTTTTACCCTTTGGGTACGGAACCCTAAAAAGGGTGCTGGCATGAC<text:line-break/>ATTAAATGATTTTCCTTATTTTAGCATTAAACGCGATGAAGAAAATCATTTATAATTGCTATAGCAACTA<text:line-break/>GTGTTGAAACCTGACGTACCTTTTGGCTTGACAAACGAGAGTTTTTATCTGATTTGACA<text:soft-page-break/>ACAAGGGCTTC<text:line-break/>TAGATGACTTTGAAAGTAAATATTACCATGCTTATCTTCGATAGCTTCTATTACCCCGTCATTGGCAAAT<text:line-break/>GCTGCAATTTTATATCCAAGTAGCTCTAGCCTTCTTCTATTCTCTGTAGTATTACTTACTGTACCTGAAT<text:line-break/>GAGCATTCGGAAAATAAGTTGAAAACCAGCCATTTTGATTAGGTAGTAAAAATCTAGCTACCACTTTTTC<text:line-break/>CAAACGACTACCTGGAACAATTTTTATCTGCTGAAGAGGCATATTCTCTTTTTGTGGATAGGATGCTGAT<text:line-break/>TTTAAATGATTCTTCTCATCATTAACAACATTTGTTATTTCAATTTCTTTTGCATGCATAATGTCTTGTA<text:line-break/>AACAACCGCATATGGCAAGCAAATGAATTGTAGGATTGTCATCTACTATTTTTACAATTGCTTCATTCAC<text:line-break/>AAGCTGGCGGTAAGGGTTAAAGAGCTGAATGAAAGTTATCTGAAATAAATATTCTGTTTATCTTTTGCTC<text:line-break/>TTTGATAAATTTTGCAACTTCAACTTTTATTCGATCTAGTATCAGCTTTTTTGCCAATATTTCATCTTGT<text:line-break/>TTTGCGAACTCTTCTTGGATTTCTTTTAGATTAATTATTTTGTCGTAGTCAATGAATATAGTTTTAACCC<text:line-break/>CAAAATTATTGAATATCTCATAGATATTTTGAGATTCATCTGTTTGCAATAAACCAACAATTATATTATA<text:line-break/>ATTTACTGCATTTTCTGCTGTCAAAGCAGATAATTCTTTGTTTACTTTTTCACTATAAGCGATATTACTT<text:line-break/>AATAGTAGAAATGTAATTAATAGTATATTAAATACTCTATTGTAACATTTATGCATTATTTCCTAAATAA<text:line-break/>TTATATTAATATTGTAATATATTATAGAACATTAAGAAAAAGAATGTGGCCTGAGCAGGAATCGAACCAG<text:line-break/>CGACACAAGGATTTTCAGTCCTTTGCTCTACCAACTGAGCTATCAGGCCAACTACGTACTTTTATTTTTA<text:line-break/>GACAAAAAACGTTATTATGTCCATCAAAAGTTTTTGAAGTATAGAAACAAAAAATGAACATTAATAACAA<text:line-break/>AATAGGAATTTATCCTGGTACGTTTGATCCTATAACTTTTGGGCACCTTGACACCAATAACACAAATATA<text:line-break/>AACCTATACATTTCTAGTCGACTATCGTATCAAGGCTGGCACAAGACACAATGTAAAGCAAGGTATAGTA<text:line-break/>CGCGGCACGAAAGTAAAACCTGCGCAGAAGTCGATTTATGGTGAAGGCGGGGCGCGGGGCAAGAAAACCT<text:line-break/>GCGCAGTAGCGGCCATGTTAGCGAAGATATTTCAAACCCGCCGCAAGCAACGCCGCGAGAAAATCATATT<text:line-break/>CATTTTTAATCAATTAAATGTTCTTCGTTGTAGTCGCTCAACTATCTAAATCGAGATACCTTATCGCCAC<text:line-break/>CCTTGAAATCGGTACCGTTGAGGAGTTCCATTGTCCATCTGTGGTCTTCATCATCAGTTCCGCTTCAGCA<text:line-break/>AATGGTTCTTTCTGAATGCAAATGCTGGAGTTGTCACTAAAAATACTAAAGTCGCTATATGTTTCCCTAC<text:line-break/>AATATTTGAGGAGTTCCCTCAATTCCTCACTGAATCCATCATCAGATCCTGGTTTCCTTACCATGGTACC<text:line-break/>ACCCTCGCGTTATCTTCTTTCCAACAGAAAAGGATTCATCGAAATTGGTTCATAAACGACGAAGTTATAC<text:line-break/>CCGAACACAATATATATAGAGCTCTAGGCCTCTTCTGGCTCTATTTTGTTTTTCATGTGTTTATTTATAA<text:line-break/>TTTTATTGAATTTTGTTCTATCTTTTGCACGATCCATCCAATCTTTCCCAATGATAGTTATT<text:soft-page-break/>ATGTCCTG<text:line-break/>TTCCCATCTCATTTTTGGTTTGCGAACTTTTCTTTTTCCCATGAGTGGTTTCCACGTTGTTACCAGGTTA<text:line-break/>GCCCATCTTTTTCCGCTCATCCTCGCGACATGTCCTGCCCATTGAAGTTTCATCCTGATTGTGTGTTCAA<text:line-break/>CTGCATCTATTTCTTTGGTTCTTCTTCTTATTTCTGTTGCTTTCACTCTATCTCTTATTTTTATACCAAG<text:line-break/>CATGCTTCTTTCAATAGATCTTTGGCACACATTGATCTTATGTACCAAGTTTTTTGTGAGACTCCAACTC<text:line-break/>TGGCAGCCGTAAGTGAGGCATGGTAATATGCAGCTGTCGAACGCTTTTTTCTTTAGCCTTAAGGGAATCT<text:line-break/>TGGCCTTGAAGATGTTTTTCATTGCCCAGTACTTACTCCATGTCAAGGCGATTCTCCGTTCAATTTCTTT<text:line-break/>TTGAGTGCACTCATTGAATGATATTAATTTCCCCAAATATATGTATTCTGTGACATATTCAAGTGTGGCG<text:line-break/>TTTCCTATTCTGACTGGTATTTTGGAATGATTTGTCATTACTTTTGTCTTAGTATCACTCATTTCCAGGC<text:line-break/>CTATTTTTCGGCTTTCTTGATCTAACTCTTGTAGGAGGAGTGATAGTTCTTTCGCACTTGACGCGAAGAT<text:line-break/>TACCAGGTCATCAGCAAATCTTAAGTTTGATAGATATTAACTTCTTATACATACACCTTTTCTTCTTTCT<text:line-break/>ACCCAGTTGAGTTTCTTGAAGATGGATTCTAGTATTGAGAGAAATAGTTTTGGTGACATGGGGTCTCCTT<text:line-break/>GTCTGACTCCGCGCTTTATGCTAAACTTTTCACCCATTTTGTCAGTTTTTACTCTTGCTGTGCCATGCTT<text:line-break/>GTATATCGCTTTTATTATGTCTATATATTCCTGATTTACATTATGTTCCTTAAGTGAGTCCCATATAGAG<text:line-break/>CTGTGTGATATGCAATCAAAAGCTTTTTTATAGTCGACAAAGCAGATGTATAAAGGTATTTGGAATTCAT<text:line-break/>TATGTTTTTCTATTATTTGACTCACTGTGTGTATGTGATCGATTGTTGAGAACTTCGACATAAATCCGGC<text:line-break/>TTGTTCTGGTGGTTGGTTTTCATCTATTTGTGGTGTTATGCGGTTTAGTAGAGCTGTGGAGAATATTTTA<text:line-break/>TAGATGTTGGACATAATGCTGATGGGTCTATAGTTAGAAATATCTCCAGGGTTTCCTTTCTTATAAATTA<text:line-break/>GTGAAATGTGTGCTTCAGTCCATTGATAAGGTATGATTTTTGTATCTACAATTTTGTTGAATATGATAGT<text:line-break/>AAGTGGTATTACTAGCTCGTTCATGAATGTTTTAATGGTTTCGTTTTTTATTTTGTCAGGTCCTGGACTT<text:line-break/>CTGTCTTTTTTCAGGTTTTTAATTACTTGCTCTATTTCTTGTGGTTCAAATAGCTTTATCTTTTCCTGTG<text:line-break/>TGTTTGTGTTGCTTTTTGATCCCTCTATCTGTTCTATATACTGTAGGTTGTATAGTTCTCTGTAAAATTC<text:line-break/>TGTTGCAATATTTATAATTTCTCTTCGGTTGGTTTTCTCTTCTTGTGTTTTGTTATTCAGATGGGACATT<text:line-break/>ATGCTTTTTTCAGTTTGTAGTATTTTCTGAGCTTTCTTTACAGCTCCATGCTTTTCTAAGTTGTCGATAA<text:line-break/>TAATTTTTAGCTTGTAGTTCTTCATATCCCTTTTTATCTTAAACTTTATTTTTGTACATAATTTTGCAAG<text:line-break/>TTCTTTTTTCTGTATTATTGTTTTTCTACTGAGATTTCTAAGCTTTTGTCTTTCTTTTAGAAGTAGCTCA<text:line-break/>GTTTCTTTCGATATCCTGTGGTCTCTACTTTGTTGCTTCTTTTCTTTTTCAATCAGGGTG<text:soft-page-break/>GAAAAAAGGG<text:line-break/>TTTGTTCCAGTTTGTTGTATATTTCCTGTACACTGTATTTTTCTTGATCTGATATTATATTCTTCATTTG<text:line-break/>GTTGTTTAGGGTTACAGTTGTTTCTGGTGTTGTGTCTTGTAAGGTTGTAATTAGTTTTTTGGTTATATGT<text:line-break/>CTTCTTGATATTTGATTATTTTTTATTACTAGGGTGGTTCTAATCATACGGTGGTCGCTGTTATGCTGCA<text:line-break/>GACTGTTAAGAACTTCGCAATTTGTAAACAGATGTTTGAAATTTGTTAGAGCGTAATCAATTTCGTTTTT<text:line-break/>TACTCTTTCTCCTGGTGATGCCCAAGTCCATCTTCTATTTGCCTTTTTTCTGAACATTGTATTTAGAATT<text:line-break/>GCTAGTTTATTCTCAAGAGAGAAGTTGACAAGTTTTTCGCCTCTAGGGCTTCTCTTTCCGTATCCAAATT<text:line-break/>GTCCTAGGGATATTCTTTCCTCGGTGTTTGGTTGTCCCACTTGTGCATTGAAGTCTCCTAGGATTAACAC<text:line-break/>ATTTTTGTGACTCTTCTCTAGAGCATCCACTATGTTCATATAAAATTATTCAATTTCTGCATCAGGGCTT<text:line-break/>TTTTCCATAGGTGCATATGCCTGAATAACGGTAAATTTGAAAGTTTGATCTTCCATGTTAAAATCTATAG<text:line-break/>ACCGACCGTTTAAATGAGTCCTCGCCCGCGCGGTACAGGGACGCGGGGGTATGACGACAGGGGGGACCGC<text:line-break/>GGGAGGAGCGGGCGGCAGGCGCATTCTTGCCGTTGCTCATTTCGCTAGCCACGCGGCTAGCGATCACTTG<text:line-break/>TGTTGTCAGTTGCGGTCGCTTTGTGAGATATGCACATGATATTATATTTCTCAAGATGAGTCTGGCGATT<text:line-break/>TTCGGACACAAACTTAATAGTCAAACCAAACAAATGGCTTTTAACCTATACGAATATTTTCGGAAAAAGA<text:line-break/>AATTGGACCCAAATTCTGTTGAAATTCTATACTTACTTACTTATATTATTATATACTTATATTCTTGTAA<text:line-break/>ATAAAAGTACAAACCGTCTACCTACCTACTGTTTCATTTTGTTACATTAGTATGTAGCTTTTTCAATTAA<text:line-break/>ATTGTCGTTAAGTATAAATTATATTTTTTCATTAAAAATGAATAACCATCCGTTAACCGTTATGACGTCA<text:line-break/>CATATCTCAAGAACTATCCAGTGCACAAATCACCTCTTGTGTATTACACTATGCGCGTCTGCCGCCTACC<text:line-break/>CCGCTCTCGGTCCCCTCTGTCGTCATACCCCCGCGCCCCTGTACCGCGCGGGCGAGGACTCAGTTATCCG<text:line-break/>GTCTACCTATAGTGAGCAGAGTCTTTCCGAGTACTTTTTGAAGTCCTCTACAAATTTATTTATGTGCGGT<text:line-break/>TTAACCATAAAACCCACTCCTCTGTATCCTTTTTTCTCTCCGTATGTATATAGAGTGTAGTCTTTCCTTT<text:line-break/>GTTCTATTTTGTAGCCTTGCCTTCTTGTTTCAGTAAGGCCTATTATGTCCCACTTTATTCTTTGTGTAGC<text:line-break/>TATTTCTAGCTCGGCTAATTGTTCCTCTTTGTTTAGTGATCGTGCATTGTATATGTTAATAAATATTTTG<text:line-break/>TTGTTATTTCTTTCGGTTTTCTTCTTTGCCAGAAGGTTGTGGTCTTTTTCCCCCTCTGTGACCAGCAGTG<text:line-break/>TTGGGGGAGTTTTAGTTGTTGTTTGGAGTGTTGTTGGTGTTCTGCAGTTTAATGTTGCAATATATGTTAC<text:line-break/>ATTTTTGTTTTTTTGTTGTACATTTTGTTCGGTTTCAGTTTGTTGTTTTGTTTCTTTTGGTATTCCAGTT<text:line-break/>TCCGTTGTTGTAGTATTATGAGTATTGTTTGCAATAGGAGTAGTACTAGTTTGTCTTGAT<text:soft-page-break/>GTGAATATTT<text:line-break/>CCTTTAGTTGCTATGGAGTTTGGTTTTCTTGGTTCGTAATTGACCTGGGTCTCATGTTGGAGAATGTATC<text:line-break/>TGGTTTGTTTATTTTCTTTGGTTGGCTTAGGTTGGTGGCTTCGCGTCCGCGACTGGCAGCTTGAGATTTA<text:line-break/>GCCGACATAGGTGATATGGTTGGTAATCGTTTTCGTTTCTCATTTGTGGTTTCCTTCACTATGAGTCGAT<text:line-break/>CATATTGAATATGAGCTATCTTCCCTTTGTGGCGCTCTTCTTTTAATTGTGCAATTAGTTCTTTCCTTTT<text:line-break/>TCTCAACACCTCTTTCGGGAAATCTTCGGTCGCGTAGATGCCCTTTGGGAAGTTCTTGTTATTTTTAAGA<text:line-break/>ATTTCTATTTTCCTCCACGCTAAGGTGAGTGAAATGAGAATTGGTCTGGTTTTGCCAGTGCACGATATTC<text:line-break/>CTAGTCGTCGGACATTACTAACTTCCCATTTATCAAACGACTCTAGGGAAGAATTTTTACTAAGTACATT<text:line-break/>GAGGTTTTTCAAAATAAGTTCAAGAAGTTGAGTAAAGTTTGTTTCATTTTCCTCTATGCCAAACAAAATT<text:line-break/>AAGTTATTCTTCCTTAGTTCTCTATCTAATGCGTTTACTTTTGATTTTAGTGTCTGTACTTCGTTTTTCA<text:line-break/>TTTGGTGGTTTTCTTCCAGAAGAGATCCAAGTTTTTCATCAATAGCCTTGTTTATGTGATCCGTTAATTT<text:line-break/>CTCTGTGACTTTTTCCGTGACAGATTCTGTTATTATTACAGTTTGCTTCCTCATTTCTTCTCTGAGGGTC<text:line-break/>TCTAATACCATTTTTAATTGTTGATCCATTGTATTGCTATTTTCCTCAGTGTATATATTTTTCTTTAAAA<text:line-break/>AACTACTATTTAGTAGTACTTCTCTACCACTGGCCACACTTTAGTGCTGGCAATCCCTGCAGTGAGTGGT<text:line-break/>TATAGTCACAAAACGTTTTATTTATTGCAGCAACACTGGCACCTGTCAACAGAAGCCGTTAGTTTTTTTT<text:line-break/>TTTTGTAGTTAGGGTGGGTACTTTTAACTTCGACGTGAGCGTTATCAGTTTGTTTTAAGCACTTTCTAGT<text:line-break/>CTTTTGCACATATTGAACTTAATATTTCAATGTTATTTACTTCACTTATATTGTTGGGCACACTCTGGTA<text:line-break/>GAAGTTTTATAGTGAAACACTTAGTTATTACAGTAATTCACTTTGAAAATCGCGGACACAAATTACGACA<text:line-break/>CTCCTTGCTTGTCAACTGTCAGAACAGAACTGACCTCAATTCCTCACTGAATCCATCATCAGATCCTGGT<text:line-break/>TTTCTTACCATGGTACCACCCTCGCGTTATCTTCTTTCCAACAGAAAAGGATTCATCGAAATTGGTTCAT<text:line-break/>AAACGACGAAGTTATACCCGAACACAATATATATATATATATAAGCCTATTTTCCAGTTTCCTGGGGAGC<text:line-break/>TTTGGAGCTCTAGGCCTCTTCTGGCTCTATTTTGTATATATATATATATTTCTTATATATATATATATAT<text:line-break/>ATATATATATATATATATATTTCTTTTTTGAAGTCGTTTAAAAATGATAATGAACTGAACGGTTGATCGA<text:line-break/>GGTGTGGTGTTTGGCATGAGGTGTTGGACAAAGGATATGTGGCATAGAGAAATAATTTTTGCCACACAGT<text:line-break/>TTCAGATTATATGTTAAATAGTGAAGAATTAATCGAAGAACCACAGGCAGAATGCACTAAAAAAGTGGAA<text:line-break/>AAAACAAAAGAAACTTTTGAAGAAAGTGCAACCATTTTGGAAGGAGGAAAAATTACTGTTGTTAATTTTA<text:line-break/>CATCTAACTATACATATATTTTTTTGGAAAACGCCCAGACGCTAGCAGTACCTACAAGAA<text:soft-page-break/>ATACTAGTTG<text:line-break/>GACGTTAACAACCCAGAGCTAAACTAGAATGGAGGGTGGAAAGAGAACTGGTGGGAGGAAGAAAGGGGGC<text:line-break/>CAATCAGAGGGCTTAGACGTTAAGCATCTTGCATTACGCTTACGCTAAAGATTTTCAAAAATTGACAAAA<text:line-break/>TATATAGGATTGACGTAAACTAACGCGTCTATCTATCACGTGGGCTGCTTAATGTAAATTGCATACACTT<text:line-break/>TATCAGTTTTCGAAAATCGTCAGACTGCAATGCTTTTACTAGTTAAACGATTCTTACAGCCATTACGCAC<text:line-break/>TGTCGACTGGTCACTGGCGACTCAGTCTCTCGGTGACCAATACAGGCAGGCAACAGACGACCAAGTGCGT<text:line-break/>AAACACCTATATATAAACTATAATAAAGTTAACCCTGCGGATTAAGGTGGATGGAATGCCTCAATATTAG<text:line-break/>TAATTTCACCAGTTGTTCTATCCCCACACAATGGAAAAAACAATGCTAATACAGTGGTAGGTTTAAGGAT<text:line-break/>AACATGGTGATAGCAATCTGAACAGACCTTGAACAAAGAGTCCCACCACAACTAATCCCTACAACCTGCA<text:line-break/>TCTACCTCCATCCCTAGTTCTTCCAACAAAAATTAAATGCTTGAGCTATTGTAGAACACAAATGTTGCTT<text:line-break/>CTGCAGTATCAGAACTGAAGAGTATAACTGGAACTTTATAAATTTATTATTATTATTATTATTATTATTA<text:line-break/>TTTATTACAATACACTAGCAGCTCTTTGAGCTGATGCGTGTATATCACTGCACTTGTGTCTATAATTTTG<text:line-break/>TTAAGAAATTATCAAGTCTATTTTTAAAGGAGTTCACTGAGGGTGCACTAATAACAGTTTCTGGTAAAGT<text:line-break/>GTTCCACAGTTTCACCACGCGGTTTGACAAAAAGTGTCTCCTAGGGTTGCTAGCACACAGAGGCTTGACT<text:line-break/>AGTTTCATGGAGTGCCTTCTTAACCTTGTGTCCTGGCTTAATGTGTACATGTTCTTCAAATTAGCAATGT<text:line-break/>TATAGTGCCCATTCAATATTTTATATGTCTCTATAAGATCCCCTCGTTTTCTTCTCTCCTCCAGTGTTGT<text:line-break/>CAATTTTAGTTCCAATAGGCGTTCTTCATAGGGTCTATCTTTCAATGCGGCGACCATTTTAGTTGCTCTT<text:line-break/>CGCTGGACTTTCTCCAGTAATTCAATATCCTTCTTAAAATAGGGGCACCATATTTGAAAGGCATACTCAA<text:line-break/>GTAAAGGCCGAATGTAAGCTTTATACATTTTTACAAACAAGTCCTTAGTGATGACATGGAATGCTTTTCT<text:line-break/>GATCATATACAGCATGGAGTTGGCCTTCTTAGTCACGTTTGTAATGTGCGTGTCCCACTTAAGGTTCTGG<text:line-break/>GTGATGGTGACGCCAAGATCTTTTTGTGTGTCAACAACCTGAAGTGGAACGGAGTCAATTGTATATTTAA<text:line-break/>GCTTAGGGTTTGTTTTTCCTATGTGTAGGACAGTGCACTTGGTCGCATTAAGGGAGATCAGCCAGTTCTT<text:line-break/>AGTCCACTGCATAATGCGGTCTAAATCCTTCTGAATAATGTTATGAGTAACTAAAGGGTTACCCATTACT<text:line-break/>TTAGTGTCGTCAGCAAATATTGAGAGATCAGACTGTATTACACTCTTCAGATCAGTTATAAAAATGCCAA<text:line-break/>ACAGAATTGGTCCGAGTACTGACCCTTGCGGAACCCCACTGTGGACATTATAAGCATCGGATAAAGATTC<text:line-break/>ACCCACTCTTACCTTAAATTTTCTGTTGGACAGGAAGTCCGAAATCCATTCTAGGAGTTGACCCCGGATC<text:line-break/>CCAAAGTGCTCTAATTTGGCAATGAGCCTCTTAATGGGTACGCGGTCAAATGCTTTCTC<text:soft-page-break/>ATAATCTAAGT<text:line-break/>AAATGACGTCTGTAGGCTGGCGGTTATCCCAACTATTTGTCCATTTATCAAGGCACATAACAAGATTAGT<text:line-break/>AACTGTAGATCTTTTAGGTACGAAGCCATGCTGTTCCTCGATTATAATATTCTCTTTGTTTATGAAACTT<text:line-break/>CTTAGTTCGGTTACTATAATTTTTTCCATAGTTTTGCAAACTATACTTGTAAGTCTAATGGGGCGATAGT<text:line-break/>TAGCAGCAACAAATTTATCCCCTTTTTTATATATTGGGGTAACGTGAGCTTCCTTCCAGTCTTGTGGTAA<text:line-break/>CTTTCCACTCTTTAGAGATAAATTCATTAGACACGCCAGGTCATGATTTAGCACACTATTACACTGTTTT<text:line-break/>AAAAACAAGGATGGCAGAGAATCTGGACCCATAGAAGTAGAATCACTGAAAGTTAACAATGCCTTAGACA<text:line-break/>CATTCTCTGGTGTAAAGATTAAAGATTCTATTGAACTCTCTATACGTGGCATCTGAACATCGGGAATAAT<text:line-break/>AGCCTGTGCTGGTTCACGAACAAAGGATTTCTCAAATTGGTGTGCAAAAATTTCAGCTACATTTTTCGGG<text:line-break/>TCATTGATTATGTTTCCACTATCATCCCTTAGTGAAGGGGGCACAGATACCGTAGAAGATAACTGCTTAC<text:line-break/>GTACGTAAGAGTAAAATGATTTGTGACCGTAATTCACAACTCCAGCCTCAAACTCTGCGCGCGATTTTCT<text:line-break/>AACTAGGGTCAAGAGTTTATTATTTACTATTCTATAAGCCCTATATGACTGTTCAGAGCCATTTAATATA<text:line-break/>TATTCTCTCCACAGCGACATTTTCCTTTTAACCATTTCTAATACTTGCTTAGTGACCCATGGTTTATTGA<text:line-break/>TATTGCGATTTTTATTCTTTTTTATTAATGGTACACAAGTTTCGATAGCATCATGGGTTTTTGTCATAAA<text:line-break/>TCGCTCCCACACAATATCAACGCCAACTGCGTCCATGCAGTATTGTTTGTTTGCTGACAACTTTTTAATG<text:line-break/>ATTTCTTGAAAATCGGCTTTAAAGAAATTCCTCCTGAGTGGTTGTGCACAAGCATTGCTGTCTAATCTCA<text:line-break/>ATTCGATCTGTAATGTTGCCAAGAGTACCAGATGATCACTCTTTCCTATGTTAGGATAATGTTCGACTTT<text:line-break/>AGTGCATAGATTCTCTTCATTGCACATAATTAAATCAAGTAAAGATTCTTCACTATTCCGCTTCCTTGTG<text:line-break/>ACTTTAGTCACTAGTTGGATAAGGTTACTGTTTATATACATATCAATAAACTTAGCATGTAGTGTGTTGT<text:line-break/>AATTGTTGATATCAACATCTTTTAAAGGCCATTTTAAGTTTGGTAGGTTGAAATCTCCCATTATTAATAA<text:line-break/>TGGATCTTTATTCATAGCTGCTTTCTCAATCGTTTCAAATAATATCCTATCTGACTCTTCAAACGTATAA<text:line-break/>TGAGTAGGACGATAAATTCCCGCAATAGTTATTTTATAATTCTCATATTTCAAGTTTAACCACAATGCCT<text:line-break/>CGATTTGAGAGTGAGCGTTGTAACATATACAACCTGCATCTACCTCCATCCCTAGTTCTTCCAACAAAAA<text:line-break/>TTAAATGCTTGAGCTATTGTAGAACACAAATGTTGCTTCTGCAGTATCAGAACTGAAGAGTATAACTGGA<text:line-break/>ACTTTATAAATTTAAAGAAAAGTTTAACATGAAAACAATTACCAAACTCTGCGGTTTGTGGTTTGTCCCT<text:line-break/>GTACAGCTTTCTTAAAGTGTGATTTGCAGAACTCTAGGTCTCCATAAAGCTCTGTAAGGGCTCAGACAAA<text:line-break/>GAACAGTATTATTACCAATCTTTTTTTTTATACTAATACGAAAAACCAGGGTTTGCTCAGT<text:soft-page-break/>GCTTTAAAA<text:line-break/>GGGTAGCTAGAAAAATTTGAGACTAAAAAAACATATTAATATATGTAGACATAGGAATAAAAATCCATTA<text:line-break/>CAAAGGAGATAACATCCAATTTACTTTGTTGTCATGACTCAAAATCAAATTACAAAATTTATTGTATAAA<text:line-break/>CCTGTAAGTCTACAGCATAAAATAACCAACCCCCCCCCCTATTTAACCCTTTGAACGCCAAGAACCACTA<text:line-break/>AAGTGGTTGTGTACCGTCATGCCTACCACGCCATCGACCATTTTAGTGGTCACAGATACAGTGCAAAATA<text:line-break/>GACCTGAGTACTTGTGACGTAAGGTTGACATTAGCTGTGGTTTTTAGCCGTCATTGGCGTGTGAGGACAA<text:line-break/>CGTTTGTATCAAGTCCAAAGCGTTCAAAGGGTTAATTAATATTTGGTTTACATTACGCATTGGATGTACA<text:line-break/>ATGAAAAGGAAAGTGGAAACCGTCAGAATATTTAATCAGGAGGTTAGTAAAATTGGCCCTAATTCTGATA<text:line-break/>TAAAATTTTACTAATAAGAACAGGTACAACAATTTTAATGATTTAATTAAATGGAACTGTCAGTGTCATT<text:line-break/>AGGAAAACTCATTTTCAACTAGAGCAAATTATGTCACCCAGGTTATTAACTATACAGGGTGGAAAGTTGA<text:line-break/>GATGGGGCATTAAGGGCAGCTACCAGATCCCTTGCTGCCATGCGAAAATGATCTTAGAAGACCTTTCCCA<text:line-break/>ACTTTTTGAGTGAAGACAATCGACATTCACCGATTTTTGTTAAAATGTACAGTCAGCGAGAAAATCGTCA<text:line-break/>GAATTGAGTAATTTTTTTTTAAATGCCAATCGATCCCATTCCCATAAAGGATTAAAACACTCTTTGAGAC<text:line-break/>CAACTGAGGTTAGATTACTAGAACACCCATAAATCAAAGAAAACGTTTAAATATAAAGACTAGAGAAAGT<text:line-break/>ATCAGAAATCTTAGGTTGTTATATAAAATAATTATCTTGTCCTACCTGCCAGAGGAAGAAGATGAAGAGC<text:line-break/>TGCCATCAGATGACGAAGAGGAGACGCTGGAGGAACTAGAACTTCGTGAAGAAGAGGAGCTCGAGACGGG<text:line-break/>TTTCTTTTTCTCTTTTCGCATGTCTTTGCCAGAGTCCATCTTCAGCTGCAACTCGAGCTCCCGCTGAAGC<text:line-break/>TGCTGCCGTCTTTTCTCCAGCACGTCCGTGTCGGCGTATTCTAGGTCATTTTGATCCCAGTTGTCAATTT<text:line-break/>CACCATCCGGACTACGGCCCGACCTCACAACGACTGTGGAATGTAACCTGTTTTTACCATCATCTTTAAC<text:line-break/>TAATCGTTTCTGTTCTCCGTCTTTATTAGCTGCTCGTTGCTTTGAGGGGCTAATCAACGTGTGAGTGGCA<text:line-break/>GCAAATTTACAGCTTTTACCGTAAGCGCAACTTCCGTGTTGTGCCCACTGTCTGCAATGTTCAGTTGTTT<text:line-break/>TTTTTACACTAGAGGTTTTCTTAGTTCCGAGACGCTCAAATACACTAGGTCTGTTGGCTAAGTCTTTCGT<text:line-break/>TTTCGGAATCTCGACAGTGTTTTTTTTTTTTTTTTTTTTTTCATTTGTTCTTTCGAACAGGCTAGGGCTA<text:line-break/>AAAGCCATGCTGCCTCATCTTCAGTAACTCCTTTTCATGATCATCAACTAATGAGAAGTAATATTCCTTG<text:line-break/>TAAAAGTCTTGAGTAGATATATACTTTGAGAAGTAAAAACCAATTTAAAAGTCTTCAGTTATATTAATAT<text:line-break/>ATAATTATAGGCAAATCCAGTATTAAAGTCTTCAGTTGTTTCTATACGTATAGTCAAATCCGGTGTTAAA<text:line-break/>GTCTTCAGTGTTTTATTTTTATTTTATCGAGTCGTGCAGTAAGTCAAATCCAATAGGAGC<text:soft-page-break/>ATGCTCCTCG<text:line-break/>TAAACATTTTAAAAAAATGCAGTCAATCAAAATCCAAAATCCTGTACTCATCACAGATCAAAGTCTGCGG<text:line-break/>TATTCACAAAATATATACAAACATATCAGTATTATTTACAACATTATACTATATTCTATATTTCTCCTAC<text:line-break/>AGTACTAACAATGAATTTATACAAAGGCATGTATGTACAATTATTTACAAGAAGTTTTATAATGTCACGC<text:line-break/>GGGACCAAATCAGACTCATAAATTTGAGTAAGTTCATCCAACAACACAAGGCGCTGAATGCCGAAGGATG<text:line-break/>AACAATCGAAGATGATGTGCGAAATGGTTTCTTCATGAGTATTGCAATGAGAGCAGATAGAGCTATCAAC<text:line-break/>CATTTTTAGACGGTGTAAATGGAAATTCAACCGGCAATGACCGAAACGAAGGCGTAAAATAGTCGAGTAG<text:line-break/>AATTTTCTATTTATGTAATAGTTACTTTTGCAAAACCATGGCTTACTATTGATCTTAACATTAAAAGGAG<text:line-break/>CATACCAGAGTCCCTTATTTTCCACTTGTATAGTATAATTCCAGTGCGTTTTCCATTTTGTAGTCATTCT<text:line-break/>TTGTTTTAGGATATGAAACAGATCTGTATAAGGAATCGGGACATTAAAGCAACTAGTTTCAGAATGTGAT<text:line-break/>GAATTAATTGATTTTGCTAGATAATCTGCTTTTTCATTCCCTACGACACCTTTGTGAGACGGAACCCACA<text:line-break/>TGAAACTTACTAAAATTTTATCGATAACAACAAGATCATACCATAACTGCTTAATGTCAAAGATTAAGTA<text:line-break/>ATTTGTTTTAGCATGCAGTTTATGATTATCCAAATTTAATAGTACGCTCATGGAATCACTAACAATAAGC<text:line-break/>CATTTTTTAAATCCTTGATTCTGATGCTTAATATGTTTTAAAGCTGCAAGAATGGCCACTGCTTCAGCTG<text:line-break/>TAAATATACTACAATTTTTATCTAATTTATAACCCAAACCTTTATTTAAAGTAATATCAAAAATAGCAAA<text:line-break/>AGAGACATTAGAGTCCATTTTAGACCCATCTGTATAAATCAAACGATGATCATTCCATTTAGATAGACTG<text:line-break/>CAATTAACTTCCTCTTTAGACGTTAGTTTATTGTCAATAGCAATTTTCATCGCAGGAAATTTACTTTCAA<text:line-break/>AACTGCCTTTGTAACATGGCAACACCCAAGAAGACGGCTTGTAAATATTGGAACTGCCAAAGAGAGTTAA<text:line-break/>TAATTCAGTTAAATTCTGAAGAACATATAAAGGATTTCGAGACGGTACACGTGACAGTGCAATTAAATTG<text:line-break/>GACATTAGCTGATTATTAGACGAAAACAATTTTAAGACAAGTTTCTCCTTTAAATAACTGAATCTGATAG<text:line-break/>ACAACGGAGGAAGGTTACATTCAACTTGCATGACATTTATAGGTGTGCTTTTAAAAGCACCAGTTATTAG<text:line-break/>ACGCATACTTTTATTTTGGATTTTATCTAAGATATATACAAGTTTACTGTCACCAGCAAAACATAAGTAA<text:line-break/>CCATACTCAAAATGACTTCGAATCATT</text:p>
      <text:p text:style-name="P15"/>
      <text:p text:style-name="P18">&gt;OZ375456.1</text:p>
      <text:p text:style-name="P18">VPKATAKTKHIKHKPELIELLLTEPINLGNDKGNPILAVDKEKPVGFAEKFSLFFSETPDIGSTSDPEFFIHGILGSVLILPESGLVEKLGIDKVYVKHTEVGVQDSRKKGKANVVKLCFSLKKDGKKQVALRVFTNDGITGGRNPEDKYRYSDDE</text:p>
      <text:p text:style-name="P18"/>
      <text:p text:style-name="P19"/>
      <text:p text:style-name="P19"/>
      <text:p text:style-name="P20"><text:soft-page-break/>&gt;OZ375456.1<text:span text:style-name="T18"> (sortie translate) <text:s/></text:span><text:span text:style-name="T19">sortie 2 reverse</text:span></text:p>
      <text:p text:style-name="P19">VPKATAKTKHIKHKPELIELLLTEPINLGNDKGNPILAVDKEKPVGFAEKFSLFFSETPDIGSTSDPEFFIHGILGSVLILPESGLVEKLGIDKVYVKHTEVGVQDSRKKGKANVVKLCFSLKKDGKKQVALRVFTNDGITGGRNPEDKYRYSDDE</text:p>
      <text:p text:style-name="P21"/>
      <text:p text:style-name="P21"><text:span text:style-name="T20">DEHVFRICTEGEPGNKSFRLHTWQIGRVKEKFKIAASSQSQVNNEFKEISVAQSINLEDSFKELSNGDIKEVIGSTEKNFKEFASVYRDNQEKFSLSNSEAAYHGFHYGALALNFKYRYDLNCYAERTAGNGRADLIF</text:span><text:span text:style-name="T21">M</text:span><text:span text:style-name="T22">SRTRKGTNDR</text:span><text:span text:style-name="T21">M</text:span><text:span text:style-name="T22">NPKPIPVVVEFKGEGH</text:span> </text:p>
      <text:p text:style-name="P21"/>
      <text:p text:style-name="P20">&gt;OZ403987.1 <text:span text:style-name="T19">sortie 1 forward</text:span></text:p>
      <text:p text:style-name="P20">DEHVFRICTEGEPGNKSFRLHTWQIGRVKEKFKIAASSQSQVNNEFKEISVAQSINLEDSFKELSNGDIKEVIGSTEKNFKEFASVYRDNQEKFSLSNSEAAYHGFHYGALALNFKYRYDLNCYAERTAGNGRADLIFMSRTRKGTNDRMNPKPIPVVVEFKGEGH</text:p>
      <text:p text:style-name="P20"/>
      <text:p text:style-name="P22">&gt; OZ375492.1</text:p>
      <text:p text:style-name="P20"><text:span text:style-name="T21">M</text:span><text:span text:style-name="T22">TNELAYNFLYNTNEFEKQCQRVLNRTPHEKNAGTVDFWIHFFSSIGVTIQNTELNNDKTHINDIALSISHDSTTKILKFAFKVNNNVEDKVILRSISIGEDDNVPNNIQYSKKDIQKIETLFWEKTTESTIDSANVDSQALHLNIKTSKIKLQNNSYKNTSSNDKFVKVQPLQE</text:span><text:span text:style-name="T21">M</text:span><text:span text:style-name="T22">QEGTNSNVLLDK</text:span><text:span text:style-name="T21">M</text:span><text:span text:style-name="T22">LDLIAIPEPPKKDQEIFVNNVKAFYQQLINLYNTNQQQVLLNSEVAYHGFIYGVLALNYKNKYAVDIYVEQSAGRGFLDLYFLLRKDAEGHNILNFKNQILISPPPLPPKK</text:span><text:span text:style-name="T23">-</text:span><text:span text:style-name="T24">I</text:span><text:span text:style-name="T23">YGRVNKFYLKASLPELLFLPFLQCQIRI-</text:span><text:span text:style-name="T24">R</text:span><text:span text:style-name="T23">NFFNQCSNN-</text:span><text:span text:style-name="T24">K</text:span><text:span text:style-name="T23">FGILKKA</text:span> </text:p>
      <text:p text:style-name="P20"/>
      <text:p text:style-name="P20">&gt; OZ375492.1</text:p>
      <text:p text:style-name="P20">MTNELAYNFLYNTNEFEKQCQRVLNRTPHEKNAGTVDFWIHFFSSIGVTIQNTELNNDKTHINDIALSISHDSTTKILKFAFKVNNNVEDKVILRSISIGEDDNVPNNIQYSKKDIQKIETLFWEKTTESTIDSANVDSQALHLNIKTSKIKLQNNSYKNTSSNDKFVKVQPLQEMQEGTNSNVLLDKMLDLIAIPEPPKKDQEIFVNNVKAFYQQLINLYNTNQQQVLLNSEVAYHGFIYGVLALNYKNKYAVDIYVEQSAGRGFLDLYFLLRKDAEGHNILNFKNQILISPPPLPPKKIYGRVNKFYLKASLPELLFLPFLQCQIRIRNFFNQCSNNKFGILKK<text:span text:style-name="T25">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11:14:52.178265000</meta:creation-date>
    <dc:date>2026-03-06T17:01:37.870512500</dc:date>
    <meta:editing-duration>PT18H47M22S</meta:editing-duration>
    <meta:editing-cycles>38</meta:editing-cycles>
    <meta:generator>LibreOffice/25.8.4.2$Windows_X86_64 LibreOffice_project/290daaa01b999472f0c7a3890eb6a550fd74c6df</meta:generator>
    <meta:document-statistic meta:table-count="0" meta:image-count="0" meta:object-count="0" meta:page-count="99" meta:paragraph-count="314" meta:word-count="2536" meta:character-count="220095" meta:non-whitespace-character-count="217868"/>
  </office:meta>
</office:document-meta>
</file>