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style:font-name="Arial1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Standard">
      <style:text-properties style:font-name="Arial1" fo:font-size="11pt" style:font-size-asian="11pt" style:font-size-complex="11pt"/>
    </style:style>
    <style:style style:name="P8" style:family="paragraph" style:parent-style-name="Standard">
      <style:text-properties style:font-name="Arial1" fo:font-size="11pt" officeooo:paragraph-rsid="0006d98f" style:font-size-asian="11pt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rsid="0015c9c6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rsid="001b7fbb" style:text-blinking="false" fo:background-color="transparent" loext:char-shading-value="0"/>
    </style:style>
    <style:style style:name="T4" style:family="text">
      <style:text-properties officeooo:rsid="0015c9c6"/>
    </style:style>
    <style:style style:name="T5" style:family="text">
      <style:text-properties officeooo:rsid="001d224c"/>
    </style:style>
    <style:style style:name="T6" style:family="text">
      <style:text-properties officeooo:rsid="00169315"/>
    </style:style>
    <style:style style:name="T7" style:family="text">
      <style:text-properties style:font-name="Arial1"/>
    </style:style>
    <style:style style:name="T8" style:family="text">
      <style:text-properties style:font-name="Arial1" officeooo:rsid="00169315"/>
    </style:style>
    <style:style style:name="T9" style:family="text">
      <style:text-properties fo:background-color="#ffffd7" loext:char-shading-value="0"/>
    </style:style>
    <style:style style:name="T10" style:family="text">
      <style:text-properties fo:background-color="#ffd8ce" loext:char-shading-value="0"/>
    </style:style>
    <style:style style:name="T11" style:family="text">
      <style:text-properties officeooo:rsid="00258f0c" fo:background-color="#ffd8ce" loext:char-shading-value="0"/>
    </style:style>
    <style:style style:name="T12" style:family="text">
      <style:text-properties officeooo:rsid="001769eb" fo:background-color="#ffd8ce" loext:char-shading-value="0"/>
    </style:style>
    <style:style style:name="T13" style:family="text">
      <style:text-properties officeooo:rsid="000827df"/>
    </style:style>
    <style:style style:name="T14" style:family="text">
      <style:text-properties officeooo:rsid="00091703"/>
    </style:style>
    <style:style style:name="T15" style:family="text">
      <style:text-properties officeooo:rsid="0018f2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gt;</text:span><text:span text:style-name="T2">I_</text:span><text:span text:style-name="T1">RNA_binding_like_wPipPel_00310<text:line-break/>VEYFYNHLKEEDKEKKLTEAILALSRVQSVEKDAPILDFCVNKIVDKDTLLQKLSQKDKGVYSLFAELIESCFFDTVHDLVQCWCYKEVSAGGDHSEKIFSQRDYELFLSSLSDTMLKNPELSVQARSLIMEFWECGSLYQYRKAAVNTSNYTVPTSGVFAELIVNWRREDIYKTDEEKEIEKKEILDMMSFAKDCF</text:span></text:p>
      <text:p text:style-name="P1"/>
      <text:p text:style-name="P2">&gt;II_RNA_binding_like_wRi_00742<text:line-break/>VEYFYSLLNEKERERERKITDAVTILSSVQCDHNGAVTLDFCLSKMSDQAKNKLFKDSELSKKDKGVYSLFSALIHQGFFDTMQAILPMFKDKILEDKILSPRSYTLLLSSLSDMMLENSESTIQAREAIMNLIKCGNFNNHEGREEKAAVFFSNGRVPIKRALAGLIVDWQLGCTKKEEVLKVLQFAKEFCAV</text:p>
      <text:p text:style-name="P2"/>
      <text:p text:style-name="P1"><text:span text:style-name="T1">&gt;III</text:span><text:span text:style-name="T3">_</text:span><text:span text:style-name="T1">RNA_binding_like_SpiroCDF100_00003<text:line-break/>VEYFYRRINQEGKKKIDNLMVKAVANLSAIQANHNVATVLDFLLHEIITDPIKHKLLLELSDKGKGVMYKPLSTLIQCSFVDTVQYIVKHLSQEKVLVPEEKKILSHFDYASLLSLLSNLMLENSDIDIRIKAREVFIDLWRCNRFIEHRRNVFDTSKDMRTLGRMEQTLAMLIVDWKRNDDNQNITKKDTILDILGFVK<text:line-break/></text:span></text:p>
      <text:p text:style-name="P1">&gt;<text:span text:style-name="T4">IV_</text:span>RNA_binding_like_wPipPel_00322<text:line-break/>IEFFYNKLHNDSSISSQDKDDLLIEAALSAVKGYKEVDTIEFCLSKMDDEQKKKLLDRDYKENTYYAVLNVLVGQYYFDSFMELSRLCSQIECERYTTFLSSLSDQVLKNPDLSEETKKCMMNVWERIIKLKTQDRGEQSISSIFVDYSVTYTIANLIVDPSRQGVSKEEILGKILKHVKEMSGEEMIKVK</text:p>
      <text:p text:style-name="P1"/>
      <text:p text:style-name="P2">&gt;V<text:span text:style-name="T5">_</text:span>RNA_binding_like_RIarboMS4_00020<text:line-break/>VEFFWNKLPNKDPEILIEAAIKTKNSSYAPSNSYIVAFCVDQLDSYGQPDLFRKLIRKDLIQNSDYYDSYSHVMGNLRPDHFYKHIEKVIKHLNPSDLPEKEYEKLTWNTCESIVSGPRAVFDQAVHFLTWLWDLSGYESHQQHFHDTIETTSSMLGDLIKMGVLEPVHKIFDPMDSFHTKLFTLTCQEGNNVCYSLYTQNEQKLLQKLL</text:p>
      <text:p text:style-name="P1"/>
      <text:p text:style-name="P2">&gt;<text:span text:style-name="T6">VI_</text:span>RNA_binding_like_wDacB_00003<text:line-break/>LEFFWDKLQSIDSVSSERKEDLLMEVAYNKGHFSTDDVGMVDFCLRYLHEGKYPELLKRDLKQNGYYYTLSTLNRNYSFGSAKKLFDSLKAERLSPDQYCTLMFATLNSVSSVPDDSFIKSGSDMLTSMWNSSGFDTHRQHYLHKLSEQLSSTRDLVTSLIKGNKAIRILSKIVNSLSQEQMCSIMEEDKSEYEVFVRVRNKQLVGGGGDQLPSSAL</text:p>
      <text:p text:style-name="P2"/>
      <text:p text:style-name="P2">&gt;<text:span text:style-name="T6">VII_</text:span>RNA_binding_like_REOxoOopacc6_00994<text:line-break/>LEFFWNKLQPVLSAEQKEELLINTAIYYELFSGRANVDMIDFCLHRLDVDKYPELLKRDIEKNGHHFIFTELVGDYYFDRAQKLFTYLKPEDLSNDQYDTLISISLTEISSAPDSSFVKAGYDMLSVMWNMPGFEEHKQKFLHELSYSFVAAGSIAKLITADKYSEILSEIVGSLNLEQVQNLKKHQWIY</text:p>
      <text:p text:style-name="P1"/>
      <text:p text:style-name="P2">&gt;<text:span text:style-name="T6">VIII_</text:span>RNA_binding_like_wCer_00460<text:line-break/>VEFFWDKVQSLPEGELSAQEKDEVFMRIAVHAAHDNGYPDVFEFCLSQISPNKYPELLKRDLEKNGYYGSLGRMLETSNFDQFQRLFDCLELSDVPVGPYCTWLRYIKIESCSGQYLNAGMKLLMHMLM<text:soft-page-break/>KDGFDSHLTSALNGEMMNNSIYQGSLLVPLVEKGCMGQVWTILDKANPRQVKEFMSSKQADYIRSVLEQGDNASLSKFL</text:p>
      <text:p text:style-name="P2"/>
      <text:p text:style-name="P3"><text:span text:style-name="T7">&gt;</text:span><text:span text:style-name="T8">IX_</text:span><text:span text:style-name="T7">RNA_binding_like_wBor_00004<text:line-break/>IKYFLDNLPTCGLTEEQTENLGGVLVNLAVVVAGKNCFNTEPTMNYTNIFDRLLQEVENREFDSSRIKKGFPYYFLSYFLNHKHNCFLEEVPDDLLQRDYQRLLLDIAAKEDEQLFIGFLDLKEDKGLQRINGLEKNVLLFLFQLSEDNIKRLFDSFTLEEKQAIIFYIRNNIYSLVTSWNGKDRLDLKLIIEKCLPDEEKRKRLMEELFSSKGCGICVSLIVQGSEELADEFV</text:span></text:p>
      <text:p text:style-name="P4"/>
      <text:p text:style-name="P5"><text:span text:style-name="T9">&gt;X_RNA_binding_like_REGlmRiTSETSE_00669</text:span><text:line-break/>VRYFWDKLSDEEKDRNILDSAYTVINEFHKYRSSYNEIDNYTKEQYTDICTFLISKMSISQQQELFMSYDSSIFKMFLSHWPWQELLIPTLERMWSCVDGGSYQSLLNGITDKIRKDQELGYWIENSKYQRILHEIWHKSPACLKQKIDQSDRYSSNITTQLLDIWDLSTLKLIINDQDMAQRRWELIDKGHEKYVRLVKDDKYELLEQF</text:p>
      <text:p text:style-name="P5"/>
      <text:p text:style-name="P6">&gt;XI<text:span text:style-name="T6">_</text:span>RNA_binding_like_REPsaPante1_00255<text:line-break/>VAFFSTRLLEDSSISAETRLNLLVEAALYSASSTAGNRGKDVAIFCLQEAMKDKQQLDSFLEKFSHPRGPSILKLLIEEGYFDTVCQLFPIQAQFYNINKYYSLLSAISDEKCAELREKFLHDIIELGREKFWQQVPEFDNNNYSNLLLNKCAENGYKKALQELWHAYSDDQRQHVFLCSTGKIICSILYENDNKESLKEFL</text:p>
      <text:p text:style-name="P7"/>
      <text:p text:style-name="P7"><text:span text:style-name="T10">&gt;</text:span><text:span text:style-name="T11">I</text:span><text:span text:style-name="T12">X_</text:span><text:span text:style-name="T10">RNA_binding_like_wCon_00691</text:span><text:line-break/>AEYFLQKLTSREREESLVRSAGYVANRRCNSSRNRTDLPKECYADVLCFLLSQMDKEQEAEVFKGYPRKVLKCFLDWPWQNLFMETANRMWDFLSEEDYNYFLRETVDKVIEGHKDYDYQKLFGELWQQSPNASQRYVIGKCASSGFLLSDLFKIEDEENVRLILNNATVKEKEEIIFYYKGKNICESLIYNNKWDSLKFFV</text:p>
      <text:p text:style-name="P8"/>
      <text:p text:style-name="P8">&gt;<text:span text:style-name="T13">X_RNA_binding_like_OtsuBor_01820<text:line-break/>IEYIWNRLSYEEKLKKITLAINKINNREFRSLLLSQLNYEQQKKILQNSYFLSVTLTSFLNDLLLSDYFLPIAYNALNIMQEESFLYLIKAVVNRIGSSLYSKIYDDNHYKFIFKELWQFAPKRLKEHVLECNDTYIIQNFIVFKLFLNDEINNDIDIAKLVLADANVTHKYNIMFCGSLQCGVKKCSDLIIKNQWNFLDTFIKLLISSTEDIKTLKQELIKDHGYQITIHFYQKQEYDKAEHFL</text:span></text:p>
      <text:p text:style-name="P8"/>
      <text:p text:style-name="P8">&gt;<text:span text:style-name="T14">X</text:span><text:span text:style-name="T15">_</text:span><text:span text:style-name="T14">RNA_binding_like_REMetSeq_00511<text:line-break/>IKYIWDKLSNEEKSRQIVPAIKKTSNTDIKCFLLSQMSKEQEKEVFKTYDASKILLCFLDDWLWGQYFLPTIHHIWDIMSGCDYLRVLQNIVNKMEKNHEDIEKYNQYKATFKELWQCAPKHLKEYVFEHENGYSCSSIFFSLFCKENIDIIQSILFDSNDIQKKKIIFSNYGIGICHFFITSNQWDLLEMFIGSTLFSREDVECFKQIVIKEKGQDIAVRFIQNKEWNKVEQF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13:47:59.150301800</meta:creation-date>
    <dc:date>2026-02-18T10:49:26.857373200</dc:date>
    <meta:editing-duration>PT6H21M31S</meta:editing-duration>
    <meta:editing-cycles>28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14" meta:word-count="28" meta:character-count="3432" meta:non-whitespace-character-count="3417"/>
  </office:meta>
</office:document-meta>
</file>