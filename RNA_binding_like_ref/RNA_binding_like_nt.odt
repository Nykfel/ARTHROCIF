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weight="normal" style:font-weight-asian="normal" style:font-weight-complex="normal"/>
    </style:style>
    <style:style style:name="P3" style:family="paragraph" style:parent-style-name="Standard">
      <style:text-properties style:font-name="Arial1" fo:font-weight="bold" style:font-weight-asian="bold" style:font-weight-complex="bold"/>
    </style:style>
    <style:style style:name="P4" style:family="paragraph" style:parent-style-name="Standard">
      <style:text-properties style:font-name="Arial1" officeooo:paragraph-rsid="00446b56" fo:background-color="#ffffd7"/>
    </style:style>
    <style:style style:name="P5" style:family="paragraph" style:parent-style-name="Standard">
      <style:text-properties style:font-name="Arial1" officeooo:paragraph-rsid="00446b56"/>
    </style:style>
    <style:style style:name="P6" style:family="paragraph" style:parent-style-name="Standard">
      <style:text-properties style:font-name="Arial1" officeooo:paragraph-rsid="00444ced"/>
    </style:style>
    <style:style style:name="P7" style:family="paragraph" style:parent-style-name="Standard">
      <style:text-properties style:font-name="Arial1" officeooo:rsid="000827df" officeooo:paragraph-rsid="00444ced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5c9c6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b7fbb" style:text-blinking="false" fo:background-color="transparent" loext:char-shading-value="0"/>
    </style:style>
    <style:style style:name="T4" style:family="text">
      <style:text-properties officeooo:rsid="0015c9c6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d224c" style:text-blinking="false" fo:background-color="transparent" loext:char-shading-value="0"/>
    </style:style>
    <style:style style:name="T7" style:family="text">
      <style:text-properties officeooo:rsid="00169315"/>
    </style:style>
    <style:style style:name="T8" style:family="text">
      <style:text-properties officeooo:rsid="00398702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9315" style:text-blinking="false" fo:background-color="transparent" loext:char-shading-value="0"/>
    </style:style>
    <style:style style:name="T10" style:family="text">
      <style:text-properties officeooo:rsid="003e99ab"/>
    </style:style>
    <style:style style:name="T11" style:family="text">
      <style:text-properties officeooo:rsid="00446b56" fo:background-color="#ffffd7" loext:char-shading-value="0"/>
    </style:style>
    <style:style style:name="T12" style:family="text">
      <style:text-properties fo:background-color="#ffffd7" loext:char-shading-value="0"/>
    </style:style>
    <style:style style:name="T13" style:family="text">
      <style:text-properties officeooo:rsid="0040db9f"/>
    </style:style>
    <style:style style:name="T14" style:family="text">
      <style:text-properties fo:background-color="#ffd8ce" loext:char-shading-value="0"/>
    </style:style>
    <style:style style:name="T15" style:family="text">
      <style:text-properties officeooo:rsid="00258f0c" fo:background-color="#ffd8ce" loext:char-shading-value="0"/>
    </style:style>
    <style:style style:name="T16" style:family="text">
      <style:text-properties officeooo:rsid="001769eb" fo:background-color="#ffd8ce" loext:char-shading-value="0"/>
    </style:style>
    <style:style style:name="T17" style:family="text">
      <style:text-properties officeooo:rsid="000827df"/>
    </style:style>
    <style:style style:name="T18" style:family="text">
      <style:text-properties officeooo:rsid="00444ce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91703" style:font-weight-asian="normal" style:font-weight-complex="normal"/>
    </style:style>
    <style:style style:name="T21" style:family="text">
      <style:text-properties fo:font-weight="normal" officeooo:rsid="0018f2a7" style:font-weight-asian="normal" style:font-weight-complex="normal"/>
    </style:style>
    <style:style style:name="T22" style:family="text">
      <style:text-properties fo:font-weight="normal" officeooo:rsid="004b1080" style:font-weight-asian="normal" style:font-weight-complex="normal"/>
    </style:style>
    <style:style style:name="T23" style:family="text">
      <style:text-properties officeooo:rsid="00091703"/>
    </style:style>
    <style:style style:name="T24" style:family="text">
      <style:text-properties officeooo:rsid="0043b1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gt;</text:span><text:span text:style-name="T2">I_</text:span><text:span text:style-name="T1">RNA_binding_like_wPipPel_00310<text:line-break/>AGAGTATTTTTATAATCATTTAAAAGAAGAAGATAAGGAAAAGAAGCTCACAGAAGCTATTCTTGCTCTTTCTCGCGTTCAATCTGTTGAGAAAGACGCCCCTATTTTAGATTTTTGTGTAAATAAGATAGTCGATAAAGATACTCTTTTACAGAAATTATCACAGAAAGATAAAGGAGTATATTCCCTTTTTGCTGAATTAATAGAGTCATGTTTTTTTGATACGGTTCATGATTTGGTACAGTGCTGGTGTTATAAAGAAGTTTCAGCAGGAGGAGACCATTCAGAGAAAATATTCTCACAGCGAGACTATGAGCTTTTTCTTTCCTCTCTTTCAGACACAATGTTGAAAAATCCTGAGTTAAGCGTTCAAGCTAGATCTCTTATTATGGAATTTTGGGAATGTGGTAGCTTGTATCAATACAGAAAAGCTGCTGTTAATACTTCTAATTATACAGTTCCTACAAGTGGTGTATTTGCAGAGTTAATAGTCAATTGGAGACGAGAAGACATTTATAAGACTGATGAAGAAAAAGAAATAGAGAAAAAAGAAATATTAGATATGATGTCATTTGCCAAAGATTGCTTT</text:span></text:p>
      <text:p text:style-name="P1"/>
      <text:p text:style-name="P1">&gt;II_RNA_binding_like_wRi_00742</text:p>
      <text:p text:style-name="P1">AGAATATTTTTATAGCCTTCTAAATGAAAAAGAAAGAGAAAGAGAAAGGAAAATTACTGATGCAGTTACTATATTATCCTCTGTTCAATGTGACCATAATGGTGCTGTTACTTTAGACTTTTGTCTTAGTAAAATGAGCGATCAAGCAAAAAACAAGCTGTTTAAAGATTCTGAGCTATCAAAAAAAGATAAAGGAGTGTACTCTCTCTTTAGCGCGTTGATACATCAAGGTTTTTTTGATACGATGCAAGCTATACTTCCGATGTTTAAAGATAAAATACTGGAGGATAAGATACTTTCACCTAGGAGTTATACTCTTCTTCTCTCCTCACTTTCGGACATGATGCTCGAAAATTCTGAGTCAACTATTCAAGCTAGGGAAGCTATAATGAACCTTATAAAGTGTGGTAATTTCAATAATCATGAGGGGCGTGAGGAAAAAGCTGCGGTATTTTTTTCTAATGGAAGGGTTCCGATTAAGCGTGCGCTTGCAGGATTGATTGTCGATTGGCAACTTGGTTGTACAAAAAAGGAAGAGGTGTTAAAGGTACTACAGTTTGCCAAAGAGTTTTGTGCAGTT<text:line-break/></text:p>
      <text:p text:style-name="P1"><text:span text:style-name="T1">&gt;III</text:span><text:span text:style-name="T3">_</text:span><text:span text:style-name="T1">RNA_binding_like_SpiroCDF100_00003</text:span></text:p>
      <text:p text:style-name="P1">AGAATACTTCTATCGTCGTATAAATCAGGAAGGAAAGAAAAAGATTGATAACCTGATGGTTAAAGCTGTTGCTAATTTATCTGCTATTCAAGCTAACCATAATGTTGCTACCGTTTTAGATTTTCTTCTGCATGAAATAATCACTGATCCAATAAAGCATAAATTACTACTTGAGTTATCAGATAAAGGCAAAGGAGTTATGTATAAGCCTCTTAGCACATTAATACAGTGTAGTTTCGTTGATACAGTTCAATATATAGTAAAGCACTTGTCTCAGGAAAAAGTTTTAGTGCCTGAGGAGAAGAAAATACTTTCACATTTTGATTACGCTTCTTTGCTTTCTTTGCTTTCAAATTTGATGTTAGAAAATTCAGATATAGATATCCGAATCAAGGCAAGAGAGGTTTTTATAGATCTTTGGAGATGCAATCGTTTTATTGAACATAGAAGAAATGTTTTTGATACTTCTAAAGATATGCGTACCTTAGGTCGTATGGAACAGACACTTGCAATGTTGATTGTAGATTGGAAGCGTAATGATGATAATCAAAATATTACTAAAAAGGACACGATATTAGATATTTTAGGATTTGTAAAA<text:line-break/></text:p>
      <text:p text:style-name="P1">&gt;<text:span text:style-name="T4">IV_</text:span>RNA_binding_like_wPipPel_00322</text:p>
      <text:p text:style-name="P1">AGAGTTCTTCTATAATAAATTACACAATGATTCCAGTATTTCTAGTCAAGATAAAGATGATCTGTTAATTGAAGCAGCTTTATCTGCAGTAAAGGGTTACAAAGAAGTAGACACCATAGAGTTTTGCCTGTCTAAAATGGATGATGAGCAAAAGAAAAAATTACTAGATAGAGATTATAAGGAAAATACTTATTATGCAGTGTTGAATGTGCTAGTAGGTCAGTATTACTTTGATTCTTTTATGGAATTAAGCCGATTGTGTAGTCAGATTGAATGTGAACGTTACACAACTTTTTTATCTTCATTATCAGATCAAGTACTGAAGAATCCAGATCTGTCTGAAGAAACAAAAAAATGTATGATGAATGTTTGGGAACGTATAATAAAATTAAAAACTCAAGACCGCGGGGAGCAATCTATTTCCTCTATTTTTGTAGACTATTCAGTTACATATACAATAGCAAATTTAATTGTGGATCCAAGTAGACAAGGGGTAAGTAAAGAAGAAATATTAGGGAAGATATTAAAGCACGTAAAAGAAATGAGTGGTGAAGAGATGATAAAGGTTAAA</text:p>
      <text:p text:style-name="P1"/>
      <text:p text:style-name="P2"><text:span text:style-name="T5">&gt;V</text:span><text:span text:style-name="T6">_</text:span><text:span text:style-name="T5">RNA_binding_like_RIarboMS4_00020</text:span></text:p>
      <text:p text:style-name="P2">AGAGTTTTTCTGGAATAAACTACCTAATAAGGATCCTGAAATTCTAATAGAGGCAGCAATAAAAACTAAAAATAGTAGTTATGCACCTAGTAATTCTTATATTGTAGCTTTTTGTGTTGATCAATTAGATTCTTATGGACAACCAGATCTCTTTAGGAAGCTTATAAGAAAGGATTTGATA<text:soft-page-break/>CAGAATAGTGATTATTATGATAGTTATTCTCATGTGATGGGTAATTTAAGGCCAGATCATTTTTATAAACATATAGAAAAAGTAATTAAACATTTAAATCCAAGTGATTTGCCTGAAAAAGAGTATGAGAAGTTAACTTGGAATACATGTGAGAGTATAGTGTCTGGTCCTAGGGCTGTATTTGACCAAGCAGTACATTTCTTAACTTGGCTGTGGGATTTATCAGGTTATGAAAGTCATCAACAACATTTTCACGATACTATAGAAACAACATCTAGTATGTTAGGTGATCTTATAAAAATGGGGGTATTAGAACCTGTTCATAAAATTTTTGATCCAATGGATAGTTTTCATACTAAATTATTTACTCTAACGTGCCAAGAAGGAAATAATGTTTGTTACAGTTTATACACTCAAAATGAACAAAAGTTATTACAAAAGCTTTTA</text:p>
      <text:p text:style-name="P2"/>
      <text:p text:style-name="P2">&gt;<text:span text:style-name="T7">VI_</text:span>RNA_binding_like_wDacB_00003<text:line-break/><text:span text:style-name="T8">G</text:span>GAATTTTTCTGGGATAAGTTACAGTCAATTGATTCTGTATCTTCAGAAAGAAAAGAAGATTTATTAATGGAAGTAGCATATAATAAAGGACATTTTTCTACAGATGATGTTGGAATGGTTGACTTCTGTCTACGCTACCTTCATGAAGGTAAGTATCCTGAGTTGTTGAAAAGGGACCTCAAACAAAATGGCTATTACTATACTTTAAGTACATTGAATAGGAACTATTCTTTTGGAAGTGCTAAAAAGCTATTTGACTCTCTGAAAGCAGAACGTTTATCTCCTGATCAGTATTGTACGTTAATGTTTGCGACGTTAAACTCGGTTTCTTCTGTGCCAGATGATAGTTTTATCAAGTCTGGCAGTGATATGCTTACCTCTATGTGGAATAGTTCTGGTTTTGATACTCATAGACAACACTATTTACATAAGTTAAGCGAACAGCTCTCATCAACAAGAGATTTGGTTACTTCTCTTATTAAGGGGAATAAAGCTATTAGAATATTATCTAAAATTGTTAATTCTCTTAGCCAAGAGCAAATGTGCTCTATTATGGAAGAAGATAAGTCAGAATATGAGGTGTTTGTTAGAGTGAGAAACAAGCAATTAGTTGGTGGAGGTGGTGATCAGTTACCAAGTTCAGCGTTA</text:p>
      <text:p text:style-name="P3"/>
      <text:p text:style-name="P1"><text:span text:style-name="T1">&gt;</text:span><text:span text:style-name="T9">VII_</text:span><text:span text:style-name="T1">RNA_binding_like_REOxoOopacc6_00994<text:line-break/>GAGTTTTTTTGGAATAAATTGCAACCGGTATTATCTGCAGAGCAAAAAGAAGAACTATTAATAAACACGGCTATTTACTATGAGCTATTTAGTGGTAGAGCTAATGTAGATATGATTGATTTTTGTCTGCATCGTCTTGATGTCGATAAATATCCTGAGTTGTTAAAAAGGGACATTGAAAAGAATGGTCATCATTTTATTTTTACAGAACTTGTAGGTGATTATTATTTTGACCGTGCTCAAAAATTATTTACATATTTAAAACCAGAAGATTTATCCAATGATCAATATGATACATTAATATCCATATCATTAACCGAAATCTCTTCAGCACCTGATAGTAGTTTTGTAAAAGCTGGCTATGATATGCTGAGTGTTATGTGGAATATGCCCGGATTTGAAGAGCATAAACAAAAGTTTTTACATGAACTAAGCTATAGTTTTGTTGCTGCAGGTAGTATAGCAAAACTCATTACAGCAGATAAATACTCAGAGATATTATCAGAAATAGTTGGCTCTCTTAACTTAGAACAAGTACAAAATCTTAAAAAACACCAATGGATTTAT</text:span></text:p>
      <text:p text:style-name="P1"/>
      <text:p text:style-name="P1">&gt;<text:span text:style-name="T7">VIII_</text:span>RNA_binding_like_wCer_00460</text:p>
      <text:p text:style-name="P1">GGAATTCTTTTGGGATAAGGTTCAGTCATTACCTGAAGGTGAGTTAAGTGCTCAGGAAAAAGATGAAGTTTTCATGAGAATTGCAGTGCATGCGGCACATGATAATGGCTATCCTGATGTGTTTGAATTTTGTTTAAGTCAGATAAGTCCTAATAAATATCCAGAGCTTTTGAAAAGAGATTTAGAGAAAAATGGTTATTATGGTTCTTTAGGAAGAATGTTAGAAACGTCTAACTTTGACCAATTTCAAAGATTATTCGACTGCTTAGAGCTAAGTGATGTGCCAGTAGGTCCTTATTGTACCTGGTTAAGATATATAAAAATAGAAAGTTGTTCTGGGCAGTATTTAAATGCAGGTATGAAGCTCTTGATGCATATGTTAATGAAGGATGGATTTGATAGTCATCTTACTTCAGCATTAAATGGAGAAATGATGAACAATTCCATTTATCAAGGAAGTTTATTAGTCCCTTTGGTCGAGAAAGGCTGTATGGGGCAAGTGTGGACAATATTGGATAAAGCTAATCCTAGACAGGTTAAAGAATTTATGAGTTCTAAGCAAGCGGATTATATACGTTCCGTTTTAGAGCAAGGAGATAATGCTTCATTAAGTAAGTTTTTA<text:line-break/></text:p>
      <text:p text:style-name="P1"><text:span text:style-name="T1">&gt;</text:span><text:span text:style-name="T9">IX_</text:span><text:span text:style-name="T1">RNA_binding_like_wBor_00004</text:span></text:p>
      <text:p text:style-name="P1"><text:span text:style-name="T10">A</text:span>AAATACTTTTTAGATAATTTACCCACTTGCGGATTAACAGAAGAACAAACAGAAAATTTGGGAGGAGTTTTAGTAAATTTAGCAGTAGTTGTTGCAGGTAAAAATTGTTTTAATACTGAGCCGACTATGAATTATACTAATATTTTTGATCGACTACTTCAAGAAGTAGAAAACAGGGAGTTTGATTCTTCCAGAATAAAAAAGGGATTTCCTTATTATTTTTTAAGCTACTTTTTAAATC<text:soft-page-break/>ATAAGCACAATTGTTTTTTGGAGGAAGTGCCTGATGATCTGTTACAGCGCGATTATCAGCGTCTGTTGTTGGACATTGCTGCAAAAGAGGATGAGCAACTTTTTATAGGATTTTTAGATCTCAAAGAAGATAAGGGTTTGCAGCGTATTAACGGATTAGAAAAAAATGTTTTACTGTTTTTATTTCAACTAAGTGAAGATAACATTAAAAGACTTTTCGATTCTTTTACCCTTGAAGAAAAGCAAGCTATAATTTTTTATATTAGGAATAATATTTACTCATTAGTAACTTCTTGGAATGGAAAGGATAGATTGGATTTAAAACTTATTATTGAAAAATGCCTTCCTGATGAGGAAAAAAGAAAGAGATTAATGGAAGAGTTATTCTCTTCTAAGGGGTGCGGTATTTGTGTTAGTCTTATTGTTCAAGGTAGCGAGGAATTGGCTGATGAATTTGTG</text:p>
      <text:p text:style-name="P1"/>
      <text:p text:style-name="P1"/>
      <text:p text:style-name="P4">&gt;X_RNA_binding_like_REGlmRiTSETSE_00669</text:p>
      <text:p text:style-name="P5"><text:span text:style-name="T11">G</text:span><text:span text:style-name="T12">AGATATTTTTGGGACAAGTTAAGTGATGAGGAAAAAGATCGGAACATATTAGATAGTGCGTATACGGTAATAAATGAGTTTCATAAATATCGTAGTTCTTATAATGAAATAGATAATTATACAAAAGAGCAATATACGGATATATGTACATTTTTAATAAGCAAAATGAGCATAAGTCAGCAGCAAGAGTTATTTATGTCGTATGATTCTAGTATATTTAAGATGTTTTTATCGCATTGGCCATGGCAAGAATTGTTAATACCGACATTAGAGAGGATGTGGAGTTGTGTAGACGGTGGATCATATCAATCACTATTAAATGGGATTACGGATAAGATACGTAAAGATCAAGAATTAGGTTATTGGATAGAAAATAGTAAATATCAAAGAATATTACATGAAATATGGCATAAAAGTCCGGCATGTCTTAAACAAAAGATAGATCAAAGTGATCGTTATAGTTCAAATATCACAACGCAGTTATTAGATATATGGGATTTATCAACTCTGAAGTTAATTATTAATGATCAGGATATGGCACAAAGACGATGGGAGTTAATAGATAAAGGACATGAAAAATATGTAAGATTAGTAAAGGACGATAAATATGAGTTATTAGAGCAGTTT</text:span><text:line-break/></text:p>
      <text:p text:style-name="P1"><text:span text:style-name="T1">&gt;XI</text:span><text:span text:style-name="T9">_</text:span><text:span text:style-name="T1">RNA_binding_like_REPsaPante1_00255</text:span></text:p>
      <text:p text:style-name="P1"><text:span text:style-name="T13">T</text:span>GCATTTTTTTCTACAAGACTATTAGAAGATTCGAGTATTTCTGCAGAGACTAGATTAAACTTACTTGTTGAAGCGGCATTATATTCTGCTAGTAGTACAGCAGGTAATAGGGGAAAAGATGTAGCTATCTTTTGCTTACAGGAGGCAATGAAAGATAAACAACAACTAGATTCTTTTCTTGAAAAGTTTAGTCATCCTCGTGGTCCATCGATACTTAAGTTGTTAATTGAAGAGGGATATTTTGATACGGTGTGCCAATTATTTCCAATACAAGCTCAATTTTATAATATTAACAAATATTACAGCTTATTGTCTGCTATCAGTGATGAAAAGTGTGCTGAACTTAGAGAAAAGTTTTTACATGATATTATAGAGTTAGGAAGGGAGAAATTTTGGCAGCAAGTGCCTGAATTTGATAATAATAACTATTCTAATCTCTTGTTGAATAAGTGTGCAGAAAATGGATATAAGAAAGCTCTTCAAGAATTATGGCACGCATATAGTGATGATCAACGTCAACATGTTTTTCTTTGTAGCACAGGTAAAATTATTTGTAGTATTCTTTATGAGAATGATAATAAAGAATCACTAAAAGAATTTTTA<text:line-break/></text:p>
      <text:p text:style-name="P1"><text:span text:style-name="T14">&gt;</text:span><text:span text:style-name="T15">I</text:span><text:span text:style-name="T16">X_</text:span><text:span text:style-name="T14">RNA_binding_like_wCon_00691</text:span></text:p>
      <text:p text:style-name="P1">TGAATATTTTTTGCAAAAACTAACCTCTAGGGAAAGAGAAGAATCTTTGGTAAGATCTGCAGGATATGTAGCAAATAGACGTTGTAACTCTTCTCGCAACCGTACCGATCTTCCTAAAGAATGCTATGCTGATGTTTTATGTTTTTTACTCTCACAAATGGACAAAGAGCAAGAAGCAGAGGTGTTTAAAGGCTATCCTCGTAAAGTACTGAAGTGTTTTTTGGATTGGCCATGGCAAAATCTCTTTATGGAAACAGCAAATCGTATGTGGGATTTTCTTTCCGAAGAGGATTATAATTATTTTTTGAGAGAAACGGTCGATAAAGTAATAGAGGGCCACAAAGATTATGACTATCAAAAGCTTTTTGGGGAACTTTGGCAGCAAAGCCCTAATGCTAGCCAAAGGTATGTTATAGGTAAATGCGCATCGAGTGGATTTTTGTTGTCAGACTTATTTAAGATTGAAGATGAAGAAAATGTTAGATTAATCTTAAATAATGCTACCGTTAAAGAGAAAGAAGAAATTATCTTTTATTATAAAGGGAAGAATATTTGTGAGAGTTTAATTTATAATAATAAATGGGATTCACTGAAATTCTTTGTT</text:p>
      <text:p text:style-name="P1"/>
      <text:p text:style-name="P6">&gt;<text:span text:style-name="T17">X_RNA_binding_like_OtsuBor_01820</text:span></text:p>
      <text:p text:style-name="P7"><text:span text:style-name="T18">A</text:span>GAGTACATTTGGAATAGACTTAGTTATGAAGAAAAATTAAAAAAGATAACATTAGCAATAAACAAAATAAATAATCGAGAGTTTAGATCTTTATTATTATCTCAACTTAATTACGAACAGCAGAAAAAAATTCTTCAGAATTCTTACTTTTTAAGTGTTACACTAACAAGTTTTTTGAATGA<text:soft-page-break/>TTTATTATTGAGTGATTACTTCTTACCTATAGCATATAATGCATTAAATATCATGCAAGAAGAATCGTTCTTGTACTTAATAAAAGCAGTAGTTAATAGAATTGGTTCAAGCTTGTATTCAAAAATTTATGATGATAATCATTATAAATTTATATTCAAGGAATTATGGCAGTTTGCTCCAAAGCGGTTAAAGGAACATGTACTTGAATGCAATGATACATACATAATACAAAATTTTATTGTATTCAAGTTATTTTTGAATGATGAGATTAATAATGATATAGATATAGCAAAGTTAGTATTAGCTGACGCAAATGTTACGCACAAATATAATATAATGTTTTGCGGCTCACTGCAATGCGGAGTTAAGAAATGCAGTGATTTAATTATCAAGAACCAATGGAATTTTTTAGATACATTTATTAAGCTGCTTATATCGTCTACAGAAGATATAAAAACGCTTAAACAAGAACTTATAAAAGATCATGGATATCAGATAACAATACATTTTTATCAAAAGCAAGAATATGATAAAGCTGAACATTTTCTC<text:line-break/></text:p>
      <text:p text:style-name="P1"><text:span text:style-name="T19">&gt;</text:span><text:span text:style-name="T20">X</text:span><text:span text:style-name="T21">_</text:span><text:span text:style-name="T20">RNA_binding_like_REMetSeq_00511 </text:span><text:span text:style-name="T22">#j’ai été obligé de restreindre la rehcerche aux arthropodes et non aux eucaryotes pour que ça marche </text:span><text:span text:style-name="T23"><text:line-break/></text:span><text:span text:style-name="T24">A</text:span><text:span text:style-name="T23">AAATATATCTGGGATAAACTGAGTAATGAAGAAAAATCAAGACAAATAGTTCCAGCAATAAAAAAAACTTCTAATACTGATATTAAATGTTTTTTGCTATCACAAATGAGTAAAGAGCAAGAAAAAGAAGTATTTAAAACTTATGATGCTAGTAAAATCTTATTATGCTTTTTAGATGATTGGTTATGGGGACAGTATTTTTTACCTACGATACATCATATATGGGATATAATGTCTGGATGTGATTATCTTCGTGTATTACAAAATATTGTGAATAAAATGGAAAAAAATCATGAGGATATTGAAAAATATAATCAATATAAAGCTACATTTAAGGAGTTATGGCAATGTGCTCCTAAACATTTAAAGGAATATGTTTTTGAACATGAGAATGGCTACAGTTGTAGTAGTATATTCTTCAGTTTATTTTGCAAGGAAAACATAGATATAATTCAGTCAATATTATTTGACTCTAATGATATACAAAAGAAAAAAATAATATTTTCAAATTATGGGATTGGTATATGTCATTTCTTCATAACAAGTAATCAATGGGATTTATTAGAGATGTTTATTGGAAGTACTCTTTTTTCTAGAGAAGATGTAGAGTGCTTTAAACAGATAGTTATAAAAGAAAAAGGACAAGATATAGCTGTACGTTTTATACAAAATAAAGAATGGAATAAAGTAGAGCAATTCCT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2T16:09:31.516510800</meta:creation-date>
    <dc:date>2026-02-19T08:47:47.703085000</dc:date>
    <meta:editing-duration>PT11H39M24S</meta:editing-duration>
    <meta:editing-cycles>45</meta:editing-cycles>
    <meta:generator>LibreOffice/25.8.4.2$Windows_X86_64 LibreOffice_project/290daaa01b999472f0c7a3890eb6a550fd74c6df</meta:generator>
    <meta:document-statistic meta:table-count="0" meta:image-count="0" meta:object-count="0" meta:page-count="4" meta:paragraph-count="24" meta:word-count="45" meta:character-count="9371" meta:non-whitespace-character-count="9343"/>
  </office:meta>
</office:document-meta>
</file>